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18cm"/>
    </style:style>
    <style:style style:name="co2" style:family="table-column">
      <style:table-column-properties fo:break-before="auto" style:column-width="9.46cm"/>
    </style:style>
    <style:style style:name="co3" style:family="table-column">
      <style:table-column-properties fo:break-before="auto" style:column-width="9.269cm"/>
    </style:style>
    <style:style style:name="co4" style:family="table-column">
      <style:table-column-properties fo:break-before="auto" style:column-width="6.027cm"/>
    </style:style>
    <style:style style:name="co5" style:family="table-column">
      <style:table-column-properties fo:break-before="auto" style:column-width="9.07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bined" table:style-name="ta1">
        <table:shapes>
          <draw:frame draw:z-index="0" draw:style-name="gr1" draw:text-style-name="P1" svg:width="89.254cm" svg:height="50.204cm" svg:x="760.379cm" svg:y="0.1cm">
            <draw:object draw:notify-on-update-of-ranges="combined.A1:combined.A1 combined.A2:combined.A21 combined.B1:combined.B1 combined.B2:combined.B21 combined.A1:combined.A1 combined.A2:combined.A21 combined.C1:combined.C1 combined.C2:combined.C21 combined.A1:combined.A1 combined.A2:combined.A21 combined.D1:combined.D1 combined.D2:combined.D21 combined.A1:combined.A1 combined.A2:combined.A21 combined.E1:combined.E1 combined.E2:combined.E21 combined.A1:combined.A1 combined.A2:combined.A21 combined.F1:combined.F1 combined.F2:combined.F21 combined.A1:combined.A1 combined.A2:combined.A21 combined.G1:combined.G1 combined.G2:combined.G21 combined.A1:combined.A1 combined.A2:combined.A21 combined.H1:combined.H1 combined.H2:combined.H21 combined.A1:combined.A1 combined.A2:combined.A21 combined.I1:combined.I1 combined.I2:combined.I21 combined.A1:combined.A1 combined.A2:combined.A21 combined.J1:combined.J1 combined.J2:combined.J21 combined.A1:combined.A1 combined.A2:combined.A21 combined.K1:combined.K1 combined.K2:combined.K21 combined.A1:combined.A1 combined.A2:combined.A21 combined.L1:combined.L1 combined.L2:combined.L21 combined.A1:combined.A1 combined.A2:combined.A21 combined.M1:combined.M1 combined.M2:combined.M21 combined.A1:combined.A1 combined.A2:combined.A21 combined.N1:combined.N1 combined.N2:combined.N21 combined.A1:combined.A1 combined.A2:combined.A21 combined.O1:combined.O1 combined.O2:combined.O21 combined.A1:combined.A1 combined.A2:combined.A21 combined.P1:combined.P1 combined.P2:combined.P21 combined.A1:combined.A1 combined.A2:combined.A21 combined.Q1:combined.Q1 combined.Q2:combined.Q21 combined.A1:combined.A1 combined.A2:combined.A21 combined.R1:combined.R1 combined.R2:combined.R21 combined.A1:combined.A1 combined.A2:combined.A21 combined.S1:combined.S1 combined.S2:combined.S21 combined.A1:combined.A1 combined.A2:combined.A21 combined.T1:combined.T1 combined.T2:combined.T21 combined.A1:combined.A1 combined.A2:combined.A21 combined.U1:combined.U1 combined.U2:combined.U21 combined.A1:combined.A1 combined.A2:combined.A21 combined.V1:combined.V1 combined.V2:combined.V21 combined.A1:combined.A1 combined.A2:combined.A21 combined.W1:combined.W1 combined.W2:combined.W21 combined.A1:combined.A1 combined.A2:combined.A21 combined.X1:combined.X1 combined.X2:combined.X21 combined.A1:combined.A1 combined.A2:combined.A21 combined.Y1:combined.Y1 combined.Y2:combined.Y21 combined.A1:combined.A1 combined.A2:combined.A21 combined.Z1:combined.Z1 combined.Z2:combined.Z21 combined.A1:combined.A1 combined.A2:combined.A21 combined.AA1:combined.AA1 combined.AA2:combined.AA21 combined.A1:combined.A1 combined.A2:combined.A21 combined.AB1:combined.AB1 combined.AB2:combined.AB21 combined.A1:combined.A1 combined.A2:combined.A21 combined.AC1:combined.AC1 combined.AC2:combined.AC21 combined.A1:combined.A1 combined.A2:combined.A21 combined.AD1:combined.AD1 combined.AD2:combined.AD21 combined.A1:combined.A1 combined.A2:combined.A21 combined.AE1:combined.AE1 combined.AE2:combined.AE21 combined.A1:combined.A1 combined.A2:combined.A21 combined.AF1:combined.AF1 combined.AF2:combined.AF21 combined.A1:combined.A1 combined.A2:combined.A21 combined.AG1:combined.AG1 combined.AG2:combined.AG21 combined.A1:combined.A1 combined.A2:combined.A21 combined.AH1:combined.AH1 combined.AH2:combined.AH21 combined.A1:combined.A1 combined.A2:combined.A21 combined.AI1:combined.AI1 combined.AI2:combined.AI21 combined.A1:combined.A1 combined.A2:combined.A21 combined.AJ1:combined.AJ1 combined.AJ2:combined.AJ21 combined.A1:combined.A1 combined.A2:combined.A21 combined.AK1:combined.AK1 combined.AK2:combined.AK21 combined.A1:combined.A1 combined.A2:combined.A21 combined.AL1:combined.AL1 combined.AL2:combined.AL21 combined.A1:combined.A1 combined.A2:combined.A21 combined.AM1:combined.AM1 combined.AM2:combined.AM21 combined.A1:combined.A1 combined.A2:combined.A21 combined.AN1:combined.AN1 combined.AN2:combined.AN21 combined.A1:combined.A1 combined.A2:combined.A21 combined.AO1:combined.AO1 combined.AO2:combined.AO21 combined.A1:combined.A1 combined.A2:combined.A21 combined.AP1:combined.AP1 combined.AP2:combined.AP21 combined.A1:combined.A1 combined.A2:combined.A21 combined.AQ1:combined.AQ1 combined.AQ2:combined.AQ21 combined.A1:combined.A1 combined.A2:combined.A21 combined.AR1:combined.AR1 combined.AR2:combined.AR21 combined.A1:combined.A1 combined.A2:combined.A21 combined.AS1:combined.AS1 combined.AS2:combined.AS21 combined.A1:combined.A1 combined.A2:combined.A21 combined.AT1:combined.AT1 combined.AT2:combined.AT21 combined.A1:combined.A1 combined.A2:combined.A21 combined.AU1:combined.AU1 combined.AU2:combined.AU21 combined.A1:combined.A1 combined.A2:combined.A21 combined.AV1:combined.AV1 combined.AV2:combined.AV21 combined.A1:combined.A1 combined.A2:combined.A21 combined.AW1:combined.AW1 combined.AW2:combined.AW21 combined.A1:combined.A1 combined.A2:combined.A21 combined.AX1:combined.AX1 combined.AX2:combined.AX21 combined.A1:combined.A1 combined.A2:combined.A21 combined.AY1:combined.AY1 combined.AY2:combined.AY21 combined.A1:combined.A1 combined.A2:combined.A21 combined.AZ1:combined.AZ1 combined.AZ2:combined.AZ21 combined.A1:combined.A1 combined.A2:combined.A21 combined.BA1:combined.BA1 combined.BA2:combined.BA21 combined.A1:combined.A1 combined.A2:combined.A21 combined.BB1:combined.BB1 combined.BB2:combined.BB21 combined.A1:combined.A1 combined.A2:combined.A21 combined.BC1:combined.BC1 combined.BC2:combined.BC21 combined.A1:combined.A1 combined.A2:combined.A21 combined.BD1:combined.BD1 combined.BD2:combined.BD21 combined.A1:combined.A1 combined.A2:combined.A21 combined.BE1:combined.BE1 combined.BE2:combined.BE21 combined.A1:combined.A1 combined.A2:combined.A21 combined.BF1:combined.BF1 combined.BF2:combined.BF21 combined.A1:combined.A1 combined.A2:combined.A21 combined.BG1:combined.BG1 combined.BG2:combined.BG21 combined.A1:combined.A1 combined.A2:combined.A21 combined.BH1:combined.BH1 combined.BH2:combined.BH21 combined.A1:combined.A1 combined.A2:combined.A21 combined.BI1:combined.BI1 combined.BI2:combined.BI21 combined.A1:combined.A1 combined.A2:combined.A21 combined.BJ1:combined.BJ1 combined.BJ2:combined.BJ21 combined.A1:combined.A1 combined.A2:combined.A21 combined.BK1:combined.BK1 combined.BK2:combined.BK21 combined.A1:combined.A1 combined.A2:combined.A21 combined.BL1:combined.BL1 combined.BL2:combined.BL21 combined.A1:combined.A1 combined.A2:combined.A21 combined.BM1:combined.BM1 combined.BM2:combined.BM21 combined.A1:combined.A1 combined.A2:combined.A21 combined.BN1:combined.BN1 combined.BN2:combined.BN21 combined.A1:combined.A1 combined.A2:combined.A21 combined.BO1:combined.BO1 combined.BO2:combined.BO21 combined.A1:combined.A1 combined.A2:combined.A21 combined.BP1:combined.BP1 combined.BP2:combined.BP21 combined.A1:combined.A1 combined.A2:combined.A21 combined.BQ1:combined.BQ1 combined.BQ2:combined.BQ21 combined.A1:combined.A1 combined.A2:combined.A21 combined.BR1:combined.BR1 combined.BR2:combined.BR21 combined.A1:combined.A1 combined.A2:combined.A21 combined.BS1:combined.BS1 combined.BS2:combined.BS21 combined.A1:combined.A1 combined.A2:combined.A21 combined.BT1:combined.BT1 combined.BT2:combined.BT21 combined.A1:combined.A1 combined.A2:combined.A21 combined.BU1:combined.BU1 combined.BU2:combined.BU21 combined.A1:combined.A1 combined.A2:combined.A21 combined.BV1:combined.BV1 combined.BV2:combined.BV21 combined.A1:combined.A1 combined.A2:combined.A21 combined.BW1:combined.BW1 combined.BW2:combined.BW21 combined.A1:combined.A1 combined.A2:combined.A21 combined.BX1:combined.BX1 combined.BX2:combined.BX21 combined.A1:combined.A1 combined.A2:combined.A21 combined.BY1:combined.BY1 combined.BY2:combined.BY21 combined.A1:combined.A1 combined.A2:combined.A21 combined.BZ1:combined.BZ1 combined.BZ2:combined.BZ21 combined.A1:combined.A1 combined.A2:combined.A21 combined.CA1:combined.CA1 combined.CA2:combined.CA21 combined.A1:combined.A1 combined.A2:combined.A21 combined.CB1:combined.CB1 combined.CB2:combined.CB21 combined.A1:combined.A1 combined.A2:combined.A21 combined.CC1:combined.CC1 combined.CC2:combined.CC21 combined.A1:combined.A1 combined.A2:combined.A21 combined.CD1:combined.CD1 combined.CD2:combined.CD21 combined.A1:combined.A1 combined.A2:combined.A21 combined.CE1:combined.CE1 combined.CE2:combined.CE21 combined.A1:combined.A1 combined.A2:combined.A21 combined.CF1:combined.CF1 combined.CF2:combined.CF21 combined.A1:combined.A1 combined.A2:combined.A21 combined.CG1:combined.CG1 combined.CG2:combined.CG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7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7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chop</text:p>
          </table:table-cell>
          <table:table-cell office:value-type="string" calcext:value-type="string">
            <text:p>noise_0.009999999776482582_ln_0.0</text:p>
          </table:table-cell>
          <table:table-cell office:value-type="string" calcext:value-type="string">
            <text:p>noise_0.009999999776482582_ln_0.007499999832361937</text:p>
          </table:table-cell>
          <table:table-cell office:value-type="string" calcext:value-type="string">
            <text:p>noise_0.009999999776482582_ln_0.014999999664723873</text:p>
          </table:table-cell>
          <table:table-cell office:value-type="string" calcext:value-type="string">
            <text:p>noise_0.009999999776482582_ln_0.022499999031424522</text:p>
          </table:table-cell>
          <table:table-cell office:value-type="string" calcext:value-type="string">
            <text:p>noise_0.009999999776482582_ln_0.029999999329447746</text:p>
          </table:table-cell>
          <table:table-cell office:value-type="string" calcext:value-type="string">
            <text:p>noise_0.009999999776482582_ln_0.03749999776482582</text:p>
          </table:table-cell>
          <table:table-cell office:value-type="string" calcext:value-type="string">
            <text:p>noise_0.009999999776482582_ln_0.044999998062849045</text:p>
          </table:table-cell>
          <table:table-cell office:value-type="string" calcext:value-type="string">
            <text:p>noise_0.009999999776482582_ln_0.05249999836087227</text:p>
          </table:table-cell>
          <table:table-cell office:value-type="string" calcext:value-type="string">
            <text:p>noise_0.009999999776482582_ln_0.05999999865889549</text:p>
          </table:table-cell>
          <table:table-cell office:value-type="string" calcext:value-type="string">
            <text:p>noise_0.009999999776482582_ln_0.06749999523162842</text:p>
          </table:table-cell>
          <table:table-cell office:value-type="string" calcext:value-type="string">
            <text:p>noise_0.009999999776482582_ln_0.07499999552965164</text:p>
          </table:table-cell>
          <table:table-cell office:value-type="string" calcext:value-type="string">
            <text:p>noise_0.009999999776482582_ln_0.08249999582767487</text:p>
          </table:table-cell>
          <table:table-cell office:value-type="string" calcext:value-type="string">
            <text:p>noise_0.009999999776482582_ln_0.08999999612569809</text:p>
          </table:table-cell>
          <table:table-cell office:value-type="string" calcext:value-type="string">
            <text:p>noise_0.009999999776482582_ln_0.09749999642372131</text:p>
          </table:table-cell>
          <table:table-cell office:value-type="string" calcext:value-type="string">
            <text:p>noise_0.017500000074505806_ln_0.0</text:p>
          </table:table-cell>
          <table:table-cell office:value-type="string" calcext:value-type="string">
            <text:p>noise_0.017500000074505806_ln_0.007499999832361937</text:p>
          </table:table-cell>
          <table:table-cell office:value-type="string" calcext:value-type="string">
            <text:p>noise_0.017500000074505806_ln_0.014999999664723873</text:p>
          </table:table-cell>
          <table:table-cell office:value-type="string" calcext:value-type="string">
            <text:p>noise_0.017500000074505806_ln_0.022499999031424522</text:p>
          </table:table-cell>
          <table:table-cell office:value-type="string" calcext:value-type="string">
            <text:p>noise_0.017500000074505806_ln_0.029999999329447746</text:p>
          </table:table-cell>
          <table:table-cell office:value-type="string" calcext:value-type="string">
            <text:p>noise_0.017500000074505806_ln_0.03749999776482582</text:p>
          </table:table-cell>
          <table:table-cell office:value-type="string" calcext:value-type="string">
            <text:p>noise_0.017500000074505806_ln_0.044999998062849045</text:p>
          </table:table-cell>
          <table:table-cell office:value-type="string" calcext:value-type="string">
            <text:p>noise_0.017500000074505806_ln_0.05249999836087227</text:p>
          </table:table-cell>
          <table:table-cell office:value-type="string" calcext:value-type="string">
            <text:p>noise_0.017500000074505806_ln_0.05999999865889549</text:p>
          </table:table-cell>
          <table:table-cell office:value-type="string" calcext:value-type="string">
            <text:p>noise_0.017500000074505806_ln_0.06749999523162842</text:p>
          </table:table-cell>
          <table:table-cell office:value-type="string" calcext:value-type="string">
            <text:p>noise_0.017500000074505806_ln_0.07499999552965164</text:p>
          </table:table-cell>
          <table:table-cell office:value-type="string" calcext:value-type="string">
            <text:p>noise_0.017500000074505806_ln_0.08249999582767487</text:p>
          </table:table-cell>
          <table:table-cell office:value-type="string" calcext:value-type="string">
            <text:p>noise_0.017500000074505806_ln_0.08999999612569809</text:p>
          </table:table-cell>
          <table:table-cell office:value-type="string" calcext:value-type="string">
            <text:p>noise_0.017500000074505806_ln_0.09749999642372131</text:p>
          </table:table-cell>
          <table:table-cell office:value-type="string" calcext:value-type="string">
            <text:p>noise_0.02500000037252903_ln_0.0</text:p>
          </table:table-cell>
          <table:table-cell office:value-type="string" calcext:value-type="string">
            <text:p>noise_0.02500000037252903_ln_0.007499999832361937</text:p>
          </table:table-cell>
          <table:table-cell office:value-type="string" calcext:value-type="string">
            <text:p>noise_0.02500000037252903_ln_0.014999999664723873</text:p>
          </table:table-cell>
          <table:table-cell office:value-type="string" calcext:value-type="string">
            <text:p>noise_0.02500000037252903_ln_0.022499999031424522</text:p>
          </table:table-cell>
          <table:table-cell office:value-type="string" calcext:value-type="string">
            <text:p>noise_0.02500000037252903_ln_0.029999999329447746</text:p>
          </table:table-cell>
          <table:table-cell office:value-type="string" calcext:value-type="string">
            <text:p>noise_0.02500000037252903_ln_0.03749999776482582</text:p>
          </table:table-cell>
          <table:table-cell office:value-type="string" calcext:value-type="string">
            <text:p>noise_0.02500000037252903_ln_0.044999998062849045</text:p>
          </table:table-cell>
          <table:table-cell office:value-type="string" calcext:value-type="string">
            <text:p>noise_0.02500000037252903_ln_0.05249999836087227</text:p>
          </table:table-cell>
          <table:table-cell office:value-type="string" calcext:value-type="string">
            <text:p>noise_0.02500000037252903_ln_0.05999999865889549</text:p>
          </table:table-cell>
          <table:table-cell office:value-type="string" calcext:value-type="string">
            <text:p>noise_0.02500000037252903_ln_0.06749999523162842</text:p>
          </table:table-cell>
          <table:table-cell office:value-type="string" calcext:value-type="string">
            <text:p>noise_0.02500000037252903_ln_0.07499999552965164</text:p>
          </table:table-cell>
          <table:table-cell office:value-type="string" calcext:value-type="string">
            <text:p>noise_0.02500000037252903_ln_0.08249999582767487</text:p>
          </table:table-cell>
          <table:table-cell office:value-type="string" calcext:value-type="string">
            <text:p>noise_0.02500000037252903_ln_0.08999999612569809</text:p>
          </table:table-cell>
          <table:table-cell office:value-type="string" calcext:value-type="string">
            <text:p>noise_0.02500000037252903_ln_0.09749999642372131</text:p>
          </table:table-cell>
          <table:table-cell office:value-type="string" calcext:value-type="string">
            <text:p>noise_0.032499998807907104_ln_0.0</text:p>
          </table:table-cell>
          <table:table-cell office:value-type="string" calcext:value-type="string">
            <text:p>noise_0.032499998807907104_ln_0.007499999832361937</text:p>
          </table:table-cell>
          <table:table-cell office:value-type="string" calcext:value-type="string">
            <text:p>noise_0.032499998807907104_ln_0.014999999664723873</text:p>
          </table:table-cell>
          <table:table-cell office:value-type="string" calcext:value-type="string">
            <text:p>noise_0.032499998807907104_ln_0.022499999031424522</text:p>
          </table:table-cell>
          <table:table-cell office:value-type="string" calcext:value-type="string">
            <text:p>noise_0.032499998807907104_ln_0.029999999329447746</text:p>
          </table:table-cell>
          <table:table-cell office:value-type="string" calcext:value-type="string">
            <text:p>noise_0.032499998807907104_ln_0.03749999776482582</text:p>
          </table:table-cell>
          <table:table-cell office:value-type="string" calcext:value-type="string">
            <text:p>noise_0.032499998807907104_ln_0.044999998062849045</text:p>
          </table:table-cell>
          <table:table-cell office:value-type="string" calcext:value-type="string">
            <text:p>noise_0.032499998807907104_ln_0.05249999836087227</text:p>
          </table:table-cell>
          <table:table-cell office:value-type="string" calcext:value-type="string">
            <text:p>noise_0.032499998807907104_ln_0.05999999865889549</text:p>
          </table:table-cell>
          <table:table-cell office:value-type="string" calcext:value-type="string">
            <text:p>noise_0.032499998807907104_ln_0.06749999523162842</text:p>
          </table:table-cell>
          <table:table-cell office:value-type="string" calcext:value-type="string">
            <text:p>noise_0.032499998807907104_ln_0.07499999552965164</text:p>
          </table:table-cell>
          <table:table-cell office:value-type="string" calcext:value-type="string">
            <text:p>noise_0.032499998807907104_ln_0.08249999582767487</text:p>
          </table:table-cell>
          <table:table-cell office:value-type="string" calcext:value-type="string">
            <text:p>noise_0.032499998807907104_ln_0.08999999612569809</text:p>
          </table:table-cell>
          <table:table-cell office:value-type="string" calcext:value-type="string">
            <text:p>noise_0.032499998807907104_ln_0.09749999642372131</text:p>
          </table:table-cell>
          <table:table-cell office:value-type="string" calcext:value-type="string">
            <text:p>noise_0.03999999910593033_ln_0.0</text:p>
          </table:table-cell>
          <table:table-cell office:value-type="string" calcext:value-type="string">
            <text:p>noise_0.03999999910593033_ln_0.007499999832361937</text:p>
          </table:table-cell>
          <table:table-cell office:value-type="string" calcext:value-type="string">
            <text:p>noise_0.03999999910593033_ln_0.014999999664723873</text:p>
          </table:table-cell>
          <table:table-cell office:value-type="string" calcext:value-type="string">
            <text:p>noise_0.03999999910593033_ln_0.022499999031424522</text:p>
          </table:table-cell>
          <table:table-cell office:value-type="string" calcext:value-type="string">
            <text:p>noise_0.03999999910593033_ln_0.029999999329447746</text:p>
          </table:table-cell>
          <table:table-cell office:value-type="string" calcext:value-type="string">
            <text:p>noise_0.03999999910593033_ln_0.03749999776482582</text:p>
          </table:table-cell>
          <table:table-cell office:value-type="string" calcext:value-type="string">
            <text:p>noise_0.03999999910593033_ln_0.044999998062849045</text:p>
          </table:table-cell>
          <table:table-cell office:value-type="string" calcext:value-type="string">
            <text:p>noise_0.03999999910593033_ln_0.05249999836087227</text:p>
          </table:table-cell>
          <table:table-cell office:value-type="string" calcext:value-type="string">
            <text:p>noise_0.03999999910593033_ln_0.05999999865889549</text:p>
          </table:table-cell>
          <table:table-cell office:value-type="string" calcext:value-type="string">
            <text:p>noise_0.03999999910593033_ln_0.06749999523162842</text:p>
          </table:table-cell>
          <table:table-cell office:value-type="string" calcext:value-type="string">
            <text:p>noise_0.03999999910593033_ln_0.07499999552965164</text:p>
          </table:table-cell>
          <table:table-cell office:value-type="string" calcext:value-type="string">
            <text:p>noise_0.03999999910593033_ln_0.08249999582767487</text:p>
          </table:table-cell>
          <table:table-cell office:value-type="string" calcext:value-type="string">
            <text:p>noise_0.03999999910593033_ln_0.08999999612569809</text:p>
          </table:table-cell>
          <table:table-cell office:value-type="string" calcext:value-type="string">
            <text:p>noise_0.03999999910593033_ln_0.09749999642372131</text:p>
          </table:table-cell>
          <table:table-cell office:value-type="string" calcext:value-type="string">
            <text:p>noise_0.04749999940395355_ln_0.0</text:p>
          </table:table-cell>
          <table:table-cell office:value-type="string" calcext:value-type="string">
            <text:p>noise_0.04749999940395355_ln_0.007499999832361937</text:p>
          </table:table-cell>
          <table:table-cell office:value-type="string" calcext:value-type="string">
            <text:p>noise_0.04749999940395355_ln_0.014999999664723873</text:p>
          </table:table-cell>
          <table:table-cell office:value-type="string" calcext:value-type="string">
            <text:p>noise_0.04749999940395355_ln_0.022499999031424522</text:p>
          </table:table-cell>
          <table:table-cell office:value-type="string" calcext:value-type="string">
            <text:p>noise_0.04749999940395355_ln_0.029999999329447746</text:p>
          </table:table-cell>
          <table:table-cell office:value-type="string" calcext:value-type="string">
            <text:p>noise_0.04749999940395355_ln_0.03749999776482582</text:p>
          </table:table-cell>
          <table:table-cell office:value-type="string" calcext:value-type="string">
            <text:p>noise_0.04749999940395355_ln_0.044999998062849045</text:p>
          </table:table-cell>
          <table:table-cell office:value-type="string" calcext:value-type="string">
            <text:p>noise_0.04749999940395355_ln_0.05249999836087227</text:p>
          </table:table-cell>
          <table:table-cell office:value-type="string" calcext:value-type="string">
            <text:p>noise_0.04749999940395355_ln_0.05999999865889549</text:p>
          </table:table-cell>
          <table:table-cell office:value-type="string" calcext:value-type="string">
            <text:p>noise_0.04749999940395355_ln_0.06749999523162842</text:p>
          </table:table-cell>
          <table:table-cell office:value-type="string" calcext:value-type="string">
            <text:p>noise_0.04749999940395355_ln_0.07499999552965164</text:p>
          </table:table-cell>
          <table:table-cell office:value-type="string" calcext:value-type="string">
            <text:p>noise_0.04749999940395355_ln_0.08249999582767487</text:p>
          </table:table-cell>
          <table:table-cell office:value-type="string" calcext:value-type="string">
            <text:p>noise_0.04749999940395355_ln_0.08999999612569809</text:p>
          </table:table-cell>
          <table:table-cell office:value-type="string" calcext:value-type="string">
            <text:p>noise_0.04749999940395355_ln_0.09749999642372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737733" calcext:value-type="float">
            <text:p>3,737733</text:p>
          </table:table-cell>
          <table:table-cell office:value-type="float" office:value="3.6917698" calcext:value-type="float">
            <text:p>3,6917698</text:p>
          </table:table-cell>
          <table:table-cell office:value-type="float" office:value="3.667106" calcext:value-type="float">
            <text:p>3,667106</text:p>
          </table:table-cell>
          <table:table-cell office:value-type="float" office:value="3.6669576" calcext:value-type="float">
            <text:p>3,6669576</text:p>
          </table:table-cell>
          <table:table-cell office:value-type="float" office:value="3.67493" calcext:value-type="float">
            <text:p>3,67493</text:p>
          </table:table-cell>
          <table:table-cell office:value-type="float" office:value="3.703432" calcext:value-type="float">
            <text:p>3,703432</text:p>
          </table:table-cell>
          <table:table-cell office:value-type="float" office:value="3.7389457" calcext:value-type="float">
            <text:p>3,7389457</text:p>
          </table:table-cell>
          <table:table-cell office:value-type="float" office:value="3.780009" calcext:value-type="float">
            <text:p>3,780009</text:p>
          </table:table-cell>
          <table:table-cell office:value-type="float" office:value="3.815562" calcext:value-type="float">
            <text:p>3,815562</text:p>
          </table:table-cell>
          <table:table-cell office:value-type="float" office:value="3.8558137" calcext:value-type="float">
            <text:p>3,8558137</text:p>
          </table:table-cell>
          <table:table-cell office:value-type="float" office:value="3.8877268" calcext:value-type="float">
            <text:p>3,8877268</text:p>
          </table:table-cell>
          <table:table-cell office:value-type="float" office:value="3.9178846" calcext:value-type="float">
            <text:p>3,9178846</text:p>
          </table:table-cell>
          <table:table-cell office:value-type="float" office:value="3.941391" calcext:value-type="float">
            <text:p>3,941391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7378974" calcext:value-type="float">
            <text:p>3,7378974</text:p>
          </table:table-cell>
          <table:table-cell office:value-type="float" office:value="3.6904368" calcext:value-type="float">
            <text:p>3,6904368</text:p>
          </table:table-cell>
          <table:table-cell office:value-type="float" office:value="3.6678774" calcext:value-type="float">
            <text:p>3,6678774</text:p>
          </table:table-cell>
          <table:table-cell office:value-type="float" office:value="3.6669939" calcext:value-type="float">
            <text:p>3,6669939</text:p>
          </table:table-cell>
          <table:table-cell office:value-type="float" office:value="3.67933" calcext:value-type="float">
            <text:p>3,67933</text:p>
          </table:table-cell>
          <table:table-cell office:value-type="float" office:value="3.703746" calcext:value-type="float">
            <text:p>3,703746</text:p>
          </table:table-cell>
          <table:table-cell office:value-type="float" office:value="3.740914" calcext:value-type="float">
            <text:p>3,740914</text:p>
          </table:table-cell>
          <table:table-cell office:value-type="float" office:value="3.7837174" calcext:value-type="float">
            <text:p>3,7837174</text:p>
          </table:table-cell>
          <table:table-cell office:value-type="float" office:value="3.8079402" calcext:value-type="float">
            <text:p>3,8079402</text:p>
          </table:table-cell>
          <table:table-cell office:value-type="float" office:value="3.8560164" calcext:value-type="float">
            <text:p>3,8560164</text:p>
          </table:table-cell>
          <table:table-cell office:value-type="float" office:value="3.8795512" calcext:value-type="float">
            <text:p>3,8795512</text:p>
          </table:table-cell>
          <table:table-cell office:value-type="float" office:value="3.9141667" calcext:value-type="float">
            <text:p>3,9141667</text:p>
          </table:table-cell>
          <table:table-cell office:value-type="float" office:value="3.9532254" calcext:value-type="float">
            <text:p>3,9532254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7377334" calcext:value-type="float">
            <text:p>3,7377334</text:p>
          </table:table-cell>
          <table:table-cell office:value-type="float" office:value="3.6907747" calcext:value-type="float">
            <text:p>3,6907747</text:p>
          </table:table-cell>
          <table:table-cell office:value-type="float" office:value="3.6673443" calcext:value-type="float">
            <text:p>3,6673443</text:p>
          </table:table-cell>
          <table:table-cell office:value-type="float" office:value="3.6652498" calcext:value-type="float">
            <text:p>3,6652498</text:p>
          </table:table-cell>
          <table:table-cell office:value-type="float" office:value="3.6748238" calcext:value-type="float">
            <text:p>3,6748238</text:p>
          </table:table-cell>
          <table:table-cell office:value-type="float" office:value="3.7072968" calcext:value-type="float">
            <text:p>3,7072968</text:p>
          </table:table-cell>
          <table:table-cell office:value-type="float" office:value="3.738107" calcext:value-type="float">
            <text:p>3,738107</text:p>
          </table:table-cell>
          <table:table-cell office:value-type="float" office:value="3.7784348" calcext:value-type="float">
            <text:p>3,7784348</text:p>
          </table:table-cell>
          <table:table-cell office:value-type="float" office:value="3.8126476" calcext:value-type="float">
            <text:p>3,8126476</text:p>
          </table:table-cell>
          <table:table-cell office:value-type="float" office:value="3.8601015" calcext:value-type="float">
            <text:p>3,8601015</text:p>
          </table:table-cell>
          <table:table-cell office:value-type="float" office:value="3.8757203" calcext:value-type="float">
            <text:p>3,8757203</text:p>
          </table:table-cell>
          <table:table-cell office:value-type="float" office:value="3.9182913" calcext:value-type="float">
            <text:p>3,9182913</text:p>
          </table:table-cell>
          <table:table-cell office:value-type="float" office:value="3.9468663" calcext:value-type="float">
            <text:p>3,9468663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7379198" calcext:value-type="float">
            <text:p>3,7379198</text:p>
          </table:table-cell>
          <table:table-cell office:value-type="float" office:value="3.691459" calcext:value-type="float">
            <text:p>3,691459</text:p>
          </table:table-cell>
          <table:table-cell office:value-type="float" office:value="3.6664953" calcext:value-type="float">
            <text:p>3,6664953</text:p>
          </table:table-cell>
          <table:table-cell office:value-type="float" office:value="3.6700196" calcext:value-type="float">
            <text:p>3,6700196</text:p>
          </table:table-cell>
          <table:table-cell office:value-type="float" office:value="3.674509" calcext:value-type="float">
            <text:p>3,674509</text:p>
          </table:table-cell>
          <table:table-cell office:value-type="float" office:value="3.7033334" calcext:value-type="float">
            <text:p>3,7033334</text:p>
          </table:table-cell>
          <table:table-cell office:value-type="float" office:value="3.7369661" calcext:value-type="float">
            <text:p>3,7369661</text:p>
          </table:table-cell>
          <table:table-cell office:value-type="float" office:value="3.7768571" calcext:value-type="float">
            <text:p>3,7768571</text:p>
          </table:table-cell>
          <table:table-cell office:value-type="float" office:value="3.8147266" calcext:value-type="float">
            <text:p>3,8147266</text:p>
          </table:table-cell>
          <table:table-cell office:value-type="float" office:value="3.8540819" calcext:value-type="float">
            <text:p>3,8540819</text:p>
          </table:table-cell>
          <table:table-cell office:value-type="float" office:value="3.9052813" calcext:value-type="float">
            <text:p>3,9052813</text:p>
          </table:table-cell>
          <table:table-cell office:value-type="float" office:value="3.9087245" calcext:value-type="float">
            <text:p>3,9087245</text:p>
          </table:table-cell>
          <table:table-cell office:value-type="float" office:value="3.932562" calcext:value-type="float">
            <text:p>3,932562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7380645" calcext:value-type="float">
            <text:p>3,7380645</text:p>
          </table:table-cell>
          <table:table-cell office:value-type="float" office:value="3.6912513" calcext:value-type="float">
            <text:p>3,6912513</text:p>
          </table:table-cell>
          <table:table-cell office:value-type="float" office:value="3.6669598" calcext:value-type="float">
            <text:p>3,6669598</text:p>
          </table:table-cell>
          <table:table-cell office:value-type="float" office:value="3.6680267" calcext:value-type="float">
            <text:p>3,6680267</text:p>
          </table:table-cell>
          <table:table-cell office:value-type="float" office:value="3.6714761" calcext:value-type="float">
            <text:p>3,6714761</text:p>
          </table:table-cell>
          <table:table-cell office:value-type="float" office:value="3.6961126" calcext:value-type="float">
            <text:p>3,6961126</text:p>
          </table:table-cell>
          <table:table-cell office:value-type="float" office:value="3.7418287" calcext:value-type="float">
            <text:p>3,7418287</text:p>
          </table:table-cell>
          <table:table-cell office:value-type="float" office:value="3.774884" calcext:value-type="float">
            <text:p>3,774884</text:p>
          </table:table-cell>
          <table:table-cell office:value-type="float" office:value="3.8128653" calcext:value-type="float">
            <text:p>3,8128653</text:p>
          </table:table-cell>
          <table:table-cell office:value-type="float" office:value="3.8502333" calcext:value-type="float">
            <text:p>3,8502333</text:p>
          </table:table-cell>
          <table:table-cell office:value-type="float" office:value="3.8840275" calcext:value-type="float">
            <text:p>3,8840275</text:p>
          </table:table-cell>
          <table:table-cell office:value-type="float" office:value="3.9001932" calcext:value-type="float">
            <text:p>3,9001932</text:p>
          </table:table-cell>
          <table:table-cell office:value-type="float" office:value="3.936186" calcext:value-type="float">
            <text:p>3,936186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738014" calcext:value-type="float">
            <text:p>3,738014</text:p>
          </table:table-cell>
          <table:table-cell office:value-type="float" office:value="3.6887887" calcext:value-type="float">
            <text:p>3,6887887</text:p>
          </table:table-cell>
          <table:table-cell office:value-type="float" office:value="3.6649191" calcext:value-type="float">
            <text:p>3,6649191</text:p>
          </table:table-cell>
          <table:table-cell office:value-type="float" office:value="3.6660993" calcext:value-type="float">
            <text:p>3,6660993</text:p>
          </table:table-cell>
          <table:table-cell office:value-type="float" office:value="3.684212" calcext:value-type="float">
            <text:p>3,684212</text:p>
          </table:table-cell>
          <table:table-cell office:value-type="float" office:value="3.701272" calcext:value-type="float">
            <text:p>3,701272</text:p>
          </table:table-cell>
          <table:table-cell office:value-type="float" office:value="3.7467084" calcext:value-type="float">
            <text:p>3,7467084</text:p>
          </table:table-cell>
          <table:table-cell office:value-type="float" office:value="3.7829013" calcext:value-type="float">
            <text:p>3,7829013</text:p>
          </table:table-cell>
          <table:table-cell office:value-type="float" office:value="3.8169248" calcext:value-type="float">
            <text:p>3,8169248</text:p>
          </table:table-cell>
          <table:table-cell office:value-type="float" office:value="3.84784" calcext:value-type="float">
            <text:p>3,84784</text:p>
          </table:table-cell>
          <table:table-cell office:value-type="float" office:value="3.8941715" calcext:value-type="float">
            <text:p>3,8941715</text:p>
          </table:table-cell>
          <table:table-cell office:value-type="float" office:value="3.9122336" calcext:value-type="float">
            <text:p>3,9122336</text:p>
          </table:table-cell>
          <table:table-cell office:value-type="float" office:value="3.9540424" calcext:value-type="float">
            <text:p>3,95404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6569183" calcext:value-type="float">
            <text:p>3,6569183</text:p>
          </table:table-cell>
          <table:table-cell office:value-type="float" office:value="3.6566548" calcext:value-type="float">
            <text:p>3,6566548</text:p>
          </table:table-cell>
          <table:table-cell office:value-type="float" office:value="3.816775" calcext:value-type="float">
            <text:p>3,816775</text:p>
          </table:table-cell>
          <table:table-cell office:value-type="float" office:value="3.7732017" calcext:value-type="float">
            <text:p>3,7732017</text:p>
          </table:table-cell>
          <table:table-cell office:value-type="float" office:value="3.7515645" calcext:value-type="float">
            <text:p>3,7515645</text:p>
          </table:table-cell>
          <table:table-cell office:value-type="float" office:value="3.8028133" calcext:value-type="float">
            <text:p>3,8028133</text:p>
          </table:table-cell>
          <table:table-cell office:value-type="float" office:value="3.8972366" calcext:value-type="float">
            <text:p>3,8972366</text:p>
          </table:table-cell>
          <table:table-cell office:value-type="float" office:value="3.9733114" calcext:value-type="float">
            <text:p>3,9733114</text:p>
          </table:table-cell>
          <table:table-cell office:value-type="float" office:value="4.0820665" calcext:value-type="float">
            <text:p>4,0820665</text:p>
          </table:table-cell>
          <table:table-cell office:value-type="float" office:value="4.1802855" calcext:value-type="float">
            <text:p>4,1802855</text:p>
          </table:table-cell>
          <table:table-cell office:value-type="float" office:value="4.2989373" calcext:value-type="float">
            <text:p>4,2989373</text:p>
          </table:table-cell>
          <table:table-cell office:value-type="float" office:value="4.346622" calcext:value-type="float">
            <text:p>4,346622</text:p>
          </table:table-cell>
          <table:table-cell office:value-type="float" office:value="4.4517474" calcext:value-type="float">
            <text:p>4,4517474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6576488" calcext:value-type="float">
            <text:p>3,6576488</text:p>
          </table:table-cell>
          <table:table-cell office:value-type="float" office:value="3.65102" calcext:value-type="float">
            <text:p>3,65102</text:p>
          </table:table-cell>
          <table:table-cell office:value-type="float" office:value="3.811651" calcext:value-type="float">
            <text:p>3,811651</text:p>
          </table:table-cell>
          <table:table-cell office:value-type="float" office:value="3.7587194" calcext:value-type="float">
            <text:p>3,7587194</text:p>
          </table:table-cell>
          <table:table-cell office:value-type="float" office:value="3.7591376" calcext:value-type="float">
            <text:p>3,7591376</text:p>
          </table:table-cell>
          <table:table-cell office:value-type="float" office:value="3.8030233" calcext:value-type="float">
            <text:p>3,8030233</text:p>
          </table:table-cell>
          <table:table-cell office:value-type="float" office:value="3.8900332" calcext:value-type="float">
            <text:p>3,8900332</text:p>
          </table:table-cell>
          <table:table-cell office:value-type="float" office:value="3.9772642" calcext:value-type="float">
            <text:p>3,9772642</text:p>
          </table:table-cell>
          <table:table-cell office:value-type="float" office:value="4.0621924" calcext:value-type="float">
            <text:p>4,0621924</text:p>
          </table:table-cell>
          <table:table-cell office:value-type="float" office:value="4.2085495" calcext:value-type="float">
            <text:p>4,2085495</text:p>
          </table:table-cell>
          <table:table-cell office:value-type="float" office:value="4.2995315" calcext:value-type="float">
            <text:p>4,2995315</text:p>
          </table:table-cell>
          <table:table-cell office:value-type="float" office:value="4.3879757" calcext:value-type="float">
            <text:p>4,3879757</text:p>
          </table:table-cell>
          <table:table-cell office:value-type="float" office:value="4.511319" calcext:value-type="float">
            <text:p>4,511319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6576955" calcext:value-type="float">
            <text:p>3,6576955</text:p>
          </table:table-cell>
          <table:table-cell office:value-type="float" office:value="3.6501548" calcext:value-type="float">
            <text:p>3,6501548</text:p>
          </table:table-cell>
          <table:table-cell office:value-type="float" office:value="3.8124452" calcext:value-type="float">
            <text:p>3,8124452</text:p>
          </table:table-cell>
          <table:table-cell office:value-type="float" office:value="3.7710323" calcext:value-type="float">
            <text:p>3,7710323</text:p>
          </table:table-cell>
          <table:table-cell office:value-type="float" office:value="3.7524536" calcext:value-type="float">
            <text:p>3,7524536</text:p>
          </table:table-cell>
          <table:table-cell office:value-type="float" office:value="3.8062077" calcext:value-type="float">
            <text:p>3,8062077</text:p>
          </table:table-cell>
          <table:table-cell office:value-type="float" office:value="3.8878827" calcext:value-type="float">
            <text:p>3,8878827</text:p>
          </table:table-cell>
          <table:table-cell office:value-type="float" office:value="3.9921982" calcext:value-type="float">
            <text:p>3,9921982</text:p>
          </table:table-cell>
          <table:table-cell office:value-type="float" office:value="4.057608" calcext:value-type="float">
            <text:p>4,057608</text:p>
          </table:table-cell>
          <table:table-cell office:value-type="float" office:value="4.209515" calcext:value-type="float">
            <text:p>4,209515</text:p>
          </table:table-cell>
          <table:table-cell office:value-type="float" office:value="4.3114614" calcext:value-type="float">
            <text:p>4,3114614</text:p>
          </table:table-cell>
          <table:table-cell office:value-type="float" office:value="4.3582835" calcext:value-type="float">
            <text:p>4,3582835</text:p>
          </table:table-cell>
          <table:table-cell office:value-type="float" office:value="4.440671" calcext:value-type="float">
            <text:p>4,440671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6566224" calcext:value-type="float">
            <text:p>3,6566224</text:p>
          </table:table-cell>
          <table:table-cell office:value-type="float" office:value="3.6493874" calcext:value-type="float">
            <text:p>3,6493874</text:p>
          </table:table-cell>
          <table:table-cell office:value-type="float" office:value="3.8120873" calcext:value-type="float">
            <text:p>3,8120873</text:p>
          </table:table-cell>
          <table:table-cell office:value-type="float" office:value="3.7692654" calcext:value-type="float">
            <text:p>3,7692654</text:p>
          </table:table-cell>
          <table:table-cell office:value-type="float" office:value="3.7609787" calcext:value-type="float">
            <text:p>3,7609787</text:p>
          </table:table-cell>
          <table:table-cell office:value-type="float" office:value="3.8105373" calcext:value-type="float">
            <text:p>3,8105373</text:p>
          </table:table-cell>
          <table:table-cell office:value-type="float" office:value="3.890553" calcext:value-type="float">
            <text:p>3,890553</text:p>
          </table:table-cell>
          <table:table-cell office:value-type="float" office:value="3.9856012" calcext:value-type="float">
            <text:p>3,9856012</text:p>
          </table:table-cell>
          <table:table-cell office:value-type="float" office:value="4.070407" calcext:value-type="float">
            <text:p>4,070407</text:p>
          </table:table-cell>
          <table:table-cell office:value-type="float" office:value="4.180522" calcext:value-type="float">
            <text:p>4,180522</text:p>
          </table:table-cell>
          <table:table-cell office:value-type="float" office:value="4.365314" calcext:value-type="float">
            <text:p>4,365314</text:p>
          </table:table-cell>
          <table:table-cell office:value-type="float" office:value="4.377252" calcext:value-type="float">
            <text:p>4,377252</text:p>
          </table:table-cell>
          <table:table-cell office:value-type="float" office:value="4.4789453" calcext:value-type="float">
            <text:p>4,4789453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6574945" calcext:value-type="float">
            <text:p>3,6574945</text:p>
          </table:table-cell>
          <table:table-cell office:value-type="float" office:value="3.6481886" calcext:value-type="float">
            <text:p>3,6481886</text:p>
          </table:table-cell>
          <table:table-cell office:value-type="float" office:value="3.8087277" calcext:value-type="float">
            <text:p>3,8087277</text:p>
          </table:table-cell>
          <table:table-cell office:value-type="float" office:value="3.7637253" calcext:value-type="float">
            <text:p>3,7637253</text:p>
          </table:table-cell>
          <table:table-cell office:value-type="float" office:value="3.7690532" calcext:value-type="float">
            <text:p>3,7690532</text:p>
          </table:table-cell>
          <table:table-cell office:value-type="float" office:value="3.8106596" calcext:value-type="float">
            <text:p>3,8106596</text:p>
          </table:table-cell>
          <table:table-cell office:value-type="float" office:value="3.8840532" calcext:value-type="float">
            <text:p>3,8840532</text:p>
          </table:table-cell>
          <table:table-cell office:value-type="float" office:value="3.9770086" calcext:value-type="float">
            <text:p>3,9770086</text:p>
          </table:table-cell>
          <table:table-cell office:value-type="float" office:value="4.114605" calcext:value-type="float">
            <text:p>4,114605</text:p>
          </table:table-cell>
          <table:table-cell office:value-type="float" office:value="4.218366" calcext:value-type="float">
            <text:p>4,218366</text:p>
          </table:table-cell>
          <table:table-cell office:value-type="float" office:value="4.301604" calcext:value-type="float">
            <text:p>4,301604</text:p>
          </table:table-cell>
          <table:table-cell office:value-type="float" office:value="4.3761373" calcext:value-type="float">
            <text:p>4,3761373</text:p>
          </table:table-cell>
          <table:table-cell office:value-type="float" office:value="4.384974" calcext:value-type="float">
            <text:p>4,384974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6570327" calcext:value-type="float">
            <text:p>3,6570327</text:p>
          </table:table-cell>
          <table:table-cell office:value-type="float" office:value="3.648491" calcext:value-type="float">
            <text:p>3,648491</text:p>
          </table:table-cell>
          <table:table-cell office:value-type="float" office:value="3.809041" calcext:value-type="float">
            <text:p>3,809041</text:p>
          </table:table-cell>
          <table:table-cell office:value-type="float" office:value="3.770489" calcext:value-type="float">
            <text:p>3,770489</text:p>
          </table:table-cell>
          <table:table-cell office:value-type="float" office:value="3.7610252" calcext:value-type="float">
            <text:p>3,7610252</text:p>
          </table:table-cell>
          <table:table-cell office:value-type="float" office:value="3.7979815" calcext:value-type="float">
            <text:p>3,7979815</text:p>
          </table:table-cell>
          <table:table-cell office:value-type="float" office:value="3.9077866" calcext:value-type="float">
            <text:p>3,9077866</text:p>
          </table:table-cell>
          <table:table-cell office:value-type="float" office:value="3.993228" calcext:value-type="float">
            <text:p>3,993228</text:p>
          </table:table-cell>
          <table:table-cell office:value-type="float" office:value="4.1014085" calcext:value-type="float">
            <text:p>4,1014085</text:p>
          </table:table-cell>
          <table:table-cell office:value-type="float" office:value="4.225486" calcext:value-type="float">
            <text:p>4,225486</text:p>
          </table:table-cell>
          <table:table-cell office:value-type="float" office:value="4.3409266" calcext:value-type="float">
            <text:p>4,3409266</text:p>
          </table:table-cell>
          <table:table-cell office:value-type="float" office:value="4.466553" calcext:value-type="float">
            <text:p>4,466553</text:p>
          </table:table-cell>
          <table:table-cell office:value-type="float" office:value="4.482005" calcext:value-type="float">
            <text:p>4,4820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6146908" calcext:value-type="float">
            <text:p>3,6146908</text:p>
          </table:table-cell>
          <table:table-cell office:value-type="float" office:value="3.6474023" calcext:value-type="float">
            <text:p>3,6474023</text:p>
          </table:table-cell>
          <table:table-cell office:value-type="float" office:value="3.5954695" calcext:value-type="float">
            <text:p>3,5954695</text:p>
          </table:table-cell>
          <table:table-cell office:value-type="float" office:value="3.5645173" calcext:value-type="float">
            <text:p>3,5645173</text:p>
          </table:table-cell>
          <table:table-cell office:value-type="float" office:value="3.6168456" calcext:value-type="float">
            <text:p>3,6168456</text:p>
          </table:table-cell>
          <table:table-cell office:value-type="float" office:value="3.7164783" calcext:value-type="float">
            <text:p>3,7164783</text:p>
          </table:table-cell>
          <table:table-cell office:value-type="float" office:value="3.8668308" calcext:value-type="float">
            <text:p>3,8668308</text:p>
          </table:table-cell>
          <table:table-cell office:value-type="float" office:value="4.0445576" calcext:value-type="float">
            <text:p>4,0445576</text:p>
          </table:table-cell>
          <table:table-cell office:value-type="float" office:value="4.1380577" calcext:value-type="float">
            <text:p>4,1380577</text:p>
          </table:table-cell>
          <table:table-cell office:value-type="float" office:value="3.9659424" calcext:value-type="float">
            <text:p>3,9659424</text:p>
          </table:table-cell>
          <table:table-cell office:value-type="float" office:value="3.9749656" calcext:value-type="float">
            <text:p>3,9749656</text:p>
          </table:table-cell>
          <table:table-cell office:value-type="float" office:value="4.311093" calcext:value-type="float">
            <text:p>4,311093</text:p>
          </table:table-cell>
          <table:table-cell office:value-type="float" office:value="4.791395" calcext:value-type="float">
            <text:p>4,791395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614853" calcext:value-type="float">
            <text:p>3,614853</text:p>
          </table:table-cell>
          <table:table-cell office:value-type="float" office:value="3.6471834" calcext:value-type="float">
            <text:p>3,6471834</text:p>
          </table:table-cell>
          <table:table-cell office:value-type="float" office:value="3.590708" calcext:value-type="float">
            <text:p>3,590708</text:p>
          </table:table-cell>
          <table:table-cell office:value-type="float" office:value="3.5645916" calcext:value-type="float">
            <text:p>3,5645916</text:p>
          </table:table-cell>
          <table:table-cell office:value-type="float" office:value="3.6062434" calcext:value-type="float">
            <text:p>3,6062434</text:p>
          </table:table-cell>
          <table:table-cell office:value-type="float" office:value="3.7189665" calcext:value-type="float">
            <text:p>3,7189665</text:p>
          </table:table-cell>
          <table:table-cell office:value-type="float" office:value="3.8150184" calcext:value-type="float">
            <text:p>3,8150184</text:p>
          </table:table-cell>
          <table:table-cell office:value-type="float" office:value="4.047516" calcext:value-type="float">
            <text:p>4,047516</text:p>
          </table:table-cell>
          <table:table-cell office:value-type="float" office:value="4.1700797" calcext:value-type="float">
            <text:p>4,1700797</text:p>
          </table:table-cell>
          <table:table-cell office:value-type="float" office:value="4.0411263" calcext:value-type="float">
            <text:p>4,0411263</text:p>
          </table:table-cell>
          <table:table-cell office:value-type="float" office:value="4.00312" calcext:value-type="float">
            <text:p>4,00312</text:p>
          </table:table-cell>
          <table:table-cell office:value-type="float" office:value="4.3125496" calcext:value-type="float">
            <text:p>4,3125496</text:p>
          </table:table-cell>
          <table:table-cell office:value-type="float" office:value="4.840187" calcext:value-type="float">
            <text:p>4,840187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615159" calcext:value-type="float">
            <text:p>3,615159</text:p>
          </table:table-cell>
          <table:table-cell office:value-type="float" office:value="3.6494663" calcext:value-type="float">
            <text:p>3,6494663</text:p>
          </table:table-cell>
          <table:table-cell office:value-type="float" office:value="3.5936787" calcext:value-type="float">
            <text:p>3,5936787</text:p>
          </table:table-cell>
          <table:table-cell office:value-type="float" office:value="3.5832884" calcext:value-type="float">
            <text:p>3,5832884</text:p>
          </table:table-cell>
          <table:table-cell office:value-type="float" office:value="3.612492" calcext:value-type="float">
            <text:p>3,612492</text:p>
          </table:table-cell>
          <table:table-cell office:value-type="float" office:value="3.711533" calcext:value-type="float">
            <text:p>3,711533</text:p>
          </table:table-cell>
          <table:table-cell office:value-type="float" office:value="3.8718843" calcext:value-type="float">
            <text:p>3,8718843</text:p>
          </table:table-cell>
          <table:table-cell office:value-type="float" office:value="4.0640235" calcext:value-type="float">
            <text:p>4,0640235</text:p>
          </table:table-cell>
          <table:table-cell office:value-type="float" office:value="4.037559" calcext:value-type="float">
            <text:p>4,037559</text:p>
          </table:table-cell>
          <table:table-cell office:value-type="float" office:value="4.018916" calcext:value-type="float">
            <text:p>4,018916</text:p>
          </table:table-cell>
          <table:table-cell office:value-type="float" office:value="4.057028" calcext:value-type="float">
            <text:p>4,057028</text:p>
          </table:table-cell>
          <table:table-cell office:value-type="float" office:value="4.398497" calcext:value-type="float">
            <text:p>4,398497</text:p>
          </table:table-cell>
          <table:table-cell office:value-type="float" office:value="4.699218" calcext:value-type="float">
            <text:p>4,699218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6132104" calcext:value-type="float">
            <text:p>3,6132104</text:p>
          </table:table-cell>
          <table:table-cell office:value-type="float" office:value="3.6471593" calcext:value-type="float">
            <text:p>3,6471593</text:p>
          </table:table-cell>
          <table:table-cell office:value-type="float" office:value="3.59219" calcext:value-type="float">
            <text:p>3,59219</text:p>
          </table:table-cell>
          <table:table-cell office:value-type="float" office:value="3.5751972" calcext:value-type="float">
            <text:p>3,5751972</text:p>
          </table:table-cell>
          <table:table-cell office:value-type="float" office:value="3.6032932" calcext:value-type="float">
            <text:p>3,6032932</text:p>
          </table:table-cell>
          <table:table-cell office:value-type="float" office:value="3.7061977" calcext:value-type="float">
            <text:p>3,7061977</text:p>
          </table:table-cell>
          <table:table-cell office:value-type="float" office:value="3.8527353" calcext:value-type="float">
            <text:p>3,8527353</text:p>
          </table:table-cell>
          <table:table-cell office:value-type="float" office:value="4.064181" calcext:value-type="float">
            <text:p>4,064181</text:p>
          </table:table-cell>
          <table:table-cell office:value-type="float" office:value="4.077503" calcext:value-type="float">
            <text:p>4,077503</text:p>
          </table:table-cell>
          <table:table-cell office:value-type="float" office:value="3.9909084" calcext:value-type="float">
            <text:p>3,9909084</text:p>
          </table:table-cell>
          <table:table-cell office:value-type="float" office:value="4.1053686" calcext:value-type="float">
            <text:p>4,1053686</text:p>
          </table:table-cell>
          <table:table-cell office:value-type="float" office:value="4.2334833" calcext:value-type="float">
            <text:p>4,2334833</text:p>
          </table:table-cell>
          <table:table-cell office:value-type="float" office:value="4.702349" calcext:value-type="float">
            <text:p>4,702349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61481" calcext:value-type="float">
            <text:p>3,61481</text:p>
          </table:table-cell>
          <table:table-cell office:value-type="float" office:value="3.6508582" calcext:value-type="float">
            <text:p>3,6508582</text:p>
          </table:table-cell>
          <table:table-cell office:value-type="float" office:value="3.5936522" calcext:value-type="float">
            <text:p>3,5936522</text:p>
          </table:table-cell>
          <table:table-cell office:value-type="float" office:value="3.569931" calcext:value-type="float">
            <text:p>3,569931</text:p>
          </table:table-cell>
          <table:table-cell office:value-type="float" office:value="3.6153276" calcext:value-type="float">
            <text:p>3,6153276</text:p>
          </table:table-cell>
          <table:table-cell office:value-type="float" office:value="3.7264152" calcext:value-type="float">
            <text:p>3,7264152</text:p>
          </table:table-cell>
          <table:table-cell office:value-type="float" office:value="3.8389282" calcext:value-type="float">
            <text:p>3,8389282</text:p>
          </table:table-cell>
          <table:table-cell office:value-type="float" office:value="4.015617" calcext:value-type="float">
            <text:p>4,015617</text:p>
          </table:table-cell>
          <table:table-cell office:value-type="float" office:value="4.146314" calcext:value-type="float">
            <text:p>4,146314</text:p>
          </table:table-cell>
          <table:table-cell office:value-type="float" office:value="4.0452867" calcext:value-type="float">
            <text:p>4,0452867</text:p>
          </table:table-cell>
          <table:table-cell office:value-type="float" office:value="3.9757178" calcext:value-type="float">
            <text:p>3,9757178</text:p>
          </table:table-cell>
          <table:table-cell office:value-type="float" office:value="4.1686406" calcext:value-type="float">
            <text:p>4,1686406</text:p>
          </table:table-cell>
          <table:table-cell office:value-type="float" office:value="4.576373" calcext:value-type="float">
            <text:p>4,576373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6145396" calcext:value-type="float">
            <text:p>3,6145396</text:p>
          </table:table-cell>
          <table:table-cell office:value-type="float" office:value="3.6400375" calcext:value-type="float">
            <text:p>3,6400375</text:p>
          </table:table-cell>
          <table:table-cell office:value-type="float" office:value="3.5860426" calcext:value-type="float">
            <text:p>3,5860426</text:p>
          </table:table-cell>
          <table:table-cell office:value-type="float" office:value="3.5792058" calcext:value-type="float">
            <text:p>3,5792058</text:p>
          </table:table-cell>
          <table:table-cell office:value-type="float" office:value="3.6078143" calcext:value-type="float">
            <text:p>3,6078143</text:p>
          </table:table-cell>
          <table:table-cell office:value-type="float" office:value="3.7098193" calcext:value-type="float">
            <text:p>3,7098193</text:p>
          </table:table-cell>
          <table:table-cell office:value-type="float" office:value="3.8200665" calcext:value-type="float">
            <text:p>3,8200665</text:p>
          </table:table-cell>
          <table:table-cell office:value-type="float" office:value="4.066224" calcext:value-type="float">
            <text:p>4,066224</text:p>
          </table:table-cell>
          <table:table-cell office:value-type="float" office:value="4.220988" calcext:value-type="float">
            <text:p>4,220988</text:p>
          </table:table-cell>
          <table:table-cell office:value-type="float" office:value="3.9968252" calcext:value-type="float">
            <text:p>3,9968252</text:p>
          </table:table-cell>
          <table:table-cell office:value-type="float" office:value="4.0016723" calcext:value-type="float">
            <text:p>4,0016723</text:p>
          </table:table-cell>
          <table:table-cell office:value-type="float" office:value="4.4560676" calcext:value-type="float">
            <text:p>4,4560676</text:p>
          </table:table-cell>
          <table:table-cell office:value-type="float" office:value="4.8602996" calcext:value-type="float">
            <text:p>4,86029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834928" calcext:value-type="float">
            <text:p>3,5834928</text:p>
          </table:table-cell>
          <table:table-cell office:value-type="float" office:value="3.5154088" calcext:value-type="float">
            <text:p>3,5154088</text:p>
          </table:table-cell>
          <table:table-cell office:value-type="float" office:value="3.6400137" calcext:value-type="float">
            <text:p>3,6400137</text:p>
          </table:table-cell>
          <table:table-cell office:value-type="float" office:value="3.6246889" calcext:value-type="float">
            <text:p>3,6246889</text:p>
          </table:table-cell>
          <table:table-cell office:value-type="float" office:value="3.6882582" calcext:value-type="float">
            <text:p>3,6882582</text:p>
          </table:table-cell>
          <table:table-cell office:value-type="float" office:value="3.8245165" calcext:value-type="float">
            <text:p>3,8245165</text:p>
          </table:table-cell>
          <table:table-cell office:value-type="float" office:value="3.9366136" calcext:value-type="float">
            <text:p>3,9366136</text:p>
          </table:table-cell>
          <table:table-cell office:value-type="float" office:value="3.9450476" calcext:value-type="float">
            <text:p>3,9450476</text:p>
          </table:table-cell>
          <table:table-cell office:value-type="float" office:value="3.9635253" calcext:value-type="float">
            <text:p>3,9635253</text:p>
          </table:table-cell>
          <table:table-cell office:value-type="float" office:value="4.093953" calcext:value-type="float">
            <text:p>4,093953</text:p>
          </table:table-cell>
          <table:table-cell office:value-type="float" office:value="4.4606276" calcext:value-type="float">
            <text:p>4,4606276</text:p>
          </table:table-cell>
          <table:table-cell office:value-type="float" office:value="4.236344" calcext:value-type="float">
            <text:p>4,236344</text:p>
          </table:table-cell>
          <table:table-cell office:value-type="float" office:value="4.481027" calcext:value-type="float">
            <text:p>4,481027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828633" calcext:value-type="float">
            <text:p>3,5828633</text:p>
          </table:table-cell>
          <table:table-cell office:value-type="float" office:value="3.5140948" calcext:value-type="float">
            <text:p>3,5140948</text:p>
          </table:table-cell>
          <table:table-cell office:value-type="float" office:value="3.6341305" calcext:value-type="float">
            <text:p>3,6341305</text:p>
          </table:table-cell>
          <table:table-cell office:value-type="float" office:value="3.5826297" calcext:value-type="float">
            <text:p>3,5826297</text:p>
          </table:table-cell>
          <table:table-cell office:value-type="float" office:value="3.6562884" calcext:value-type="float">
            <text:p>3,6562884</text:p>
          </table:table-cell>
          <table:table-cell office:value-type="float" office:value="3.813946" calcext:value-type="float">
            <text:p>3,813946</text:p>
          </table:table-cell>
          <table:table-cell office:value-type="float" office:value="3.95218" calcext:value-type="float">
            <text:p>3,95218</text:p>
          </table:table-cell>
          <table:table-cell office:value-type="float" office:value="3.9340167" calcext:value-type="float">
            <text:p>3,9340167</text:p>
          </table:table-cell>
          <table:table-cell office:value-type="float" office:value="3.9520595" calcext:value-type="float">
            <text:p>3,9520595</text:p>
          </table:table-cell>
          <table:table-cell office:value-type="float" office:value="3.969519" calcext:value-type="float">
            <text:p>3,969519</text:p>
          </table:table-cell>
          <table:table-cell office:value-type="float" office:value="4.4148917" calcext:value-type="float">
            <text:p>4,4148917</text:p>
          </table:table-cell>
          <table:table-cell office:value-type="float" office:value="4.1875587" calcext:value-type="float">
            <text:p>4,1875587</text:p>
          </table:table-cell>
          <table:table-cell office:value-type="float" office:value="4.5497036" calcext:value-type="float">
            <text:p>4,5497036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837235" calcext:value-type="float">
            <text:p>3,5837235</text:p>
          </table:table-cell>
          <table:table-cell office:value-type="float" office:value="3.5141885" calcext:value-type="float">
            <text:p>3,5141885</text:p>
          </table:table-cell>
          <table:table-cell office:value-type="float" office:value="3.6470482" calcext:value-type="float">
            <text:p>3,6470482</text:p>
          </table:table-cell>
          <table:table-cell office:value-type="float" office:value="3.6719027" calcext:value-type="float">
            <text:p>3,6719027</text:p>
          </table:table-cell>
          <table:table-cell office:value-type="float" office:value="3.668609" calcext:value-type="float">
            <text:p>3,668609</text:p>
          </table:table-cell>
          <table:table-cell office:value-type="float" office:value="3.8205924" calcext:value-type="float">
            <text:p>3,8205924</text:p>
          </table:table-cell>
          <table:table-cell office:value-type="float" office:value="3.91406" calcext:value-type="float">
            <text:p>3,91406</text:p>
          </table:table-cell>
          <table:table-cell office:value-type="float" office:value="3.9221582" calcext:value-type="float">
            <text:p>3,9221582</text:p>
          </table:table-cell>
          <table:table-cell office:value-type="float" office:value="3.8668497" calcext:value-type="float">
            <text:p>3,8668497</text:p>
          </table:table-cell>
          <table:table-cell office:value-type="float" office:value="3.9566412" calcext:value-type="float">
            <text:p>3,9566412</text:p>
          </table:table-cell>
          <table:table-cell office:value-type="float" office:value="4.6167083" calcext:value-type="float">
            <text:p>4,6167083</text:p>
          </table:table-cell>
          <table:table-cell office:value-type="float" office:value="4.2546144" calcext:value-type="float">
            <text:p>4,2546144</text:p>
          </table:table-cell>
          <table:table-cell office:value-type="float" office:value="4.4829826" calcext:value-type="float">
            <text:p>4,4829826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81889" calcext:value-type="float">
            <text:p>3,581889</text:p>
          </table:table-cell>
          <table:table-cell office:value-type="float" office:value="3.511994" calcext:value-type="float">
            <text:p>3,511994</text:p>
          </table:table-cell>
          <table:table-cell office:value-type="float" office:value="3.637057" calcext:value-type="float">
            <text:p>3,637057</text:p>
          </table:table-cell>
          <table:table-cell office:value-type="float" office:value="3.6374824" calcext:value-type="float">
            <text:p>3,6374824</text:p>
          </table:table-cell>
          <table:table-cell office:value-type="float" office:value="3.6870658" calcext:value-type="float">
            <text:p>3,6870658</text:p>
          </table:table-cell>
          <table:table-cell office:value-type="float" office:value="3.8165693" calcext:value-type="float">
            <text:p>3,8165693</text:p>
          </table:table-cell>
          <table:table-cell office:value-type="float" office:value="3.9302065" calcext:value-type="float">
            <text:p>3,9302065</text:p>
          </table:table-cell>
          <table:table-cell office:value-type="float" office:value="3.9109507" calcext:value-type="float">
            <text:p>3,9109507</text:p>
          </table:table-cell>
          <table:table-cell office:value-type="float" office:value="3.9321308" calcext:value-type="float">
            <text:p>3,9321308</text:p>
          </table:table-cell>
          <table:table-cell office:value-type="float" office:value="4.079877" calcext:value-type="float">
            <text:p>4,079877</text:p>
          </table:table-cell>
          <table:table-cell office:value-type="float" office:value="4.4710274" calcext:value-type="float">
            <text:p>4,4710274</text:p>
          </table:table-cell>
          <table:table-cell office:value-type="float" office:value="4.2403316" calcext:value-type="float">
            <text:p>4,2403316</text:p>
          </table:table-cell>
          <table:table-cell office:value-type="float" office:value="4.753625" calcext:value-type="float">
            <text:p>4,753625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82519" calcext:value-type="float">
            <text:p>3,582519</text:p>
          </table:table-cell>
          <table:table-cell office:value-type="float" office:value="3.5133927" calcext:value-type="float">
            <text:p>3,5133927</text:p>
          </table:table-cell>
          <table:table-cell office:value-type="float" office:value="3.6327236" calcext:value-type="float">
            <text:p>3,6327236</text:p>
          </table:table-cell>
          <table:table-cell office:value-type="float" office:value="3.6179278" calcext:value-type="float">
            <text:p>3,6179278</text:p>
          </table:table-cell>
          <table:table-cell office:value-type="float" office:value="3.6670575" calcext:value-type="float">
            <text:p>3,6670575</text:p>
          </table:table-cell>
          <table:table-cell office:value-type="float" office:value="3.7813005" calcext:value-type="float">
            <text:p>3,7813005</text:p>
          </table:table-cell>
          <table:table-cell office:value-type="float" office:value="3.934746" calcext:value-type="float">
            <text:p>3,934746</text:p>
          </table:table-cell>
          <table:table-cell office:value-type="float" office:value="3.9475834" calcext:value-type="float">
            <text:p>3,9475834</text:p>
          </table:table-cell>
          <table:table-cell office:value-type="float" office:value="3.9391513" calcext:value-type="float">
            <text:p>3,9391513</text:p>
          </table:table-cell>
          <table:table-cell office:value-type="float" office:value="3.923536" calcext:value-type="float">
            <text:p>3,923536</text:p>
          </table:table-cell>
          <table:table-cell office:value-type="float" office:value="4.508383" calcext:value-type="float">
            <text:p>4,508383</text:p>
          </table:table-cell>
          <table:table-cell office:value-type="float" office:value="4.2957306" calcext:value-type="float">
            <text:p>4,2957306</text:p>
          </table:table-cell>
          <table:table-cell office:value-type="float" office:value="4.8908315" calcext:value-type="float">
            <text:p>4,8908315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83612" calcext:value-type="float">
            <text:p>3,583612</text:p>
          </table:table-cell>
          <table:table-cell office:value-type="float" office:value="3.5104105" calcext:value-type="float">
            <text:p>3,5104105</text:p>
          </table:table-cell>
          <table:table-cell office:value-type="float" office:value="3.6393812" calcext:value-type="float">
            <text:p>3,6393812</text:p>
          </table:table-cell>
          <table:table-cell office:value-type="float" office:value="3.6502585" calcext:value-type="float">
            <text:p>3,6502585</text:p>
          </table:table-cell>
          <table:table-cell office:value-type="float" office:value="3.6685088" calcext:value-type="float">
            <text:p>3,6685088</text:p>
          </table:table-cell>
          <table:table-cell office:value-type="float" office:value="3.810708" calcext:value-type="float">
            <text:p>3,810708</text:p>
          </table:table-cell>
          <table:table-cell office:value-type="float" office:value="3.9395874" calcext:value-type="float">
            <text:p>3,9395874</text:p>
          </table:table-cell>
          <table:table-cell office:value-type="float" office:value="3.891049" calcext:value-type="float">
            <text:p>3,891049</text:p>
          </table:table-cell>
          <table:table-cell office:value-type="float" office:value="3.9995768" calcext:value-type="float">
            <text:p>3,9995768</text:p>
          </table:table-cell>
          <table:table-cell office:value-type="float" office:value="3.959475" calcext:value-type="float">
            <text:p>3,959475</text:p>
          </table:table-cell>
          <table:table-cell office:value-type="float" office:value="4.5011196" calcext:value-type="float">
            <text:p>4,5011196</text:p>
          </table:table-cell>
          <table:table-cell office:value-type="float" office:value="4.243851" calcext:value-type="float">
            <text:p>4,243851</text:p>
          </table:table-cell>
          <table:table-cell office:value-type="float" office:value="4.7817607" calcext:value-type="float">
            <text:p>4,78176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603797" calcext:value-type="float">
            <text:p>3,5603797</text:p>
          </table:table-cell>
          <table:table-cell office:value-type="float" office:value="3.4919446" calcext:value-type="float">
            <text:p>3,4919446</text:p>
          </table:table-cell>
          <table:table-cell office:value-type="float" office:value="3.5744693" calcext:value-type="float">
            <text:p>3,5744693</text:p>
          </table:table-cell>
          <table:table-cell office:value-type="float" office:value="3.7197514" calcext:value-type="float">
            <text:p>3,7197514</text:p>
          </table:table-cell>
          <table:table-cell office:value-type="float" office:value="3.6499252" calcext:value-type="float">
            <text:p>3,6499252</text:p>
          </table:table-cell>
          <table:table-cell office:value-type="float" office:value="3.7302089" calcext:value-type="float">
            <text:p>3,7302089</text:p>
          </table:table-cell>
          <table:table-cell office:value-type="float" office:value="3.8873827" calcext:value-type="float">
            <text:p>3,8873827</text:p>
          </table:table-cell>
          <table:table-cell office:value-type="float" office:value="3.9724636" calcext:value-type="float">
            <text:p>3,9724636</text:p>
          </table:table-cell>
          <table:table-cell office:value-type="float" office:value="4.036974" calcext:value-type="float">
            <text:p>4,036974</text:p>
          </table:table-cell>
          <table:table-cell office:value-type="float" office:value="4.224291" calcext:value-type="float">
            <text:p>4,224291</text:p>
          </table:table-cell>
          <table:table-cell office:value-type="float" office:value="4.3531075" calcext:value-type="float">
            <text:p>4,3531075</text:p>
          </table:table-cell>
          <table:table-cell office:value-type="float" office:value="4.898872" calcext:value-type="float">
            <text:p>4,898872</text:p>
          </table:table-cell>
          <table:table-cell office:value-type="float" office:value="4.8468122" calcext:value-type="float">
            <text:p>4,8468122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59767" calcext:value-type="float">
            <text:p>3,559767</text:p>
          </table:table-cell>
          <table:table-cell office:value-type="float" office:value="3.489882" calcext:value-type="float">
            <text:p>3,489882</text:p>
          </table:table-cell>
          <table:table-cell office:value-type="float" office:value="3.5734658" calcext:value-type="float">
            <text:p>3,5734658</text:p>
          </table:table-cell>
          <table:table-cell office:value-type="float" office:value="3.6725736" calcext:value-type="float">
            <text:p>3,6725736</text:p>
          </table:table-cell>
          <table:table-cell office:value-type="float" office:value="3.648998" calcext:value-type="float">
            <text:p>3,648998</text:p>
          </table:table-cell>
          <table:table-cell office:value-type="float" office:value="3.7522895" calcext:value-type="float">
            <text:p>3,7522895</text:p>
          </table:table-cell>
          <table:table-cell office:value-type="float" office:value="3.924355" calcext:value-type="float">
            <text:p>3,924355</text:p>
          </table:table-cell>
          <table:table-cell office:value-type="float" office:value="3.9762878" calcext:value-type="float">
            <text:p>3,9762878</text:p>
          </table:table-cell>
          <table:table-cell office:value-type="float" office:value="4.0292287" calcext:value-type="float">
            <text:p>4,0292287</text:p>
          </table:table-cell>
          <table:table-cell office:value-type="float" office:value="4.4830093" calcext:value-type="float">
            <text:p>4,4830093</text:p>
          </table:table-cell>
          <table:table-cell office:value-type="float" office:value="4.4461417" calcext:value-type="float">
            <text:p>4,4461417</text:p>
          </table:table-cell>
          <table:table-cell office:value-type="float" office:value="4.7990265" calcext:value-type="float">
            <text:p>4,7990265</text:p>
          </table:table-cell>
          <table:table-cell office:value-type="float" office:value="5.196081" calcext:value-type="float">
            <text:p>5,196081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593252" calcext:value-type="float">
            <text:p>3,5593252</text:p>
          </table:table-cell>
          <table:table-cell office:value-type="float" office:value="3.4887486" calcext:value-type="float">
            <text:p>3,4887486</text:p>
          </table:table-cell>
          <table:table-cell office:value-type="float" office:value="3.5697188" calcext:value-type="float">
            <text:p>3,5697188</text:p>
          </table:table-cell>
          <table:table-cell office:value-type="float" office:value="3.6708305" calcext:value-type="float">
            <text:p>3,6708305</text:p>
          </table:table-cell>
          <table:table-cell office:value-type="float" office:value="3.647973" calcext:value-type="float">
            <text:p>3,647973</text:p>
          </table:table-cell>
          <table:table-cell office:value-type="float" office:value="3.7814076" calcext:value-type="float">
            <text:p>3,7814076</text:p>
          </table:table-cell>
          <table:table-cell office:value-type="float" office:value="3.908213" calcext:value-type="float">
            <text:p>3,908213</text:p>
          </table:table-cell>
          <table:table-cell office:value-type="float" office:value="3.9261622" calcext:value-type="float">
            <text:p>3,9261622</text:p>
          </table:table-cell>
          <table:table-cell office:value-type="float" office:value="4.043914" calcext:value-type="float">
            <text:p>4,043914</text:p>
          </table:table-cell>
          <table:table-cell office:value-type="float" office:value="4.4180627" calcext:value-type="float">
            <text:p>4,4180627</text:p>
          </table:table-cell>
          <table:table-cell office:value-type="float" office:value="4.432041" calcext:value-type="float">
            <text:p>4,432041</text:p>
          </table:table-cell>
          <table:table-cell office:value-type="float" office:value="5.2865205" calcext:value-type="float">
            <text:p>5,2865205</text:p>
          </table:table-cell>
          <table:table-cell office:value-type="float" office:value="4.9962797" calcext:value-type="float">
            <text:p>4,9962797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590649" calcext:value-type="float">
            <text:p>3,5590649</text:p>
          </table:table-cell>
          <table:table-cell office:value-type="float" office:value="3.4882743" calcext:value-type="float">
            <text:p>3,4882743</text:p>
          </table:table-cell>
          <table:table-cell office:value-type="float" office:value="3.5748034" calcext:value-type="float">
            <text:p>3,5748034</text:p>
          </table:table-cell>
          <table:table-cell office:value-type="float" office:value="3.720635" calcext:value-type="float">
            <text:p>3,720635</text:p>
          </table:table-cell>
          <table:table-cell office:value-type="float" office:value="3.6536438" calcext:value-type="float">
            <text:p>3,6536438</text:p>
          </table:table-cell>
          <table:table-cell office:value-type="float" office:value="3.7929962" calcext:value-type="float">
            <text:p>3,7929962</text:p>
          </table:table-cell>
          <table:table-cell office:value-type="float" office:value="3.9681423" calcext:value-type="float">
            <text:p>3,9681423</text:p>
          </table:table-cell>
          <table:table-cell office:value-type="float" office:value="3.9951756" calcext:value-type="float">
            <text:p>3,9951756</text:p>
          </table:table-cell>
          <table:table-cell office:value-type="float" office:value="4.105839" calcext:value-type="float">
            <text:p>4,105839</text:p>
          </table:table-cell>
          <table:table-cell office:value-type="float" office:value="4.5154366" calcext:value-type="float">
            <text:p>4,5154366</text:p>
          </table:table-cell>
          <table:table-cell office:value-type="float" office:value="4.5383525" calcext:value-type="float">
            <text:p>4,5383525</text:p>
          </table:table-cell>
          <table:table-cell office:value-type="float" office:value="5.0856895" calcext:value-type="float">
            <text:p>5,0856895</text:p>
          </table:table-cell>
          <table:table-cell office:value-type="float" office:value="5.062827" calcext:value-type="float">
            <text:p>5,062827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583935" calcext:value-type="float">
            <text:p>3,5583935</text:p>
          </table:table-cell>
          <table:table-cell office:value-type="float" office:value="3.490125" calcext:value-type="float">
            <text:p>3,490125</text:p>
          </table:table-cell>
          <table:table-cell office:value-type="float" office:value="3.5666192" calcext:value-type="float">
            <text:p>3,5666192</text:p>
          </table:table-cell>
          <table:table-cell office:value-type="float" office:value="3.6987412" calcext:value-type="float">
            <text:p>3,6987412</text:p>
          </table:table-cell>
          <table:table-cell office:value-type="float" office:value="3.6573334" calcext:value-type="float">
            <text:p>3,6573334</text:p>
          </table:table-cell>
          <table:table-cell office:value-type="float" office:value="3.7817538" calcext:value-type="float">
            <text:p>3,7817538</text:p>
          </table:table-cell>
          <table:table-cell office:value-type="float" office:value="3.9839344" calcext:value-type="float">
            <text:p>3,9839344</text:p>
          </table:table-cell>
          <table:table-cell office:value-type="float" office:value="4.0046477" calcext:value-type="float">
            <text:p>4,0046477</text:p>
          </table:table-cell>
          <table:table-cell office:value-type="float" office:value="4.0271373" calcext:value-type="float">
            <text:p>4,0271373</text:p>
          </table:table-cell>
          <table:table-cell office:value-type="float" office:value="4.4258986" calcext:value-type="float">
            <text:p>4,4258986</text:p>
          </table:table-cell>
          <table:table-cell office:value-type="float" office:value="4.4504776" calcext:value-type="float">
            <text:p>4,4504776</text:p>
          </table:table-cell>
          <table:table-cell office:value-type="float" office:value="5.1432085" calcext:value-type="float">
            <text:p>5,1432085</text:p>
          </table:table-cell>
          <table:table-cell office:value-type="float" office:value="5.784819" calcext:value-type="float">
            <text:p>5,784819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589151" calcext:value-type="float">
            <text:p>3,5589151</text:p>
          </table:table-cell>
          <table:table-cell office:value-type="float" office:value="3.4854147" calcext:value-type="float">
            <text:p>3,4854147</text:p>
          </table:table-cell>
          <table:table-cell office:value-type="float" office:value="3.5816998" calcext:value-type="float">
            <text:p>3,5816998</text:p>
          </table:table-cell>
          <table:table-cell office:value-type="float" office:value="3.7061136" calcext:value-type="float">
            <text:p>3,7061136</text:p>
          </table:table-cell>
          <table:table-cell office:value-type="float" office:value="3.6660717" calcext:value-type="float">
            <text:p>3,6660717</text:p>
          </table:table-cell>
          <table:table-cell office:value-type="float" office:value="3.7495205" calcext:value-type="float">
            <text:p>3,7495205</text:p>
          </table:table-cell>
          <table:table-cell office:value-type="float" office:value="3.8743293" calcext:value-type="float">
            <text:p>3,8743293</text:p>
          </table:table-cell>
          <table:table-cell office:value-type="float" office:value="3.9196525" calcext:value-type="float">
            <text:p>3,9196525</text:p>
          </table:table-cell>
          <table:table-cell office:value-type="float" office:value="4.070955" calcext:value-type="float">
            <text:p>4,070955</text:p>
          </table:table-cell>
          <table:table-cell office:value-type="float" office:value="4.5840187" calcext:value-type="float">
            <text:p>4,5840187</text:p>
          </table:table-cell>
          <table:table-cell office:value-type="float" office:value="4.3735847" calcext:value-type="float">
            <text:p>4,3735847</text:p>
          </table:table-cell>
          <table:table-cell office:value-type="float" office:value="4.753591" calcext:value-type="float">
            <text:p>4,753591</text:p>
          </table:table-cell>
          <table:table-cell office:value-type="float" office:value="5.807826" calcext:value-type="float">
            <text:p>5,8078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451934" calcext:value-type="float">
            <text:p>3,5451934</text:p>
          </table:table-cell>
          <table:table-cell office:value-type="float" office:value="3.4938664" calcext:value-type="float">
            <text:p>3,4938664</text:p>
          </table:table-cell>
          <table:table-cell office:value-type="float" office:value="3.4627507" calcext:value-type="float">
            <text:p>3,4627507</text:p>
          </table:table-cell>
          <table:table-cell office:value-type="float" office:value="3.5734591" calcext:value-type="float">
            <text:p>3,5734591</text:p>
          </table:table-cell>
          <table:table-cell office:value-type="float" office:value="3.5916562" calcext:value-type="float">
            <text:p>3,5916562</text:p>
          </table:table-cell>
          <table:table-cell office:value-type="float" office:value="3.5428138" calcext:value-type="float">
            <text:p>3,5428138</text:p>
          </table:table-cell>
          <table:table-cell office:value-type="float" office:value="3.6787264" calcext:value-type="float">
            <text:p>3,6787264</text:p>
          </table:table-cell>
          <table:table-cell office:value-type="float" office:value="3.9170702" calcext:value-type="float">
            <text:p>3,9170702</text:p>
          </table:table-cell>
          <table:table-cell office:value-type="float" office:value="3.8020763" calcext:value-type="float">
            <text:p>3,8020763</text:p>
          </table:table-cell>
          <table:table-cell office:value-type="float" office:value="4.3496304" calcext:value-type="float">
            <text:p>4,3496304</text:p>
          </table:table-cell>
          <table:table-cell office:value-type="float" office:value="4.232765" calcext:value-type="float">
            <text:p>4,232765</text:p>
          </table:table-cell>
          <table:table-cell office:value-type="float" office:value="4.965374" calcext:value-type="float">
            <text:p>4,965374</text:p>
          </table:table-cell>
          <table:table-cell office:value-type="float" office:value="5.235267" calcext:value-type="float">
            <text:p>5,235267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450585" calcext:value-type="float">
            <text:p>3,5450585</text:p>
          </table:table-cell>
          <table:table-cell office:value-type="float" office:value="3.4912977" calcext:value-type="float">
            <text:p>3,4912977</text:p>
          </table:table-cell>
          <table:table-cell office:value-type="float" office:value="3.461508" calcext:value-type="float">
            <text:p>3,461508</text:p>
          </table:table-cell>
          <table:table-cell office:value-type="float" office:value="3.6459413" calcext:value-type="float">
            <text:p>3,6459413</text:p>
          </table:table-cell>
          <table:table-cell office:value-type="float" office:value="3.6041539" calcext:value-type="float">
            <text:p>3,6041539</text:p>
          </table:table-cell>
          <table:table-cell office:value-type="float" office:value="3.54056" calcext:value-type="float">
            <text:p>3,54056</text:p>
          </table:table-cell>
          <table:table-cell office:value-type="float" office:value="3.6698086" calcext:value-type="float">
            <text:p>3,6698086</text:p>
          </table:table-cell>
          <table:table-cell office:value-type="float" office:value="3.9476886" calcext:value-type="float">
            <text:p>3,9476886</text:p>
          </table:table-cell>
          <table:table-cell office:value-type="float" office:value="3.9017992" calcext:value-type="float">
            <text:p>3,9017992</text:p>
          </table:table-cell>
          <table:table-cell office:value-type="float" office:value="4.273439" calcext:value-type="float">
            <text:p>4,273439</text:p>
          </table:table-cell>
          <table:table-cell office:value-type="float" office:value="4.3382087" calcext:value-type="float">
            <text:p>4,3382087</text:p>
          </table:table-cell>
          <table:table-cell office:value-type="float" office:value="4.699443" calcext:value-type="float">
            <text:p>4,699443</text:p>
          </table:table-cell>
          <table:table-cell office:value-type="float" office:value="5.083182" calcext:value-type="float">
            <text:p>5,083182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438097" calcext:value-type="float">
            <text:p>3,5438097</text:p>
          </table:table-cell>
          <table:table-cell office:value-type="float" office:value="3.489325" calcext:value-type="float">
            <text:p>3,489325</text:p>
          </table:table-cell>
          <table:table-cell office:value-type="float" office:value="3.4587336" calcext:value-type="float">
            <text:p>3,4587336</text:p>
          </table:table-cell>
          <table:table-cell office:value-type="float" office:value="3.5160887" calcext:value-type="float">
            <text:p>3,5160887</text:p>
          </table:table-cell>
          <table:table-cell office:value-type="float" office:value="3.61269" calcext:value-type="float">
            <text:p>3,61269</text:p>
          </table:table-cell>
          <table:table-cell office:value-type="float" office:value="3.5491393" calcext:value-type="float">
            <text:p>3,5491393</text:p>
          </table:table-cell>
          <table:table-cell office:value-type="float" office:value="3.6373858" calcext:value-type="float">
            <text:p>3,6373858</text:p>
          </table:table-cell>
          <table:table-cell office:value-type="float" office:value="3.7833178" calcext:value-type="float">
            <text:p>3,7833178</text:p>
          </table:table-cell>
          <table:table-cell office:value-type="float" office:value="4.0688205" calcext:value-type="float">
            <text:p>4,0688205</text:p>
          </table:table-cell>
          <table:table-cell office:value-type="float" office:value="4.0815277" calcext:value-type="float">
            <text:p>4,0815277</text:p>
          </table:table-cell>
          <table:table-cell office:value-type="float" office:value="4.529377" calcext:value-type="float">
            <text:p>4,529377</text:p>
          </table:table-cell>
          <table:table-cell office:value-type="float" office:value="4.5866547" calcext:value-type="float">
            <text:p>4,5866547</text:p>
          </table:table-cell>
          <table:table-cell office:value-type="float" office:value="5.794311" calcext:value-type="float">
            <text:p>5,794311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426786" calcext:value-type="float">
            <text:p>3,5426786</text:p>
          </table:table-cell>
          <table:table-cell office:value-type="float" office:value="3.490131" calcext:value-type="float">
            <text:p>3,490131</text:p>
          </table:table-cell>
          <table:table-cell office:value-type="float" office:value="3.4614196" calcext:value-type="float">
            <text:p>3,4614196</text:p>
          </table:table-cell>
          <table:table-cell office:value-type="float" office:value="3.5643516" calcext:value-type="float">
            <text:p>3,5643516</text:p>
          </table:table-cell>
          <table:table-cell office:value-type="float" office:value="3.5900106" calcext:value-type="float">
            <text:p>3,5900106</text:p>
          </table:table-cell>
          <table:table-cell office:value-type="float" office:value="3.5589535" calcext:value-type="float">
            <text:p>3,5589535</text:p>
          </table:table-cell>
          <table:table-cell office:value-type="float" office:value="3.6970124" calcext:value-type="float">
            <text:p>3,6970124</text:p>
          </table:table-cell>
          <table:table-cell office:value-type="float" office:value="3.8579545" calcext:value-type="float">
            <text:p>3,8579545</text:p>
          </table:table-cell>
          <table:table-cell office:value-type="float" office:value="4.222745" calcext:value-type="float">
            <text:p>4,222745</text:p>
          </table:table-cell>
          <table:table-cell office:value-type="float" office:value="4.386682" calcext:value-type="float">
            <text:p>4,386682</text:p>
          </table:table-cell>
          <table:table-cell office:value-type="float" office:value="4.477114" calcext:value-type="float">
            <text:p>4,477114</text:p>
          </table:table-cell>
          <table:table-cell office:value-type="float" office:value="5.4996686" calcext:value-type="float">
            <text:p>5,4996686</text:p>
          </table:table-cell>
          <table:table-cell office:value-type="float" office:value="4.6181226" calcext:value-type="float">
            <text:p>4,6181226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425923" calcext:value-type="float">
            <text:p>3,5425923</text:p>
          </table:table-cell>
          <table:table-cell office:value-type="float" office:value="3.4909248" calcext:value-type="float">
            <text:p>3,4909248</text:p>
          </table:table-cell>
          <table:table-cell office:value-type="float" office:value="3.4549975" calcext:value-type="float">
            <text:p>3,4549975</text:p>
          </table:table-cell>
          <table:table-cell office:value-type="float" office:value="3.5779855" calcext:value-type="float">
            <text:p>3,5779855</text:p>
          </table:table-cell>
          <table:table-cell office:value-type="float" office:value="3.6235013" calcext:value-type="float">
            <text:p>3,6235013</text:p>
          </table:table-cell>
          <table:table-cell office:value-type="float" office:value="3.5346377" calcext:value-type="float">
            <text:p>3,5346377</text:p>
          </table:table-cell>
          <table:table-cell office:value-type="float" office:value="3.7167096" calcext:value-type="float">
            <text:p>3,7167096</text:p>
          </table:table-cell>
          <table:table-cell office:value-type="float" office:value="3.930345" calcext:value-type="float">
            <text:p>3,930345</text:p>
          </table:table-cell>
          <table:table-cell office:value-type="float" office:value="3.7242296" calcext:value-type="float">
            <text:p>3,7242296</text:p>
          </table:table-cell>
          <table:table-cell office:value-type="float" office:value="4.244981" calcext:value-type="float">
            <text:p>4,244981</text:p>
          </table:table-cell>
          <table:table-cell office:value-type="float" office:value="4.470581" calcext:value-type="float">
            <text:p>4,470581</text:p>
          </table:table-cell>
          <table:table-cell office:value-type="float" office:value="4.9861355" calcext:value-type="float">
            <text:p>4,9861355</text:p>
          </table:table-cell>
          <table:table-cell office:value-type="float" office:value="4.929505" calcext:value-type="float">
            <text:p>4,929505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43335" calcext:value-type="float">
            <text:p>3,543335</text:p>
          </table:table-cell>
          <table:table-cell office:value-type="float" office:value="3.4820006" calcext:value-type="float">
            <text:p>3,4820006</text:p>
          </table:table-cell>
          <table:table-cell office:value-type="float" office:value="3.466051" calcext:value-type="float">
            <text:p>3,466051</text:p>
          </table:table-cell>
          <table:table-cell office:value-type="float" office:value="3.565475" calcext:value-type="float">
            <text:p>3,565475</text:p>
          </table:table-cell>
          <table:table-cell office:value-type="float" office:value="3.6382499" calcext:value-type="float">
            <text:p>3,6382499</text:p>
          </table:table-cell>
          <table:table-cell office:value-type="float" office:value="3.5480852" calcext:value-type="float">
            <text:p>3,5480852</text:p>
          </table:table-cell>
          <table:table-cell office:value-type="float" office:value="3.678781" calcext:value-type="float">
            <text:p>3,678781</text:p>
          </table:table-cell>
          <table:table-cell office:value-type="float" office:value="3.9176812" calcext:value-type="float">
            <text:p>3,9176812</text:p>
          </table:table-cell>
          <table:table-cell office:value-type="float" office:value="4.0887747" calcext:value-type="float">
            <text:p>4,0887747</text:p>
          </table:table-cell>
          <table:table-cell office:value-type="float" office:value="4.141389" calcext:value-type="float">
            <text:p>4,141389</text:p>
          </table:table-cell>
          <table:table-cell office:value-type="float" office:value="4.258964" calcext:value-type="float">
            <text:p>4,258964</text:p>
          </table:table-cell>
          <table:table-cell office:value-type="float" office:value="4.559968" calcext:value-type="float">
            <text:p>4,559968</text:p>
          </table:table-cell>
          <table:table-cell office:value-type="float" office:value="5.6284695" calcext:value-type="float">
            <text:p>5,62846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33827" calcext:value-type="float">
            <text:p>3,533827</text:p>
          </table:table-cell>
          <table:table-cell office:value-type="float" office:value="3.4922795" calcext:value-type="float">
            <text:p>3,4922795</text:p>
          </table:table-cell>
          <table:table-cell office:value-type="float" office:value="3.4427052" calcext:value-type="float">
            <text:p>3,4427052</text:p>
          </table:table-cell>
          <table:table-cell office:value-type="float" office:value="3.4247332" calcext:value-type="float">
            <text:p>3,4247332</text:p>
          </table:table-cell>
          <table:table-cell office:value-type="float" office:value="3.4543943" calcext:value-type="float">
            <text:p>3,4543943</text:p>
          </table:table-cell>
          <table:table-cell office:value-type="float" office:value="3.47675" calcext:value-type="float">
            <text:p>3,47675</text:p>
          </table:table-cell>
          <table:table-cell office:value-type="float" office:value="3.5630507" calcext:value-type="float">
            <text:p>3,5630507</text:p>
          </table:table-cell>
          <table:table-cell office:value-type="float" office:value="3.649212" calcext:value-type="float">
            <text:p>3,649212</text:p>
          </table:table-cell>
          <table:table-cell office:value-type="float" office:value="3.6821015" calcext:value-type="float">
            <text:p>3,6821015</text:p>
          </table:table-cell>
          <table:table-cell office:value-type="float" office:value="4.012044" calcext:value-type="float">
            <text:p>4,012044</text:p>
          </table:table-cell>
          <table:table-cell office:value-type="float" office:value="3.9995139" calcext:value-type="float">
            <text:p>3,9995139</text:p>
          </table:table-cell>
          <table:table-cell office:value-type="float" office:value="4.210921" calcext:value-type="float">
            <text:p>4,210921</text:p>
          </table:table-cell>
          <table:table-cell office:value-type="float" office:value="4.806288" calcext:value-type="float">
            <text:p>4,806288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336015" calcext:value-type="float">
            <text:p>3,5336015</text:p>
          </table:table-cell>
          <table:table-cell office:value-type="float" office:value="3.492019" calcext:value-type="float">
            <text:p>3,492019</text:p>
          </table:table-cell>
          <table:table-cell office:value-type="float" office:value="3.4405708" calcext:value-type="float">
            <text:p>3,4405708</text:p>
          </table:table-cell>
          <table:table-cell office:value-type="float" office:value="3.4572806" calcext:value-type="float">
            <text:p>3,4572806</text:p>
          </table:table-cell>
          <table:table-cell office:value-type="float" office:value="3.4612896" calcext:value-type="float">
            <text:p>3,4612896</text:p>
          </table:table-cell>
          <table:table-cell office:value-type="float" office:value="3.4795575" calcext:value-type="float">
            <text:p>3,4795575</text:p>
          </table:table-cell>
          <table:table-cell office:value-type="float" office:value="3.5633745" calcext:value-type="float">
            <text:p>3,5633745</text:p>
          </table:table-cell>
          <table:table-cell office:value-type="float" office:value="3.8033938" calcext:value-type="float">
            <text:p>3,8033938</text:p>
          </table:table-cell>
          <table:table-cell office:value-type="float" office:value="3.7551215" calcext:value-type="float">
            <text:p>3,7551215</text:p>
          </table:table-cell>
          <table:table-cell office:value-type="float" office:value="3.8237545" calcext:value-type="float">
            <text:p>3,8237545</text:p>
          </table:table-cell>
          <table:table-cell office:value-type="float" office:value="4.4857645" calcext:value-type="float">
            <text:p>4,4857645</text:p>
          </table:table-cell>
          <table:table-cell office:value-type="float" office:value="4.367902" calcext:value-type="float">
            <text:p>4,367902</text:p>
          </table:table-cell>
          <table:table-cell office:value-type="float" office:value="5.9718795" calcext:value-type="float">
            <text:p>5,9718795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321999" calcext:value-type="float">
            <text:p>3,5321999</text:p>
          </table:table-cell>
          <table:table-cell office:value-type="float" office:value="3.4889855" calcext:value-type="float">
            <text:p>3,4889855</text:p>
          </table:table-cell>
          <table:table-cell office:value-type="float" office:value="3.4419005" calcext:value-type="float">
            <text:p>3,4419005</text:p>
          </table:table-cell>
          <table:table-cell office:value-type="float" office:value="3.4254234" calcext:value-type="float">
            <text:p>3,4254234</text:p>
          </table:table-cell>
          <table:table-cell office:value-type="float" office:value="3.4535851" calcext:value-type="float">
            <text:p>3,4535851</text:p>
          </table:table-cell>
          <table:table-cell office:value-type="float" office:value="3.4793303" calcext:value-type="float">
            <text:p>3,4793303</text:p>
          </table:table-cell>
          <table:table-cell office:value-type="float" office:value="3.5526006" calcext:value-type="float">
            <text:p>3,5526006</text:p>
          </table:table-cell>
          <table:table-cell office:value-type="float" office:value="3.5827663" calcext:value-type="float">
            <text:p>3,5827663</text:p>
          </table:table-cell>
          <table:table-cell office:value-type="float" office:value="3.7572188" calcext:value-type="float">
            <text:p>3,7572188</text:p>
          </table:table-cell>
          <table:table-cell office:value-type="float" office:value="3.7618449" calcext:value-type="float">
            <text:p>3,7618449</text:p>
          </table:table-cell>
          <table:table-cell office:value-type="float" office:value="4.0797505" calcext:value-type="float">
            <text:p>4,0797505</text:p>
          </table:table-cell>
          <table:table-cell office:value-type="float" office:value="4.198746" calcext:value-type="float">
            <text:p>4,198746</text:p>
          </table:table-cell>
          <table:table-cell office:value-type="float" office:value="4.7812967" calcext:value-type="float">
            <text:p>4,7812967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310419" calcext:value-type="float">
            <text:p>3,5310419</text:p>
          </table:table-cell>
          <table:table-cell office:value-type="float" office:value="3.4896374" calcext:value-type="float">
            <text:p>3,4896374</text:p>
          </table:table-cell>
          <table:table-cell office:value-type="float" office:value="3.4383414" calcext:value-type="float">
            <text:p>3,4383414</text:p>
          </table:table-cell>
          <table:table-cell office:value-type="float" office:value="3.433339" calcext:value-type="float">
            <text:p>3,433339</text:p>
          </table:table-cell>
          <table:table-cell office:value-type="float" office:value="3.4551694" calcext:value-type="float">
            <text:p>3,4551694</text:p>
          </table:table-cell>
          <table:table-cell office:value-type="float" office:value="3.4822395" calcext:value-type="float">
            <text:p>3,4822395</text:p>
          </table:table-cell>
          <table:table-cell office:value-type="float" office:value="3.5781565" calcext:value-type="float">
            <text:p>3,5781565</text:p>
          </table:table-cell>
          <table:table-cell office:value-type="float" office:value="3.7827652" calcext:value-type="float">
            <text:p>3,7827652</text:p>
          </table:table-cell>
          <table:table-cell office:value-type="float" office:value="4.277904" calcext:value-type="float">
            <text:p>4,277904</text:p>
          </table:table-cell>
          <table:table-cell office:value-type="float" office:value="4.592842" calcext:value-type="float">
            <text:p>4,592842</text:p>
          </table:table-cell>
          <table:table-cell office:value-type="float" office:value="3.9921882" calcext:value-type="float">
            <text:p>3,9921882</text:p>
          </table:table-cell>
          <table:table-cell office:value-type="float" office:value="4.3547587" calcext:value-type="float">
            <text:p>4,3547587</text:p>
          </table:table-cell>
          <table:table-cell office:value-type="float" office:value="4.3568773" calcext:value-type="float">
            <text:p>4,3568773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320666" calcext:value-type="float">
            <text:p>3,5320666</text:p>
          </table:table-cell>
          <table:table-cell office:value-type="float" office:value="3.4896379" calcext:value-type="float">
            <text:p>3,4896379</text:p>
          </table:table-cell>
          <table:table-cell office:value-type="float" office:value="3.4337246" calcext:value-type="float">
            <text:p>3,4337246</text:p>
          </table:table-cell>
          <table:table-cell office:value-type="float" office:value="3.422436" calcext:value-type="float">
            <text:p>3,422436</text:p>
          </table:table-cell>
          <table:table-cell office:value-type="float" office:value="3.46133" calcext:value-type="float">
            <text:p>3,46133</text:p>
          </table:table-cell>
          <table:table-cell office:value-type="float" office:value="3.4675305" calcext:value-type="float">
            <text:p>3,4675305</text:p>
          </table:table-cell>
          <table:table-cell office:value-type="float" office:value="3.5830157" calcext:value-type="float">
            <text:p>3,5830157</text:p>
          </table:table-cell>
          <table:table-cell office:value-type="float" office:value="3.7008023" calcext:value-type="float">
            <text:p>3,7008023</text:p>
          </table:table-cell>
          <table:table-cell office:value-type="float" office:value="3.6552331" calcext:value-type="float">
            <text:p>3,6552331</text:p>
          </table:table-cell>
          <table:table-cell office:value-type="float" office:value="4.019848" calcext:value-type="float">
            <text:p>4,019848</text:p>
          </table:table-cell>
          <table:table-cell office:value-type="float" office:value="3.9904583" calcext:value-type="float">
            <text:p>3,9904583</text:p>
          </table:table-cell>
          <table:table-cell office:value-type="float" office:value="4.648652" calcext:value-type="float">
            <text:p>4,648652</text:p>
          </table:table-cell>
          <table:table-cell office:value-type="float" office:value="4.7811685" calcext:value-type="float">
            <text:p>4,7811685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316982" calcext:value-type="float">
            <text:p>3,5316982</text:p>
          </table:table-cell>
          <table:table-cell office:value-type="float" office:value="3.4828146" calcext:value-type="float">
            <text:p>3,4828146</text:p>
          </table:table-cell>
          <table:table-cell office:value-type="float" office:value="3.4412453" calcext:value-type="float">
            <text:p>3,4412453</text:p>
          </table:table-cell>
          <table:table-cell office:value-type="float" office:value="3.4285657" calcext:value-type="float">
            <text:p>3,4285657</text:p>
          </table:table-cell>
          <table:table-cell office:value-type="float" office:value="3.458002" calcext:value-type="float">
            <text:p>3,458002</text:p>
          </table:table-cell>
          <table:table-cell office:value-type="float" office:value="3.4741385" calcext:value-type="float">
            <text:p>3,4741385</text:p>
          </table:table-cell>
          <table:table-cell office:value-type="float" office:value="3.5548549" calcext:value-type="float">
            <text:p>3,5548549</text:p>
          </table:table-cell>
          <table:table-cell office:value-type="float" office:value="3.6303148" calcext:value-type="float">
            <text:p>3,6303148</text:p>
          </table:table-cell>
          <table:table-cell office:value-type="float" office:value="3.7630281" calcext:value-type="float">
            <text:p>3,7630281</text:p>
          </table:table-cell>
          <table:table-cell office:value-type="float" office:value="3.7205548" calcext:value-type="float">
            <text:p>3,7205548</text:p>
          </table:table-cell>
          <table:table-cell office:value-type="float" office:value="4.1275578" calcext:value-type="float">
            <text:p>4,1275578</text:p>
          </table:table-cell>
          <table:table-cell office:value-type="float" office:value="4.785038" calcext:value-type="float">
            <text:p>4,785038</text:p>
          </table:table-cell>
          <table:table-cell office:value-type="float" office:value="5.9762535" calcext:value-type="float">
            <text:p>5,97625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246727" calcext:value-type="float">
            <text:p>3,5246727</text:p>
          </table:table-cell>
          <table:table-cell office:value-type="float" office:value="3.4789436" calcext:value-type="float">
            <text:p>3,4789436</text:p>
          </table:table-cell>
          <table:table-cell office:value-type="float" office:value="3.4484043" calcext:value-type="float">
            <text:p>3,4484043</text:p>
          </table:table-cell>
          <table:table-cell office:value-type="float" office:value="3.431878" calcext:value-type="float">
            <text:p>3,431878</text:p>
          </table:table-cell>
          <table:table-cell office:value-type="float" office:value="3.4697835" calcext:value-type="float">
            <text:p>3,4697835</text:p>
          </table:table-cell>
          <table:table-cell office:value-type="float" office:value="3.4928317" calcext:value-type="float">
            <text:p>3,4928317</text:p>
          </table:table-cell>
          <table:table-cell office:value-type="float" office:value="3.5629113" calcext:value-type="float">
            <text:p>3,5629113</text:p>
          </table:table-cell>
          <table:table-cell office:value-type="float" office:value="3.600754" calcext:value-type="float">
            <text:p>3,600754</text:p>
          </table:table-cell>
          <table:table-cell office:value-type="float" office:value="3.6943078" calcext:value-type="float">
            <text:p>3,6943078</text:p>
          </table:table-cell>
          <table:table-cell office:value-type="float" office:value="3.8602352" calcext:value-type="float">
            <text:p>3,8602352</text:p>
          </table:table-cell>
          <table:table-cell office:value-type="float" office:value="3.8895745" calcext:value-type="float">
            <text:p>3,8895745</text:p>
          </table:table-cell>
          <table:table-cell office:value-type="float" office:value="3.957566" calcext:value-type="float">
            <text:p>3,957566</text:p>
          </table:table-cell>
          <table:table-cell office:value-type="float" office:value="4.388667" calcext:value-type="float">
            <text:p>4,388667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240884" calcext:value-type="float">
            <text:p>3,5240884</text:p>
          </table:table-cell>
          <table:table-cell office:value-type="float" office:value="3.4792948" calcext:value-type="float">
            <text:p>3,4792948</text:p>
          </table:table-cell>
          <table:table-cell office:value-type="float" office:value="3.4454298" calcext:value-type="float">
            <text:p>3,4454298</text:p>
          </table:table-cell>
          <table:table-cell office:value-type="float" office:value="3.4361012" calcext:value-type="float">
            <text:p>3,4361012</text:p>
          </table:table-cell>
          <table:table-cell office:value-type="float" office:value="3.4677815" calcext:value-type="float">
            <text:p>3,4677815</text:p>
          </table:table-cell>
          <table:table-cell office:value-type="float" office:value="3.4920583" calcext:value-type="float">
            <text:p>3,4920583</text:p>
          </table:table-cell>
          <table:table-cell office:value-type="float" office:value="3.5691175" calcext:value-type="float">
            <text:p>3,5691175</text:p>
          </table:table-cell>
          <table:table-cell office:value-type="float" office:value="3.611894" calcext:value-type="float">
            <text:p>3,611894</text:p>
          </table:table-cell>
          <table:table-cell office:value-type="float" office:value="3.6745784" calcext:value-type="float">
            <text:p>3,6745784</text:p>
          </table:table-cell>
          <table:table-cell office:value-type="float" office:value="3.7846029" calcext:value-type="float">
            <text:p>3,7846029</text:p>
          </table:table-cell>
          <table:table-cell office:value-type="float" office:value="4.1116824" calcext:value-type="float">
            <text:p>4,1116824</text:p>
          </table:table-cell>
          <table:table-cell office:value-type="float" office:value="4.0103083" calcext:value-type="float">
            <text:p>4,0103083</text:p>
          </table:table-cell>
          <table:table-cell office:value-type="float" office:value="5.1078897" calcext:value-type="float">
            <text:p>5,1078897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2316" calcext:value-type="float">
            <text:p>3,52316</text:p>
          </table:table-cell>
          <table:table-cell office:value-type="float" office:value="3.4766698" calcext:value-type="float">
            <text:p>3,4766698</text:p>
          </table:table-cell>
          <table:table-cell office:value-type="float" office:value="3.4462025" calcext:value-type="float">
            <text:p>3,4462025</text:p>
          </table:table-cell>
          <table:table-cell office:value-type="float" office:value="3.429686" calcext:value-type="float">
            <text:p>3,429686</text:p>
          </table:table-cell>
          <table:table-cell office:value-type="float" office:value="3.4645176" calcext:value-type="float">
            <text:p>3,4645176</text:p>
          </table:table-cell>
          <table:table-cell office:value-type="float" office:value="3.491863" calcext:value-type="float">
            <text:p>3,491863</text:p>
          </table:table-cell>
          <table:table-cell office:value-type="float" office:value="3.5597372" calcext:value-type="float">
            <text:p>3,5597372</text:p>
          </table:table-cell>
          <table:table-cell office:value-type="float" office:value="3.5882418" calcext:value-type="float">
            <text:p>3,5882418</text:p>
          </table:table-cell>
          <table:table-cell office:value-type="float" office:value="3.6224704" calcext:value-type="float">
            <text:p>3,6224704</text:p>
          </table:table-cell>
          <table:table-cell office:value-type="float" office:value="3.7382023" calcext:value-type="float">
            <text:p>3,7382023</text:p>
          </table:table-cell>
          <table:table-cell office:value-type="float" office:value="3.908761" calcext:value-type="float">
            <text:p>3,908761</text:p>
          </table:table-cell>
          <table:table-cell office:value-type="float" office:value="3.9550765" calcext:value-type="float">
            <text:p>3,9550765</text:p>
          </table:table-cell>
          <table:table-cell office:value-type="float" office:value="4.4793334" calcext:value-type="float">
            <text:p>4,4793334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220542" calcext:value-type="float">
            <text:p>3,5220542</text:p>
          </table:table-cell>
          <table:table-cell office:value-type="float" office:value="3.474452" calcext:value-type="float">
            <text:p>3,474452</text:p>
          </table:table-cell>
          <table:table-cell office:value-type="float" office:value="3.4431176" calcext:value-type="float">
            <text:p>3,4431176</text:p>
          </table:table-cell>
          <table:table-cell office:value-type="float" office:value="3.4395337" calcext:value-type="float">
            <text:p>3,4395337</text:p>
          </table:table-cell>
          <table:table-cell office:value-type="float" office:value="3.4666286" calcext:value-type="float">
            <text:p>3,4666286</text:p>
          </table:table-cell>
          <table:table-cell office:value-type="float" office:value="3.4928539" calcext:value-type="float">
            <text:p>3,4928539</text:p>
          </table:table-cell>
          <table:table-cell office:value-type="float" office:value="3.5751088" calcext:value-type="float">
            <text:p>3,5751088</text:p>
          </table:table-cell>
          <table:table-cell office:value-type="float" office:value="3.6141474" calcext:value-type="float">
            <text:p>3,6141474</text:p>
          </table:table-cell>
          <table:table-cell office:value-type="float" office:value="3.7625194" calcext:value-type="float">
            <text:p>3,7625194</text:p>
          </table:table-cell>
          <table:table-cell office:value-type="float" office:value="3.9125264" calcext:value-type="float">
            <text:p>3,9125264</text:p>
          </table:table-cell>
          <table:table-cell office:value-type="float" office:value="3.8564258" calcext:value-type="float">
            <text:p>3,8564258</text:p>
          </table:table-cell>
          <table:table-cell office:value-type="float" office:value="4.030483" calcext:value-type="float">
            <text:p>4,030483</text:p>
          </table:table-cell>
          <table:table-cell office:value-type="float" office:value="4.1875944" calcext:value-type="float">
            <text:p>4,1875944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231514" calcext:value-type="float">
            <text:p>3,5231514</text:p>
          </table:table-cell>
          <table:table-cell office:value-type="float" office:value="3.4783175" calcext:value-type="float">
            <text:p>3,4783175</text:p>
          </table:table-cell>
          <table:table-cell office:value-type="float" office:value="3.4406798" calcext:value-type="float">
            <text:p>3,4406798</text:p>
          </table:table-cell>
          <table:table-cell office:value-type="float" office:value="3.4305813" calcext:value-type="float">
            <text:p>3,4305813</text:p>
          </table:table-cell>
          <table:table-cell office:value-type="float" office:value="3.4669929" calcext:value-type="float">
            <text:p>3,4669929</text:p>
          </table:table-cell>
          <table:table-cell office:value-type="float" office:value="3.4816456" calcext:value-type="float">
            <text:p>3,4816456</text:p>
          </table:table-cell>
          <table:table-cell office:value-type="float" office:value="3.5726728" calcext:value-type="float">
            <text:p>3,5726728</text:p>
          </table:table-cell>
          <table:table-cell office:value-type="float" office:value="3.6096284" calcext:value-type="float">
            <text:p>3,6096284</text:p>
          </table:table-cell>
          <table:table-cell office:value-type="float" office:value="3.6665974" calcext:value-type="float">
            <text:p>3,6665974</text:p>
          </table:table-cell>
          <table:table-cell office:value-type="float" office:value="3.7971911" calcext:value-type="float">
            <text:p>3,7971911</text:p>
          </table:table-cell>
          <table:table-cell office:value-type="float" office:value="3.9003162" calcext:value-type="float">
            <text:p>3,9003162</text:p>
          </table:table-cell>
          <table:table-cell office:value-type="float" office:value="4.1437535" calcext:value-type="float">
            <text:p>4,1437535</text:p>
          </table:table-cell>
          <table:table-cell office:value-type="float" office:value="4.4256687" calcext:value-type="float">
            <text:p>4,4256687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221028" calcext:value-type="float">
            <text:p>3,5221028</text:p>
          </table:table-cell>
          <table:table-cell office:value-type="float" office:value="3.4761896" calcext:value-type="float">
            <text:p>3,4761896</text:p>
          </table:table-cell>
          <table:table-cell office:value-type="float" office:value="3.4463496" calcext:value-type="float">
            <text:p>3,4463496</text:p>
          </table:table-cell>
          <table:table-cell office:value-type="float" office:value="3.4353049" calcext:value-type="float">
            <text:p>3,4353049</text:p>
          </table:table-cell>
          <table:table-cell office:value-type="float" office:value="3.4694602" calcext:value-type="float">
            <text:p>3,4694602</text:p>
          </table:table-cell>
          <table:table-cell office:value-type="float" office:value="3.4837847" calcext:value-type="float">
            <text:p>3,4837847</text:p>
          </table:table-cell>
          <table:table-cell office:value-type="float" office:value="3.5560844" calcext:value-type="float">
            <text:p>3,5560844</text:p>
          </table:table-cell>
          <table:table-cell office:value-type="float" office:value="3.5966837" calcext:value-type="float">
            <text:p>3,5966837</text:p>
          </table:table-cell>
          <table:table-cell office:value-type="float" office:value="3.6970866" calcext:value-type="float">
            <text:p>3,6970866</text:p>
          </table:table-cell>
          <table:table-cell office:value-type="float" office:value="3.6980755" calcext:value-type="float">
            <text:p>3,6980755</text:p>
          </table:table-cell>
          <table:table-cell office:value-type="float" office:value="3.9813714" calcext:value-type="float">
            <text:p>3,9813714</text:p>
          </table:table-cell>
          <table:table-cell office:value-type="float" office:value="4.347986" calcext:value-type="float">
            <text:p>4,347986</text:p>
          </table:table-cell>
          <table:table-cell office:value-type="float" office:value="6.37758" calcext:value-type="float">
            <text:p>6,377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170355" calcext:value-type="float">
            <text:p>3,5170355</text:p>
          </table:table-cell>
          <table:table-cell office:value-type="float" office:value="3.4707518" calcext:value-type="float">
            <text:p>3,4707518</text:p>
          </table:table-cell>
          <table:table-cell office:value-type="float" office:value="3.4526484" calcext:value-type="float">
            <text:p>3,4526484</text:p>
          </table:table-cell>
          <table:table-cell office:value-type="float" office:value="3.4385834" calcext:value-type="float">
            <text:p>3,4385834</text:p>
          </table:table-cell>
          <table:table-cell office:value-type="float" office:value="3.4792516" calcext:value-type="float">
            <text:p>3,4792516</text:p>
          </table:table-cell>
          <table:table-cell office:value-type="float" office:value="3.5044582" calcext:value-type="float">
            <text:p>3,5044582</text:p>
          </table:table-cell>
          <table:table-cell office:value-type="float" office:value="3.5721748" calcext:value-type="float">
            <text:p>3,5721748</text:p>
          </table:table-cell>
          <table:table-cell office:value-type="float" office:value="3.609358" calcext:value-type="float">
            <text:p>3,609358</text:p>
          </table:table-cell>
          <table:table-cell office:value-type="float" office:value="3.7075481" calcext:value-type="float">
            <text:p>3,7075481</text:p>
          </table:table-cell>
          <table:table-cell office:value-type="float" office:value="3.8717346" calcext:value-type="float">
            <text:p>3,8717346</text:p>
          </table:table-cell>
          <table:table-cell office:value-type="float" office:value="3.8971694" calcext:value-type="float">
            <text:p>3,8971694</text:p>
          </table:table-cell>
          <table:table-cell office:value-type="float" office:value="3.975917" calcext:value-type="float">
            <text:p>3,975917</text:p>
          </table:table-cell>
          <table:table-cell office:value-type="float" office:value="4.339547" calcext:value-type="float">
            <text:p>4,339547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16726" calcext:value-type="float">
            <text:p>3,516726</text:p>
          </table:table-cell>
          <table:table-cell office:value-type="float" office:value="3.4713914" calcext:value-type="float">
            <text:p>3,4713914</text:p>
          </table:table-cell>
          <table:table-cell office:value-type="float" office:value="3.4502985" calcext:value-type="float">
            <text:p>3,4502985</text:p>
          </table:table-cell>
          <table:table-cell office:value-type="float" office:value="3.442985" calcext:value-type="float">
            <text:p>3,442985</text:p>
          </table:table-cell>
          <table:table-cell office:value-type="float" office:value="3.4765751" calcext:value-type="float">
            <text:p>3,4765751</text:p>
          </table:table-cell>
          <table:table-cell office:value-type="float" office:value="3.5029716" calcext:value-type="float">
            <text:p>3,5029716</text:p>
          </table:table-cell>
          <table:table-cell office:value-type="float" office:value="3.5784044" calcext:value-type="float">
            <text:p>3,5784044</text:p>
          </table:table-cell>
          <table:table-cell office:value-type="float" office:value="3.6100156" calcext:value-type="float">
            <text:p>3,6100156</text:p>
          </table:table-cell>
          <table:table-cell office:value-type="float" office:value="3.6850045" calcext:value-type="float">
            <text:p>3,6850045</text:p>
          </table:table-cell>
          <table:table-cell office:value-type="float" office:value="3.792997" calcext:value-type="float">
            <text:p>3,792997</text:p>
          </table:table-cell>
          <table:table-cell office:value-type="float" office:value="4.0354795" calcext:value-type="float">
            <text:p>4,0354795</text:p>
          </table:table-cell>
          <table:table-cell office:value-type="float" office:value="4.017597" calcext:value-type="float">
            <text:p>4,017597</text:p>
          </table:table-cell>
          <table:table-cell office:value-type="float" office:value="4.8317122" calcext:value-type="float">
            <text:p>4,8317122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148816" calcext:value-type="float">
            <text:p>3,5148816</text:p>
          </table:table-cell>
          <table:table-cell office:value-type="float" office:value="3.469151" calcext:value-type="float">
            <text:p>3,469151</text:p>
          </table:table-cell>
          <table:table-cell office:value-type="float" office:value="3.4497857" calcext:value-type="float">
            <text:p>3,4497857</text:p>
          </table:table-cell>
          <table:table-cell office:value-type="float" office:value="3.436707" calcext:value-type="float">
            <text:p>3,436707</text:p>
          </table:table-cell>
          <table:table-cell office:value-type="float" office:value="3.4751365" calcext:value-type="float">
            <text:p>3,4751365</text:p>
          </table:table-cell>
          <table:table-cell office:value-type="float" office:value="3.5027308" calcext:value-type="float">
            <text:p>3,5027308</text:p>
          </table:table-cell>
          <table:table-cell office:value-type="float" office:value="3.5681188" calcext:value-type="float">
            <text:p>3,5681188</text:p>
          </table:table-cell>
          <table:table-cell office:value-type="float" office:value="3.5999002" calcext:value-type="float">
            <text:p>3,5999002</text:p>
          </table:table-cell>
          <table:table-cell office:value-type="float" office:value="3.6368895" calcext:value-type="float">
            <text:p>3,6368895</text:p>
          </table:table-cell>
          <table:table-cell office:value-type="float" office:value="3.7470107" calcext:value-type="float">
            <text:p>3,7470107</text:p>
          </table:table-cell>
          <table:table-cell office:value-type="float" office:value="3.9293058" calcext:value-type="float">
            <text:p>3,9293058</text:p>
          </table:table-cell>
          <table:table-cell office:value-type="float" office:value="3.9681451" calcext:value-type="float">
            <text:p>3,9681451</text:p>
          </table:table-cell>
          <table:table-cell office:value-type="float" office:value="4.3513694" calcext:value-type="float">
            <text:p>4,3513694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134726" calcext:value-type="float">
            <text:p>3,5134726</text:p>
          </table:table-cell>
          <table:table-cell office:value-type="float" office:value="3.4677298" calcext:value-type="float">
            <text:p>3,4677298</text:p>
          </table:table-cell>
          <table:table-cell office:value-type="float" office:value="3.4480166" calcext:value-type="float">
            <text:p>3,4480166</text:p>
          </table:table-cell>
          <table:table-cell office:value-type="float" office:value="3.4455814" calcext:value-type="float">
            <text:p>3,4455814</text:p>
          </table:table-cell>
          <table:table-cell office:value-type="float" office:value="3.4748266" calcext:value-type="float">
            <text:p>3,4748266</text:p>
          </table:table-cell>
          <table:table-cell office:value-type="float" office:value="3.5039802" calcext:value-type="float">
            <text:p>3,5039802</text:p>
          </table:table-cell>
          <table:table-cell office:value-type="float" office:value="3.582783" calcext:value-type="float">
            <text:p>3,582783</text:p>
          </table:table-cell>
          <table:table-cell office:value-type="float" office:value="3.6114385" calcext:value-type="float">
            <text:p>3,6114385</text:p>
          </table:table-cell>
          <table:table-cell office:value-type="float" office:value="3.7144501" calcext:value-type="float">
            <text:p>3,7144501</text:p>
          </table:table-cell>
          <table:table-cell office:value-type="float" office:value="3.9022317" calcext:value-type="float">
            <text:p>3,9022317</text:p>
          </table:table-cell>
          <table:table-cell office:value-type="float" office:value="3.8819947" calcext:value-type="float">
            <text:p>3,8819947</text:p>
          </table:table-cell>
          <table:table-cell office:value-type="float" office:value="4.054431" calcext:value-type="float">
            <text:p>4,054431</text:p>
          </table:table-cell>
          <table:table-cell office:value-type="float" office:value="4.1638427" calcext:value-type="float">
            <text:p>4,1638427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142481" calcext:value-type="float">
            <text:p>3,5142481</text:p>
          </table:table-cell>
          <table:table-cell office:value-type="float" office:value="3.4704463" calcext:value-type="float">
            <text:p>3,4704463</text:p>
          </table:table-cell>
          <table:table-cell office:value-type="float" office:value="3.4449186" calcext:value-type="float">
            <text:p>3,4449186</text:p>
          </table:table-cell>
          <table:table-cell office:value-type="float" office:value="3.4366646" calcext:value-type="float">
            <text:p>3,4366646</text:p>
          </table:table-cell>
          <table:table-cell office:value-type="float" office:value="3.4767668" calcext:value-type="float">
            <text:p>3,4767668</text:p>
          </table:table-cell>
          <table:table-cell office:value-type="float" office:value="3.4926736" calcext:value-type="float">
            <text:p>3,4926736</text:p>
          </table:table-cell>
          <table:table-cell office:value-type="float" office:value="3.5805366" calcext:value-type="float">
            <text:p>3,5805366</text:p>
          </table:table-cell>
          <table:table-cell office:value-type="float" office:value="3.612213" calcext:value-type="float">
            <text:p>3,612213</text:p>
          </table:table-cell>
          <table:table-cell office:value-type="float" office:value="3.6798635" calcext:value-type="float">
            <text:p>3,6798635</text:p>
          </table:table-cell>
          <table:table-cell office:value-type="float" office:value="3.7972796" calcext:value-type="float">
            <text:p>3,7972796</text:p>
          </table:table-cell>
          <table:table-cell office:value-type="float" office:value="3.9161816" calcext:value-type="float">
            <text:p>3,9161816</text:p>
          </table:table-cell>
          <table:table-cell office:value-type="float" office:value="4.098529" calcext:value-type="float">
            <text:p>4,098529</text:p>
          </table:table-cell>
          <table:table-cell office:value-type="float" office:value="4.4079485" calcext:value-type="float">
            <text:p>4,4079485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145051" calcext:value-type="float">
            <text:p>3,5145051</text:p>
          </table:table-cell>
          <table:table-cell office:value-type="float" office:value="3.469067" calcext:value-type="float">
            <text:p>3,469067</text:p>
          </table:table-cell>
          <table:table-cell office:value-type="float" office:value="3.450421" calcext:value-type="float">
            <text:p>3,450421</text:p>
          </table:table-cell>
          <table:table-cell office:value-type="float" office:value="3.4421287" calcext:value-type="float">
            <text:p>3,4421287</text:p>
          </table:table-cell>
          <table:table-cell office:value-type="float" office:value="3.4783835" calcext:value-type="float">
            <text:p>3,4783835</text:p>
          </table:table-cell>
          <table:table-cell office:value-type="float" office:value="3.4923978" calcext:value-type="float">
            <text:p>3,4923978</text:p>
          </table:table-cell>
          <table:table-cell office:value-type="float" office:value="3.562627" calcext:value-type="float">
            <text:p>3,562627</text:p>
          </table:table-cell>
          <table:table-cell office:value-type="float" office:value="3.6088881" calcext:value-type="float">
            <text:p>3,6088881</text:p>
          </table:table-cell>
          <table:table-cell office:value-type="float" office:value="3.7078123" calcext:value-type="float">
            <text:p>3,7078123</text:p>
          </table:table-cell>
          <table:table-cell office:value-type="float" office:value="3.7091572" calcext:value-type="float">
            <text:p>3,7091572</text:p>
          </table:table-cell>
          <table:table-cell office:value-type="float" office:value="3.989023" calcext:value-type="float">
            <text:p>3,989023</text:p>
          </table:table-cell>
          <table:table-cell office:value-type="float" office:value="3.9551978" calcext:value-type="float">
            <text:p>3,9551978</text:p>
          </table:table-cell>
          <table:table-cell office:value-type="float" office:value="5.5675807" calcext:value-type="float">
            <text:p>5,56758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102072" calcext:value-type="float">
            <text:p>3,5102072</text:p>
          </table:table-cell>
          <table:table-cell office:value-type="float" office:value="3.4722505" calcext:value-type="float">
            <text:p>3,4722505</text:p>
          </table:table-cell>
          <table:table-cell office:value-type="float" office:value="3.4567373" calcext:value-type="float">
            <text:p>3,4567373</text:p>
          </table:table-cell>
          <table:table-cell office:value-type="float" office:value="3.4450617" calcext:value-type="float">
            <text:p>3,4450617</text:p>
          </table:table-cell>
          <table:table-cell office:value-type="float" office:value="3.4877398" calcext:value-type="float">
            <text:p>3,4877398</text:p>
          </table:table-cell>
          <table:table-cell office:value-type="float" office:value="3.5158274" calcext:value-type="float">
            <text:p>3,5158274</text:p>
          </table:table-cell>
          <table:table-cell office:value-type="float" office:value="3.5827253" calcext:value-type="float">
            <text:p>3,5827253</text:p>
          </table:table-cell>
          <table:table-cell office:value-type="float" office:value="3.6201046" calcext:value-type="float">
            <text:p>3,6201046</text:p>
          </table:table-cell>
          <table:table-cell office:value-type="float" office:value="3.7205443" calcext:value-type="float">
            <text:p>3,7205443</text:p>
          </table:table-cell>
          <table:table-cell office:value-type="float" office:value="3.8831997" calcext:value-type="float">
            <text:p>3,8831997</text:p>
          </table:table-cell>
          <table:table-cell office:value-type="float" office:value="3.909752" calcext:value-type="float">
            <text:p>3,909752</text:p>
          </table:table-cell>
          <table:table-cell office:value-type="float" office:value="3.9919693" calcext:value-type="float">
            <text:p>3,9919693</text:p>
          </table:table-cell>
          <table:table-cell office:value-type="float" office:value="4.3513947" calcext:value-type="float">
            <text:p>4,3513947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09542" calcext:value-type="float">
            <text:p>3,509542</text:p>
          </table:table-cell>
          <table:table-cell office:value-type="float" office:value="3.4729366" calcext:value-type="float">
            <text:p>3,4729366</text:p>
          </table:table-cell>
          <table:table-cell office:value-type="float" office:value="3.455729" calcext:value-type="float">
            <text:p>3,455729</text:p>
          </table:table-cell>
          <table:table-cell office:value-type="float" office:value="3.4503496" calcext:value-type="float">
            <text:p>3,4503496</text:p>
          </table:table-cell>
          <table:table-cell office:value-type="float" office:value="3.4856532" calcext:value-type="float">
            <text:p>3,4856532</text:p>
          </table:table-cell>
          <table:table-cell office:value-type="float" office:value="3.5136063" calcext:value-type="float">
            <text:p>3,5136063</text:p>
          </table:table-cell>
          <table:table-cell office:value-type="float" office:value="3.5880167" calcext:value-type="float">
            <text:p>3,5880167</text:p>
          </table:table-cell>
          <table:table-cell office:value-type="float" office:value="3.6164277" calcext:value-type="float">
            <text:p>3,6164277</text:p>
          </table:table-cell>
          <table:table-cell office:value-type="float" office:value="3.6958697" calcext:value-type="float">
            <text:p>3,6958697</text:p>
          </table:table-cell>
          <table:table-cell office:value-type="float" office:value="3.8021426" calcext:value-type="float">
            <text:p>3,8021426</text:p>
          </table:table-cell>
          <table:table-cell office:value-type="float" office:value="4.039813" calcext:value-type="float">
            <text:p>4,039813</text:p>
          </table:table-cell>
          <table:table-cell office:value-type="float" office:value="4.029128" calcext:value-type="float">
            <text:p>4,029128</text:p>
          </table:table-cell>
          <table:table-cell office:value-type="float" office:value="4.578512" calcext:value-type="float">
            <text:p>4,578512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081856" calcext:value-type="float">
            <text:p>3,5081856</text:p>
          </table:table-cell>
          <table:table-cell office:value-type="float" office:value="3.4689844" calcext:value-type="float">
            <text:p>3,4689844</text:p>
          </table:table-cell>
          <table:table-cell office:value-type="float" office:value="3.4552245" calcext:value-type="float">
            <text:p>3,4552245</text:p>
          </table:table-cell>
          <table:table-cell office:value-type="float" office:value="3.4446445" calcext:value-type="float">
            <text:p>3,4446445</text:p>
          </table:table-cell>
          <table:table-cell office:value-type="float" office:value="3.4845793" calcext:value-type="float">
            <text:p>3,4845793</text:p>
          </table:table-cell>
          <table:table-cell office:value-type="float" office:value="3.5131984" calcext:value-type="float">
            <text:p>3,5131984</text:p>
          </table:table-cell>
          <table:table-cell office:value-type="float" office:value="3.5775836" calcext:value-type="float">
            <text:p>3,5775836</text:p>
          </table:table-cell>
          <table:table-cell office:value-type="float" office:value="3.6107543" calcext:value-type="float">
            <text:p>3,6107543</text:p>
          </table:table-cell>
          <table:table-cell office:value-type="float" office:value="3.6483238" calcext:value-type="float">
            <text:p>3,6483238</text:p>
          </table:table-cell>
          <table:table-cell office:value-type="float" office:value="3.756402" calcext:value-type="float">
            <text:p>3,756402</text:p>
          </table:table-cell>
          <table:table-cell office:value-type="float" office:value="3.9485867" calcext:value-type="float">
            <text:p>3,9485867</text:p>
          </table:table-cell>
          <table:table-cell office:value-type="float" office:value="3.9893844" calcext:value-type="float">
            <text:p>3,9893844</text:p>
          </table:table-cell>
          <table:table-cell office:value-type="float" office:value="4.3642893" calcext:value-type="float">
            <text:p>4,3642893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064359" calcext:value-type="float">
            <text:p>3,5064359</text:p>
          </table:table-cell>
          <table:table-cell office:value-type="float" office:value="3.4689748" calcext:value-type="float">
            <text:p>3,4689748</text:p>
          </table:table-cell>
          <table:table-cell office:value-type="float" office:value="3.4514208" calcext:value-type="float">
            <text:p>3,4514208</text:p>
          </table:table-cell>
          <table:table-cell office:value-type="float" office:value="3.453203" calcext:value-type="float">
            <text:p>3,453203</text:p>
          </table:table-cell>
          <table:table-cell office:value-type="float" office:value="3.4850307" calcext:value-type="float">
            <text:p>3,4850307</text:p>
          </table:table-cell>
          <table:table-cell office:value-type="float" office:value="3.5148375" calcext:value-type="float">
            <text:p>3,5148375</text:p>
          </table:table-cell>
          <table:table-cell office:value-type="float" office:value="3.5928104" calcext:value-type="float">
            <text:p>3,5928104</text:p>
          </table:table-cell>
          <table:table-cell office:value-type="float" office:value="3.617532" calcext:value-type="float">
            <text:p>3,617532</text:p>
          </table:table-cell>
          <table:table-cell office:value-type="float" office:value="3.7246654" calcext:value-type="float">
            <text:p>3,7246654</text:p>
          </table:table-cell>
          <table:table-cell office:value-type="float" office:value="3.915736" calcext:value-type="float">
            <text:p>3,915736</text:p>
          </table:table-cell>
          <table:table-cell office:value-type="float" office:value="3.902115" calcext:value-type="float">
            <text:p>3,902115</text:p>
          </table:table-cell>
          <table:table-cell office:value-type="float" office:value="4.075966" calcext:value-type="float">
            <text:p>4,075966</text:p>
          </table:table-cell>
          <table:table-cell office:value-type="float" office:value="4.1710477" calcext:value-type="float">
            <text:p>4,1710477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0726" calcext:value-type="float">
            <text:p>3,50726</text:p>
          </table:table-cell>
          <table:table-cell office:value-type="float" office:value="3.4717305" calcext:value-type="float">
            <text:p>3,4717305</text:p>
          </table:table-cell>
          <table:table-cell office:value-type="float" office:value="3.4491231" calcext:value-type="float">
            <text:p>3,4491231</text:p>
          </table:table-cell>
          <table:table-cell office:value-type="float" office:value="3.4430697" calcext:value-type="float">
            <text:p>3,4430697</text:p>
          </table:table-cell>
          <table:table-cell office:value-type="float" office:value="3.4871974" calcext:value-type="float">
            <text:p>3,4871974</text:p>
          </table:table-cell>
          <table:table-cell office:value-type="float" office:value="3.503404" calcext:value-type="float">
            <text:p>3,503404</text:p>
          </table:table-cell>
          <table:table-cell office:value-type="float" office:value="3.590072" calcext:value-type="float">
            <text:p>3,590072</text:p>
          </table:table-cell>
          <table:table-cell office:value-type="float" office:value="3.6192477" calcext:value-type="float">
            <text:p>3,6192477</text:p>
          </table:table-cell>
          <table:table-cell office:value-type="float" office:value="3.6920927" calcext:value-type="float">
            <text:p>3,6920927</text:p>
          </table:table-cell>
          <table:table-cell office:value-type="float" office:value="3.8027947" calcext:value-type="float">
            <text:p>3,8027947</text:p>
          </table:table-cell>
          <table:table-cell office:value-type="float" office:value="3.930025" calcext:value-type="float">
            <text:p>3,930025</text:p>
          </table:table-cell>
          <table:table-cell office:value-type="float" office:value="4.11167" calcext:value-type="float">
            <text:p>4,11167</text:p>
          </table:table-cell>
          <table:table-cell office:value-type="float" office:value="4.418408" calcext:value-type="float">
            <text:p>4,418408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073264" calcext:value-type="float">
            <text:p>3,5073264</text:p>
          </table:table-cell>
          <table:table-cell office:value-type="float" office:value="3.4697003" calcext:value-type="float">
            <text:p>3,4697003</text:p>
          </table:table-cell>
          <table:table-cell office:value-type="float" office:value="3.454582" calcext:value-type="float">
            <text:p>3,454582</text:p>
          </table:table-cell>
          <table:table-cell office:value-type="float" office:value="3.448712" calcext:value-type="float">
            <text:p>3,448712</text:p>
          </table:table-cell>
          <table:table-cell office:value-type="float" office:value="3.4880352" calcext:value-type="float">
            <text:p>3,4880352</text:p>
          </table:table-cell>
          <table:table-cell office:value-type="float" office:value="3.5009727" calcext:value-type="float">
            <text:p>3,5009727</text:p>
          </table:table-cell>
          <table:table-cell office:value-type="float" office:value="3.572391" calcext:value-type="float">
            <text:p>3,572391</text:p>
          </table:table-cell>
          <table:table-cell office:value-type="float" office:value="3.620587" calcext:value-type="float">
            <text:p>3,620587</text:p>
          </table:table-cell>
          <table:table-cell office:value-type="float" office:value="3.7188733" calcext:value-type="float">
            <text:p>3,7188733</text:p>
          </table:table-cell>
          <table:table-cell office:value-type="float" office:value="3.721421" calcext:value-type="float">
            <text:p>3,721421</text:p>
          </table:table-cell>
          <table:table-cell office:value-type="float" office:value="3.9987905" calcext:value-type="float">
            <text:p>3,9987905</text:p>
          </table:table-cell>
          <table:table-cell office:value-type="float" office:value="3.9700036" calcext:value-type="float">
            <text:p>3,9700036</text:p>
          </table:table-cell>
          <table:table-cell office:value-type="float" office:value="4.8769407" calcext:value-type="float">
            <text:p>4,87694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04861" calcext:value-type="float">
            <text:p>3,504861</text:p>
          </table:table-cell>
          <table:table-cell office:value-type="float" office:value="3.4748933" calcext:value-type="float">
            <text:p>3,4748933</text:p>
          </table:table-cell>
          <table:table-cell office:value-type="float" office:value="3.4613128" calcext:value-type="float">
            <text:p>3,4613128</text:p>
          </table:table-cell>
          <table:table-cell office:value-type="float" office:value="3.452393" calcext:value-type="float">
            <text:p>3,452393</text:p>
          </table:table-cell>
          <table:table-cell office:value-type="float" office:value="3.4967816" calcext:value-type="float">
            <text:p>3,4967816</text:p>
          </table:table-cell>
          <table:table-cell office:value-type="float" office:value="3.5271697" calcext:value-type="float">
            <text:p>3,5271697</text:p>
          </table:table-cell>
          <table:table-cell office:value-type="float" office:value="3.5926752" calcext:value-type="float">
            <text:p>3,5926752</text:p>
          </table:table-cell>
          <table:table-cell office:value-type="float" office:value="3.6312535" calcext:value-type="float">
            <text:p>3,6312535</text:p>
          </table:table-cell>
          <table:table-cell office:value-type="float" office:value="3.7332" calcext:value-type="float">
            <text:p>3,7332</text:p>
          </table:table-cell>
          <table:table-cell office:value-type="float" office:value="3.8944995" calcext:value-type="float">
            <text:p>3,8944995</text:p>
          </table:table-cell>
          <table:table-cell office:value-type="float" office:value="3.9214852" calcext:value-type="float">
            <text:p>3,9214852</text:p>
          </table:table-cell>
          <table:table-cell office:value-type="float" office:value="4.0064473" calcext:value-type="float">
            <text:p>4,0064473</text:p>
          </table:table-cell>
          <table:table-cell office:value-type="float" office:value="4.363253" calcext:value-type="float">
            <text:p>4,363253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04132" calcext:value-type="float">
            <text:p>3,504132</text:p>
          </table:table-cell>
          <table:table-cell office:value-type="float" office:value="3.4760854" calcext:value-type="float">
            <text:p>3,4760854</text:p>
          </table:table-cell>
          <table:table-cell office:value-type="float" office:value="3.4609923" calcext:value-type="float">
            <text:p>3,4609923</text:p>
          </table:table-cell>
          <table:table-cell office:value-type="float" office:value="3.4568698" calcext:value-type="float">
            <text:p>3,4568698</text:p>
          </table:table-cell>
          <table:table-cell office:value-type="float" office:value="3.4949813" calcext:value-type="float">
            <text:p>3,4949813</text:p>
          </table:table-cell>
          <table:table-cell office:value-type="float" office:value="3.5244107" calcext:value-type="float">
            <text:p>3,5244107</text:p>
          </table:table-cell>
          <table:table-cell office:value-type="float" office:value="3.5970314" calcext:value-type="float">
            <text:p>3,5970314</text:p>
          </table:table-cell>
          <table:table-cell office:value-type="float" office:value="3.6247623" calcext:value-type="float">
            <text:p>3,6247623</text:p>
          </table:table-cell>
          <table:table-cell office:value-type="float" office:value="3.7066398" calcext:value-type="float">
            <text:p>3,7066398</text:p>
          </table:table-cell>
          <table:table-cell office:value-type="float" office:value="3.8112333" calcext:value-type="float">
            <text:p>3,8112333</text:p>
          </table:table-cell>
          <table:table-cell office:value-type="float" office:value="4.04779" calcext:value-type="float">
            <text:p>4,04779</text:p>
          </table:table-cell>
          <table:table-cell office:value-type="float" office:value="4.041444" calcext:value-type="float">
            <text:p>4,041444</text:p>
          </table:table-cell>
          <table:table-cell office:value-type="float" office:value="4.5767403" calcext:value-type="float">
            <text:p>4,5767403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033267" calcext:value-type="float">
            <text:p>3,5033267</text:p>
          </table:table-cell>
          <table:table-cell office:value-type="float" office:value="3.4724565" calcext:value-type="float">
            <text:p>3,4724565</text:p>
          </table:table-cell>
          <table:table-cell office:value-type="float" office:value="3.4601824" calcext:value-type="float">
            <text:p>3,4601824</text:p>
          </table:table-cell>
          <table:table-cell office:value-type="float" office:value="3.4520733" calcext:value-type="float">
            <text:p>3,4520733</text:p>
          </table:table-cell>
          <table:table-cell office:value-type="float" office:value="3.493507" calcext:value-type="float">
            <text:p>3,493507</text:p>
          </table:table-cell>
          <table:table-cell office:value-type="float" office:value="3.5231712" calcext:value-type="float">
            <text:p>3,5231712</text:p>
          </table:table-cell>
          <table:table-cell office:value-type="float" office:value="3.5872905" calcext:value-type="float">
            <text:p>3,5872905</text:p>
          </table:table-cell>
          <table:table-cell office:value-type="float" office:value="3.62102" calcext:value-type="float">
            <text:p>3,62102</text:p>
          </table:table-cell>
          <table:table-cell office:value-type="float" office:value="3.659144" calcext:value-type="float">
            <text:p>3,659144</text:p>
          </table:table-cell>
          <table:table-cell office:value-type="float" office:value="3.765791" calcext:value-type="float">
            <text:p>3,765791</text:p>
          </table:table-cell>
          <table:table-cell office:value-type="float" office:value="3.9653685" calcext:value-type="float">
            <text:p>3,9653685</text:p>
          </table:table-cell>
          <table:table-cell office:value-type="float" office:value="4.007456" calcext:value-type="float">
            <text:p>4,007456</text:p>
          </table:table-cell>
          <table:table-cell office:value-type="float" office:value="4.3769054" calcext:value-type="float">
            <text:p>4,3769054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008488" calcext:value-type="float">
            <text:p>3,5008488</text:p>
          </table:table-cell>
          <table:table-cell office:value-type="float" office:value="3.471335" calcext:value-type="float">
            <text:p>3,471335</text:p>
          </table:table-cell>
          <table:table-cell office:value-type="float" office:value="3.4571147" calcext:value-type="float">
            <text:p>3,4571147</text:p>
          </table:table-cell>
          <table:table-cell office:value-type="float" office:value="3.4593627" calcext:value-type="float">
            <text:p>3,4593627</text:p>
          </table:table-cell>
          <table:table-cell office:value-type="float" office:value="3.494569" calcext:value-type="float">
            <text:p>3,494569</text:p>
          </table:table-cell>
          <table:table-cell office:value-type="float" office:value="3.5246222" calcext:value-type="float">
            <text:p>3,5246222</text:p>
          </table:table-cell>
          <table:table-cell office:value-type="float" office:value="3.6025465" calcext:value-type="float">
            <text:p>3,6025465</text:p>
          </table:table-cell>
          <table:table-cell office:value-type="float" office:value="3.6263056" calcext:value-type="float">
            <text:p>3,6263056</text:p>
          </table:table-cell>
          <table:table-cell office:value-type="float" office:value="3.7358816" calcext:value-type="float">
            <text:p>3,7358816</text:p>
          </table:table-cell>
          <table:table-cell office:value-type="float" office:value="3.9298487" calcext:value-type="float">
            <text:p>3,9298487</text:p>
          </table:table-cell>
          <table:table-cell office:value-type="float" office:value="3.9190238" calcext:value-type="float">
            <text:p>3,9190238</text:p>
          </table:table-cell>
          <table:table-cell office:value-type="float" office:value="4.0954485" calcext:value-type="float">
            <text:p>4,0954485</text:p>
          </table:table-cell>
          <table:table-cell office:value-type="float" office:value="4.180665" calcext:value-type="float">
            <text:p>4,180665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014303" calcext:value-type="float">
            <text:p>3,5014303</text:p>
          </table:table-cell>
          <table:table-cell office:value-type="float" office:value="3.475108" calcext:value-type="float">
            <text:p>3,475108</text:p>
          </table:table-cell>
          <table:table-cell office:value-type="float" office:value="3.4537416" calcext:value-type="float">
            <text:p>3,4537416</text:p>
          </table:table-cell>
          <table:table-cell office:value-type="float" office:value="3.449502" calcext:value-type="float">
            <text:p>3,449502</text:p>
          </table:table-cell>
          <table:table-cell office:value-type="float" office:value="3.4972427" calcext:value-type="float">
            <text:p>3,4972427</text:p>
          </table:table-cell>
          <table:table-cell office:value-type="float" office:value="3.5136006" calcext:value-type="float">
            <text:p>3,5136006</text:p>
          </table:table-cell>
          <table:table-cell office:value-type="float" office:value="3.5999353" calcext:value-type="float">
            <text:p>3,5999353</text:p>
          </table:table-cell>
          <table:table-cell office:value-type="float" office:value="3.6277225" calcext:value-type="float">
            <text:p>3,6277225</text:p>
          </table:table-cell>
          <table:table-cell office:value-type="float" office:value="3.7034764" calcext:value-type="float">
            <text:p>3,7034764</text:p>
          </table:table-cell>
          <table:table-cell office:value-type="float" office:value="3.8100233" calcext:value-type="float">
            <text:p>3,8100233</text:p>
          </table:table-cell>
          <table:table-cell office:value-type="float" office:value="3.9420204" calcext:value-type="float">
            <text:p>3,9420204</text:p>
          </table:table-cell>
          <table:table-cell office:value-type="float" office:value="4.124472" calcext:value-type="float">
            <text:p>4,124472</text:p>
          </table:table-cell>
          <table:table-cell office:value-type="float" office:value="4.4296894" calcext:value-type="float">
            <text:p>4,4296894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004497" calcext:value-type="float">
            <text:p>3,5004497</text:p>
          </table:table-cell>
          <table:table-cell office:value-type="float" office:value="3.4718788" calcext:value-type="float">
            <text:p>3,4718788</text:p>
          </table:table-cell>
          <table:table-cell office:value-type="float" office:value="3.4594898" calcext:value-type="float">
            <text:p>3,4594898</text:p>
          </table:table-cell>
          <table:table-cell office:value-type="float" office:value="3.4553866" calcext:value-type="float">
            <text:p>3,4553866</text:p>
          </table:table-cell>
          <table:table-cell office:value-type="float" office:value="3.4975057" calcext:value-type="float">
            <text:p>3,4975057</text:p>
          </table:table-cell>
          <table:table-cell office:value-type="float" office:value="3.510461" calcext:value-type="float">
            <text:p>3,510461</text:p>
          </table:table-cell>
          <table:table-cell office:value-type="float" office:value="3.5814123" calcext:value-type="float">
            <text:p>3,5814123</text:p>
          </table:table-cell>
          <table:table-cell office:value-type="float" office:value="3.631947" calcext:value-type="float">
            <text:p>3,631947</text:p>
          </table:table-cell>
          <table:table-cell office:value-type="float" office:value="3.7310379" calcext:value-type="float">
            <text:p>3,7310379</text:p>
          </table:table-cell>
          <table:table-cell office:value-type="float" office:value="3.7324657" calcext:value-type="float">
            <text:p>3,7324657</text:p>
          </table:table-cell>
          <table:table-cell office:value-type="float" office:value="4.0079527" calcext:value-type="float">
            <text:p>4,0079527</text:p>
          </table:table-cell>
          <table:table-cell office:value-type="float" office:value="3.9831963" calcext:value-type="float">
            <text:p>3,9831963</text:p>
          </table:table-cell>
          <table:table-cell office:value-type="float" office:value="4.844936" calcext:value-type="float">
            <text:p>4,8449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5010073" calcext:value-type="float">
            <text:p>3,5010073</text:p>
          </table:table-cell>
          <table:table-cell office:value-type="float" office:value="3.478637" calcext:value-type="float">
            <text:p>3,478637</text:p>
          </table:table-cell>
          <table:table-cell office:value-type="float" office:value="3.4670293" calcext:value-type="float">
            <text:p>3,4670293</text:p>
          </table:table-cell>
          <table:table-cell office:value-type="float" office:value="3.459531" calcext:value-type="float">
            <text:p>3,459531</text:p>
          </table:table-cell>
          <table:table-cell office:value-type="float" office:value="3.5052664" calcext:value-type="float">
            <text:p>3,5052664</text:p>
          </table:table-cell>
          <table:table-cell office:value-type="float" office:value="3.5380907" calcext:value-type="float">
            <text:p>3,5380907</text:p>
          </table:table-cell>
          <table:table-cell office:value-type="float" office:value="3.602268" calcext:value-type="float">
            <text:p>3,602268</text:p>
          </table:table-cell>
          <table:table-cell office:value-type="float" office:value="3.6410677" calcext:value-type="float">
            <text:p>3,6410677</text:p>
          </table:table-cell>
          <table:table-cell office:value-type="float" office:value="3.7453299" calcext:value-type="float">
            <text:p>3,7453299</text:p>
          </table:table-cell>
          <table:table-cell office:value-type="float" office:value="3.9049819" calcext:value-type="float">
            <text:p>3,9049819</text:p>
          </table:table-cell>
          <table:table-cell office:value-type="float" office:value="3.932803" calcext:value-type="float">
            <text:p>3,932803</text:p>
          </table:table-cell>
          <table:table-cell office:value-type="float" office:value="4.01957" calcext:value-type="float">
            <text:p>4,01957</text:p>
          </table:table-cell>
          <table:table-cell office:value-type="float" office:value="4.3749466" calcext:value-type="float">
            <text:p>4,3749466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96207" calcext:value-type="float">
            <text:p>3,4996207</text:p>
          </table:table-cell>
          <table:table-cell office:value-type="float" office:value="3.4797683" calcext:value-type="float">
            <text:p>3,4797683</text:p>
          </table:table-cell>
          <table:table-cell office:value-type="float" office:value="3.4670107" calcext:value-type="float">
            <text:p>3,4670107</text:p>
          </table:table-cell>
          <table:table-cell office:value-type="float" office:value="3.4638848" calcext:value-type="float">
            <text:p>3,4638848</text:p>
          </table:table-cell>
          <table:table-cell office:value-type="float" office:value="3.5041304" calcext:value-type="float">
            <text:p>3,5041304</text:p>
          </table:table-cell>
          <table:table-cell office:value-type="float" office:value="3.5345745" calcext:value-type="float">
            <text:p>3,5345745</text:p>
          </table:table-cell>
          <table:table-cell office:value-type="float" office:value="3.6055856" calcext:value-type="float">
            <text:p>3,6055856</text:p>
          </table:table-cell>
          <table:table-cell office:value-type="float" office:value="3.6330523" calcext:value-type="float">
            <text:p>3,6330523</text:p>
          </table:table-cell>
          <table:table-cell office:value-type="float" office:value="3.7170987" calcext:value-type="float">
            <text:p>3,7170987</text:p>
          </table:table-cell>
          <table:table-cell office:value-type="float" office:value="3.8199887" calcext:value-type="float">
            <text:p>3,8199887</text:p>
          </table:table-cell>
          <table:table-cell office:value-type="float" office:value="4.056734" calcext:value-type="float">
            <text:p>4,056734</text:p>
          </table:table-cell>
          <table:table-cell office:value-type="float" office:value="4.053534" calcext:value-type="float">
            <text:p>4,053534</text:p>
          </table:table-cell>
          <table:table-cell office:value-type="float" office:value="4.5825753" calcext:value-type="float">
            <text:p>4,5825753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8963" calcext:value-type="float">
            <text:p>3,498963</text:p>
          </table:table-cell>
          <table:table-cell office:value-type="float" office:value="3.4763808" calcext:value-type="float">
            <text:p>3,4763808</text:p>
          </table:table-cell>
          <table:table-cell office:value-type="float" office:value="3.4665124" calcext:value-type="float">
            <text:p>3,4665124</text:p>
          </table:table-cell>
          <table:table-cell office:value-type="float" office:value="3.4593604" calcext:value-type="float">
            <text:p>3,4593604</text:p>
          </table:table-cell>
          <table:table-cell office:value-type="float" office:value="3.5022032" calcext:value-type="float">
            <text:p>3,5022032</text:p>
          </table:table-cell>
          <table:table-cell office:value-type="float" office:value="3.5327466" calcext:value-type="float">
            <text:p>3,5327466</text:p>
          </table:table-cell>
          <table:table-cell office:value-type="float" office:value="3.5973508" calcext:value-type="float">
            <text:p>3,5973508</text:p>
          </table:table-cell>
          <table:table-cell office:value-type="float" office:value="3.630844" calcext:value-type="float">
            <text:p>3,630844</text:p>
          </table:table-cell>
          <table:table-cell office:value-type="float" office:value="3.6689494" calcext:value-type="float">
            <text:p>3,6689494</text:p>
          </table:table-cell>
          <table:table-cell office:value-type="float" office:value="3.7746472" calcext:value-type="float">
            <text:p>3,7746472</text:p>
          </table:table-cell>
          <table:table-cell office:value-type="float" office:value="3.981105" calcext:value-type="float">
            <text:p>3,981105</text:p>
          </table:table-cell>
          <table:table-cell office:value-type="float" office:value="4.0238905" calcext:value-type="float">
            <text:p>4,0238905</text:p>
          </table:table-cell>
          <table:table-cell office:value-type="float" office:value="4.3892155" calcext:value-type="float">
            <text:p>4,3892155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71156" calcext:value-type="float">
            <text:p>3,4971156</text:p>
          </table:table-cell>
          <table:table-cell office:value-type="float" office:value="3.473687" calcext:value-type="float">
            <text:p>3,473687</text:p>
          </table:table-cell>
          <table:table-cell office:value-type="float" office:value="3.4626663" calcext:value-type="float">
            <text:p>3,4626663</text:p>
          </table:table-cell>
          <table:table-cell office:value-type="float" office:value="3.466495" calcext:value-type="float">
            <text:p>3,466495</text:p>
          </table:table-cell>
          <table:table-cell office:value-type="float" office:value="3.503763" calcext:value-type="float">
            <text:p>3,503763</text:p>
          </table:table-cell>
          <table:table-cell office:value-type="float" office:value="3.5343144" calcext:value-type="float">
            <text:p>3,5343144</text:p>
          </table:table-cell>
          <table:table-cell office:value-type="float" office:value="3.6123388" calcext:value-type="float">
            <text:p>3,6123388</text:p>
          </table:table-cell>
          <table:table-cell office:value-type="float" office:value="3.6350877" calcext:value-type="float">
            <text:p>3,6350877</text:p>
          </table:table-cell>
          <table:table-cell office:value-type="float" office:value="3.7466774" calcext:value-type="float">
            <text:p>3,7466774</text:p>
          </table:table-cell>
          <table:table-cell office:value-type="float" office:value="3.9428792" calcext:value-type="float">
            <text:p>3,9428792</text:p>
          </table:table-cell>
          <table:table-cell office:value-type="float" office:value="3.9342666" calcext:value-type="float">
            <text:p>3,9342666</text:p>
          </table:table-cell>
          <table:table-cell office:value-type="float" office:value="4.1120872" calcext:value-type="float">
            <text:p>4,1120872</text:p>
          </table:table-cell>
          <table:table-cell office:value-type="float" office:value="4.1905956" calcext:value-type="float">
            <text:p>4,1905956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72618" calcext:value-type="float">
            <text:p>3,4972618</text:p>
          </table:table-cell>
          <table:table-cell office:value-type="float" office:value="3.478111" calcext:value-type="float">
            <text:p>3,478111</text:p>
          </table:table-cell>
          <table:table-cell office:value-type="float" office:value="3.4585433" calcext:value-type="float">
            <text:p>3,4585433</text:p>
          </table:table-cell>
          <table:table-cell office:value-type="float" office:value="3.457121" calcext:value-type="float">
            <text:p>3,457121</text:p>
          </table:table-cell>
          <table:table-cell office:value-type="float" office:value="3.5062597" calcext:value-type="float">
            <text:p>3,5062597</text:p>
          </table:table-cell>
          <table:table-cell office:value-type="float" office:value="3.5246694" calcext:value-type="float">
            <text:p>3,5246694</text:p>
          </table:table-cell>
          <table:table-cell office:value-type="float" office:value="3.6091971" calcext:value-type="float">
            <text:p>3,6091971</text:p>
          </table:table-cell>
          <table:table-cell office:value-type="float" office:value="3.6364222" calcext:value-type="float">
            <text:p>3,6364222</text:p>
          </table:table-cell>
          <table:table-cell office:value-type="float" office:value="3.713874" calcext:value-type="float">
            <text:p>3,713874</text:p>
          </table:table-cell>
          <table:table-cell office:value-type="float" office:value="3.817555" calcext:value-type="float">
            <text:p>3,817555</text:p>
          </table:table-cell>
          <table:table-cell office:value-type="float" office:value="3.9537466" calcext:value-type="float">
            <text:p>3,9537466</text:p>
          </table:table-cell>
          <table:table-cell office:value-type="float" office:value="4.137023" calcext:value-type="float">
            <text:p>4,137023</text:p>
          </table:table-cell>
          <table:table-cell office:value-type="float" office:value="4.440999" calcext:value-type="float">
            <text:p>4,440999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59908" calcext:value-type="float">
            <text:p>3,4959908</text:p>
          </table:table-cell>
          <table:table-cell office:value-type="float" office:value="3.4750059" calcext:value-type="float">
            <text:p>3,4750059</text:p>
          </table:table-cell>
          <table:table-cell office:value-type="float" office:value="3.4652393" calcext:value-type="float">
            <text:p>3,4652393</text:p>
          </table:table-cell>
          <table:table-cell office:value-type="float" office:value="3.4627035" calcext:value-type="float">
            <text:p>3,4627035</text:p>
          </table:table-cell>
          <table:table-cell office:value-type="float" office:value="3.506687" calcext:value-type="float">
            <text:p>3,506687</text:p>
          </table:table-cell>
          <table:table-cell office:value-type="float" office:value="3.5192544" calcext:value-type="float">
            <text:p>3,5192544</text:p>
          </table:table-cell>
          <table:table-cell office:value-type="float" office:value="3.5905523" calcext:value-type="float">
            <text:p>3,5905523</text:p>
          </table:table-cell>
          <table:table-cell office:value-type="float" office:value="3.6427553" calcext:value-type="float">
            <text:p>3,6427553</text:p>
          </table:table-cell>
          <table:table-cell office:value-type="float" office:value="3.7421496" calcext:value-type="float">
            <text:p>3,7421496</text:p>
          </table:table-cell>
          <table:table-cell office:value-type="float" office:value="3.7427857" calcext:value-type="float">
            <text:p>3,7427857</text:p>
          </table:table-cell>
          <table:table-cell office:value-type="float" office:value="4.0170703" calcext:value-type="float">
            <text:p>4,0170703</text:p>
          </table:table-cell>
          <table:table-cell office:value-type="float" office:value="3.9951985" calcext:value-type="float">
            <text:p>3,9951985</text:p>
          </table:table-cell>
          <table:table-cell office:value-type="float" office:value="4.85034" calcext:value-type="float">
            <text:p>4,850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84608" calcext:value-type="float">
            <text:p>3,4984608</text:p>
          </table:table-cell>
          <table:table-cell office:value-type="float" office:value="3.4819436" calcext:value-type="float">
            <text:p>3,4819436</text:p>
          </table:table-cell>
          <table:table-cell office:value-type="float" office:value="3.4728835" calcext:value-type="float">
            <text:p>3,4728835</text:p>
          </table:table-cell>
          <table:table-cell office:value-type="float" office:value="3.4665937" calcext:value-type="float">
            <text:p>3,4665937</text:p>
          </table:table-cell>
          <table:table-cell office:value-type="float" office:value="3.5139875" calcext:value-type="float">
            <text:p>3,5139875</text:p>
          </table:table-cell>
          <table:table-cell office:value-type="float" office:value="3.5479124" calcext:value-type="float">
            <text:p>3,5479124</text:p>
          </table:table-cell>
          <table:table-cell office:value-type="float" office:value="3.6115198" calcext:value-type="float">
            <text:p>3,6115198</text:p>
          </table:table-cell>
          <table:table-cell office:value-type="float" office:value="3.650579" calcext:value-type="float">
            <text:p>3,650579</text:p>
          </table:table-cell>
          <table:table-cell office:value-type="float" office:value="3.7563372" calcext:value-type="float">
            <text:p>3,7563372</text:p>
          </table:table-cell>
          <table:table-cell office:value-type="float" office:value="3.9147289" calcext:value-type="float">
            <text:p>3,9147289</text:p>
          </table:table-cell>
          <table:table-cell office:value-type="float" office:value="3.9433682" calcext:value-type="float">
            <text:p>3,9433682</text:p>
          </table:table-cell>
          <table:table-cell office:value-type="float" office:value="4.0316286" calcext:value-type="float">
            <text:p>4,0316286</text:p>
          </table:table-cell>
          <table:table-cell office:value-type="float" office:value="4.385874" calcext:value-type="float">
            <text:p>4,385874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7543" calcext:value-type="float">
            <text:p>3,497543</text:p>
          </table:table-cell>
          <table:table-cell office:value-type="float" office:value="3.4836116" calcext:value-type="float">
            <text:p>3,4836116</text:p>
          </table:table-cell>
          <table:table-cell office:value-type="float" office:value="3.4733279" calcext:value-type="float">
            <text:p>3,4733279</text:p>
          </table:table-cell>
          <table:table-cell office:value-type="float" office:value="3.471296" calcext:value-type="float">
            <text:p>3,471296</text:p>
          </table:table-cell>
          <table:table-cell office:value-type="float" office:value="3.513205" calcext:value-type="float">
            <text:p>3,513205</text:p>
          </table:table-cell>
          <table:table-cell office:value-type="float" office:value="3.5440562" calcext:value-type="float">
            <text:p>3,5440562</text:p>
          </table:table-cell>
          <table:table-cell office:value-type="float" office:value="3.6141403" calcext:value-type="float">
            <text:p>3,6141403</text:p>
          </table:table-cell>
          <table:table-cell office:value-type="float" office:value="3.6417534" calcext:value-type="float">
            <text:p>3,6417534</text:p>
          </table:table-cell>
          <table:table-cell office:value-type="float" office:value="3.7269673" calcext:value-type="float">
            <text:p>3,7269673</text:p>
          </table:table-cell>
          <table:table-cell office:value-type="float" office:value="3.8287628" calcext:value-type="float">
            <text:p>3,8287628</text:p>
          </table:table-cell>
          <table:table-cell office:value-type="float" office:value="4.065832" calcext:value-type="float">
            <text:p>4,065832</text:p>
          </table:table-cell>
          <table:table-cell office:value-type="float" office:value="4.065137" calcext:value-type="float">
            <text:p>4,065137</text:p>
          </table:table-cell>
          <table:table-cell office:value-type="float" office:value="4.589984" calcext:value-type="float">
            <text:p>4,589984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66416" calcext:value-type="float">
            <text:p>3,4966416</text:p>
          </table:table-cell>
          <table:table-cell office:value-type="float" office:value="3.4807372" calcext:value-type="float">
            <text:p>3,4807372</text:p>
          </table:table-cell>
          <table:table-cell office:value-type="float" office:value="3.472145" calcext:value-type="float">
            <text:p>3,472145</text:p>
          </table:table-cell>
          <table:table-cell office:value-type="float" office:value="3.466381" calcext:value-type="float">
            <text:p>3,466381</text:p>
          </table:table-cell>
          <table:table-cell office:value-type="float" office:value="3.5107746" calcext:value-type="float">
            <text:p>3,5107746</text:p>
          </table:table-cell>
          <table:table-cell office:value-type="float" office:value="3.5418274" calcext:value-type="float">
            <text:p>3,5418274</text:p>
          </table:table-cell>
          <table:table-cell office:value-type="float" office:value="3.606608" calcext:value-type="float">
            <text:p>3,606608</text:p>
          </table:table-cell>
          <table:table-cell office:value-type="float" office:value="3.6405356" calcext:value-type="float">
            <text:p>3,6405356</text:p>
          </table:table-cell>
          <table:table-cell office:value-type="float" office:value="3.6787739" calcext:value-type="float">
            <text:p>3,6787739</text:p>
          </table:table-cell>
          <table:table-cell office:value-type="float" office:value="3.7835457" calcext:value-type="float">
            <text:p>3,7835457</text:p>
          </table:table-cell>
          <table:table-cell office:value-type="float" office:value="3.9952185" calcext:value-type="float">
            <text:p>3,9952185</text:p>
          </table:table-cell>
          <table:table-cell office:value-type="float" office:value="4.038657" calcext:value-type="float">
            <text:p>4,038657</text:p>
          </table:table-cell>
          <table:table-cell office:value-type="float" office:value="4.4006786" calcext:value-type="float">
            <text:p>4,4006786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47677" calcext:value-type="float">
            <text:p>3,4947677</text:p>
          </table:table-cell>
          <table:table-cell office:value-type="float" office:value="3.4767396" calcext:value-type="float">
            <text:p>3,4767396</text:p>
          </table:table-cell>
          <table:table-cell office:value-type="float" office:value="3.4688995" calcext:value-type="float">
            <text:p>3,4688995</text:p>
          </table:table-cell>
          <table:table-cell office:value-type="float" office:value="3.4734836" calcext:value-type="float">
            <text:p>3,4734836</text:p>
          </table:table-cell>
          <table:table-cell office:value-type="float" office:value="3.5119727" calcext:value-type="float">
            <text:p>3,5119727</text:p>
          </table:table-cell>
          <table:table-cell office:value-type="float" office:value="3.544043" calcext:value-type="float">
            <text:p>3,544043</text:p>
          </table:table-cell>
          <table:table-cell office:value-type="float" office:value="3.6220815" calcext:value-type="float">
            <text:p>3,6220815</text:p>
          </table:table-cell>
          <table:table-cell office:value-type="float" office:value="3.6439548" calcext:value-type="float">
            <text:p>3,6439548</text:p>
          </table:table-cell>
          <table:table-cell office:value-type="float" office:value="3.756625" calcext:value-type="float">
            <text:p>3,756625</text:p>
          </table:table-cell>
          <table:table-cell office:value-type="float" office:value="3.9541118" calcext:value-type="float">
            <text:p>3,9541118</text:p>
          </table:table-cell>
          <table:table-cell office:value-type="float" office:value="3.9477108" calcext:value-type="float">
            <text:p>3,9477108</text:p>
          </table:table-cell>
          <table:table-cell office:value-type="float" office:value="4.127049" calcext:value-type="float">
            <text:p>4,127049</text:p>
          </table:table-cell>
          <table:table-cell office:value-type="float" office:value="4.199781" calcext:value-type="float">
            <text:p>4,199781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4695" calcext:value-type="float">
            <text:p>3,494695</text:p>
          </table:table-cell>
          <table:table-cell office:value-type="float" office:value="3.4820855" calcext:value-type="float">
            <text:p>3,4820855</text:p>
          </table:table-cell>
          <table:table-cell office:value-type="float" office:value="3.4651585" calcext:value-type="float">
            <text:p>3,4651585</text:p>
          </table:table-cell>
          <table:table-cell office:value-type="float" office:value="3.4638698" calcext:value-type="float">
            <text:p>3,4638698</text:p>
          </table:table-cell>
          <table:table-cell office:value-type="float" office:value="3.5153403" calcext:value-type="float">
            <text:p>3,5153403</text:p>
          </table:table-cell>
          <table:table-cell office:value-type="float" office:value="3.5347056" calcext:value-type="float">
            <text:p>3,5347056</text:p>
          </table:table-cell>
          <table:table-cell office:value-type="float" office:value="3.6186638" calcext:value-type="float">
            <text:p>3,6186638</text:p>
          </table:table-cell>
          <table:table-cell office:value-type="float" office:value="3.645209" calcext:value-type="float">
            <text:p>3,645209</text:p>
          </table:table-cell>
          <table:table-cell office:value-type="float" office:value="3.7243042" calcext:value-type="float">
            <text:p>3,7243042</text:p>
          </table:table-cell>
          <table:table-cell office:value-type="float" office:value="3.8255181" calcext:value-type="float">
            <text:p>3,8255181</text:p>
          </table:table-cell>
          <table:table-cell office:value-type="float" office:value="3.9645677" calcext:value-type="float">
            <text:p>3,9645677</text:p>
          </table:table-cell>
          <table:table-cell office:value-type="float" office:value="4.149372" calcext:value-type="float">
            <text:p>4,149372</text:p>
          </table:table-cell>
          <table:table-cell office:value-type="float" office:value="4.4516215" calcext:value-type="float">
            <text:p>4,4516215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41094" calcext:value-type="float">
            <text:p>3,4941094</text:p>
          </table:table-cell>
          <table:table-cell office:value-type="float" office:value="3.4787776" calcext:value-type="float">
            <text:p>3,4787776</text:p>
          </table:table-cell>
          <table:table-cell office:value-type="float" office:value="3.4694338" calcext:value-type="float">
            <text:p>3,4694338</text:p>
          </table:table-cell>
          <table:table-cell office:value-type="float" office:value="3.4694188" calcext:value-type="float">
            <text:p>3,4694188</text:p>
          </table:table-cell>
          <table:table-cell office:value-type="float" office:value="3.515289" calcext:value-type="float">
            <text:p>3,515289</text:p>
          </table:table-cell>
          <table:table-cell office:value-type="float" office:value="3.528164" calcext:value-type="float">
            <text:p>3,528164</text:p>
          </table:table-cell>
          <table:table-cell office:value-type="float" office:value="3.599825" calcext:value-type="float">
            <text:p>3,599825</text:p>
          </table:table-cell>
          <table:table-cell office:value-type="float" office:value="3.653206" calcext:value-type="float">
            <text:p>3,653206</text:p>
          </table:table-cell>
          <table:table-cell office:value-type="float" office:value="3.7527192" calcext:value-type="float">
            <text:p>3,7527192</text:p>
          </table:table-cell>
          <table:table-cell office:value-type="float" office:value="3.752416" calcext:value-type="float">
            <text:p>3,752416</text:p>
          </table:table-cell>
          <table:table-cell office:value-type="float" office:value="4.025769" calcext:value-type="float">
            <text:p>4,025769</text:p>
          </table:table-cell>
          <table:table-cell office:value-type="float" office:value="4.0058184" calcext:value-type="float">
            <text:p>4,0058184</text:p>
          </table:table-cell>
          <table:table-cell office:value-type="float" office:value="4.857847" calcext:value-type="float">
            <text:p>4,8578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71905" calcext:value-type="float">
            <text:p>3,4971905</text:p>
          </table:table-cell>
          <table:table-cell office:value-type="float" office:value="3.4854946" calcext:value-type="float">
            <text:p>3,4854946</text:p>
          </table:table-cell>
          <table:table-cell office:value-type="float" office:value="3.4791887" calcext:value-type="float">
            <text:p>3,4791887</text:p>
          </table:table-cell>
          <table:table-cell office:value-type="float" office:value="3.4735692" calcext:value-type="float">
            <text:p>3,4735692</text:p>
          </table:table-cell>
          <table:table-cell office:value-type="float" office:value="3.5220518" calcext:value-type="float">
            <text:p>3,5220518</text:p>
          </table:table-cell>
          <table:table-cell office:value-type="float" office:value="3.556652" calcext:value-type="float">
            <text:p>3,556652</text:p>
          </table:table-cell>
          <table:table-cell office:value-type="float" office:value="3.6201847" calcext:value-type="float">
            <text:p>3,6201847</text:p>
          </table:table-cell>
          <table:table-cell office:value-type="float" office:value="3.6598096" calcext:value-type="float">
            <text:p>3,6598096</text:p>
          </table:table-cell>
          <table:table-cell office:value-type="float" office:value="3.766538" calcext:value-type="float">
            <text:p>3,766538</text:p>
          </table:table-cell>
          <table:table-cell office:value-type="float" office:value="3.9236152" calcext:value-type="float">
            <text:p>3,9236152</text:p>
          </table:table-cell>
          <table:table-cell office:value-type="float" office:value="3.9533832" calcext:value-type="float">
            <text:p>3,9533832</text:p>
          </table:table-cell>
          <table:table-cell office:value-type="float" office:value="4.042955" calcext:value-type="float">
            <text:p>4,042955</text:p>
          </table:table-cell>
          <table:table-cell office:value-type="float" office:value="4.396343" calcext:value-type="float">
            <text:p>4,396343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6176" calcext:value-type="float">
            <text:p>3,496176</text:p>
          </table:table-cell>
          <table:table-cell office:value-type="float" office:value="3.4869132" calcext:value-type="float">
            <text:p>3,4869132</text:p>
          </table:table-cell>
          <table:table-cell office:value-type="float" office:value="3.4793541" calcext:value-type="float">
            <text:p>3,4793541</text:p>
          </table:table-cell>
          <table:table-cell office:value-type="float" office:value="3.477987" calcext:value-type="float">
            <text:p>3,477987</text:p>
          </table:table-cell>
          <table:table-cell office:value-type="float" office:value="3.5216205" calcext:value-type="float">
            <text:p>3,5216205</text:p>
          </table:table-cell>
          <table:table-cell office:value-type="float" office:value="3.5534213" calcext:value-type="float">
            <text:p>3,5534213</text:p>
          </table:table-cell>
          <table:table-cell office:value-type="float" office:value="3.6225498" calcext:value-type="float">
            <text:p>3,6225498</text:p>
          </table:table-cell>
          <table:table-cell office:value-type="float" office:value="3.6504052" calcext:value-type="float">
            <text:p>3,6504052</text:p>
          </table:table-cell>
          <table:table-cell office:value-type="float" office:value="3.7364964" calcext:value-type="float">
            <text:p>3,7364964</text:p>
          </table:table-cell>
          <table:table-cell office:value-type="float" office:value="3.8371446" calcext:value-type="float">
            <text:p>3,8371446</text:p>
          </table:table-cell>
          <table:table-cell office:value-type="float" office:value="4.074648" calcext:value-type="float">
            <text:p>4,074648</text:p>
          </table:table-cell>
          <table:table-cell office:value-type="float" office:value="4.0761294" calcext:value-type="float">
            <text:p>4,0761294</text:p>
          </table:table-cell>
          <table:table-cell office:value-type="float" office:value="4.598206" calcext:value-type="float">
            <text:p>4,598206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4891" calcext:value-type="float">
            <text:p>3,494891</text:p>
          </table:table-cell>
          <table:table-cell office:value-type="float" office:value="3.484321" calcext:value-type="float">
            <text:p>3,484321</text:p>
          </table:table-cell>
          <table:table-cell office:value-type="float" office:value="3.478538" calcext:value-type="float">
            <text:p>3,478538</text:p>
          </table:table-cell>
          <table:table-cell office:value-type="float" office:value="3.4728215" calcext:value-type="float">
            <text:p>3,4728215</text:p>
          </table:table-cell>
          <table:table-cell office:value-type="float" office:value="3.5190465" calcext:value-type="float">
            <text:p>3,5190465</text:p>
          </table:table-cell>
          <table:table-cell office:value-type="float" office:value="3.5504484" calcext:value-type="float">
            <text:p>3,5504484</text:p>
          </table:table-cell>
          <table:table-cell office:value-type="float" office:value="3.6150503" calcext:value-type="float">
            <text:p>3,6150503</text:p>
          </table:table-cell>
          <table:table-cell office:value-type="float" office:value="3.6499627" calcext:value-type="float">
            <text:p>3,6499627</text:p>
          </table:table-cell>
          <table:table-cell office:value-type="float" office:value="3.6878808" calcext:value-type="float">
            <text:p>3,6878808</text:p>
          </table:table-cell>
          <table:table-cell office:value-type="float" office:value="3.7922788" calcext:value-type="float">
            <text:p>3,7922788</text:p>
          </table:table-cell>
          <table:table-cell office:value-type="float" office:value="4.008541" calcext:value-type="float">
            <text:p>4,008541</text:p>
          </table:table-cell>
          <table:table-cell office:value-type="float" office:value="4.0521674" calcext:value-type="float">
            <text:p>4,0521674</text:p>
          </table:table-cell>
          <table:table-cell office:value-type="float" office:value="4.410911" calcext:value-type="float">
            <text:p>4,410911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32973" calcext:value-type="float">
            <text:p>3,4932973</text:p>
          </table:table-cell>
          <table:table-cell office:value-type="float" office:value="3.4807456" calcext:value-type="float">
            <text:p>3,4807456</text:p>
          </table:table-cell>
          <table:table-cell office:value-type="float" office:value="3.4753008" calcext:value-type="float">
            <text:p>3,4753008</text:p>
          </table:table-cell>
          <table:table-cell office:value-type="float" office:value="3.4807732" calcext:value-type="float">
            <text:p>3,4807732</text:p>
          </table:table-cell>
          <table:table-cell office:value-type="float" office:value="3.5207672" calcext:value-type="float">
            <text:p>3,5207672</text:p>
          </table:table-cell>
          <table:table-cell office:value-type="float" office:value="3.5532773" calcext:value-type="float">
            <text:p>3,5532773</text:p>
          </table:table-cell>
          <table:table-cell office:value-type="float" office:value="3.6315923" calcext:value-type="float">
            <text:p>3,6315923</text:p>
          </table:table-cell>
          <table:table-cell office:value-type="float" office:value="3.6527808" calcext:value-type="float">
            <text:p>3,6527808</text:p>
          </table:table-cell>
          <table:table-cell office:value-type="float" office:value="3.7655458" calcext:value-type="float">
            <text:p>3,7655458</text:p>
          </table:table-cell>
          <table:table-cell office:value-type="float" office:value="3.9644175" calcext:value-type="float">
            <text:p>3,9644175</text:p>
          </table:table-cell>
          <table:table-cell office:value-type="float" office:value="3.9600723" calcext:value-type="float">
            <text:p>3,9600723</text:p>
          </table:table-cell>
          <table:table-cell office:value-type="float" office:value="4.1410437" calcext:value-type="float">
            <text:p>4,1410437</text:p>
          </table:table-cell>
          <table:table-cell office:value-type="float" office:value="4.2087393" calcext:value-type="float">
            <text:p>4,2087393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3022" calcext:value-type="float">
            <text:p>3,493022</text:p>
          </table:table-cell>
          <table:table-cell office:value-type="float" office:value="3.4855485" calcext:value-type="float">
            <text:p>3,4855485</text:p>
          </table:table-cell>
          <table:table-cell office:value-type="float" office:value="3.4712875" calcext:value-type="float">
            <text:p>3,4712875</text:p>
          </table:table-cell>
          <table:table-cell office:value-type="float" office:value="3.4707274" calcext:value-type="float">
            <text:p>3,4707274</text:p>
          </table:table-cell>
          <table:table-cell office:value-type="float" office:value="3.5240192" calcext:value-type="float">
            <text:p>3,5240192</text:p>
          </table:table-cell>
          <table:table-cell office:value-type="float" office:value="3.5443146" calcext:value-type="float">
            <text:p>3,5443146</text:p>
          </table:table-cell>
          <table:table-cell office:value-type="float" office:value="3.6272118" calcext:value-type="float">
            <text:p>3,6272118</text:p>
          </table:table-cell>
          <table:table-cell office:value-type="float" office:value="3.653656" calcext:value-type="float">
            <text:p>3,653656</text:p>
          </table:table-cell>
          <table:table-cell office:value-type="float" office:value="3.7340546" calcext:value-type="float">
            <text:p>3,7340546</text:p>
          </table:table-cell>
          <table:table-cell office:value-type="float" office:value="3.8325043" calcext:value-type="float">
            <text:p>3,8325043</text:p>
          </table:table-cell>
          <table:table-cell office:value-type="float" office:value="3.9745443" calcext:value-type="float">
            <text:p>3,9745443</text:p>
          </table:table-cell>
          <table:table-cell office:value-type="float" office:value="4.161032" calcext:value-type="float">
            <text:p>4,161032</text:p>
          </table:table-cell>
          <table:table-cell office:value-type="float" office:value="4.46158" calcext:value-type="float">
            <text:p>4,46158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3777" calcext:value-type="float">
            <text:p>3,493777</text:p>
          </table:table-cell>
          <table:table-cell office:value-type="float" office:value="3.4825919" calcext:value-type="float">
            <text:p>3,4825919</text:p>
          </table:table-cell>
          <table:table-cell office:value-type="float" office:value="3.4751968" calcext:value-type="float">
            <text:p>3,4751968</text:p>
          </table:table-cell>
          <table:table-cell office:value-type="float" office:value="3.476821" calcext:value-type="float">
            <text:p>3,476821</text:p>
          </table:table-cell>
          <table:table-cell office:value-type="float" office:value="3.5242584" calcext:value-type="float">
            <text:p>3,5242584</text:p>
          </table:table-cell>
          <table:table-cell office:value-type="float" office:value="3.5379138" calcext:value-type="float">
            <text:p>3,5379138</text:p>
          </table:table-cell>
          <table:table-cell office:value-type="float" office:value="3.6093795" calcext:value-type="float">
            <text:p>3,6093795</text:p>
          </table:table-cell>
          <table:table-cell office:value-type="float" office:value="3.6638288" calcext:value-type="float">
            <text:p>3,6638288</text:p>
          </table:table-cell>
          <table:table-cell office:value-type="float" office:value="3.7618024" calcext:value-type="float">
            <text:p>3,7618024</text:p>
          </table:table-cell>
          <table:table-cell office:value-type="float" office:value="3.7617755" calcext:value-type="float">
            <text:p>3,7617755</text:p>
          </table:table-cell>
          <table:table-cell office:value-type="float" office:value="4.0338902" calcext:value-type="float">
            <text:p>4,0338902</text:p>
          </table:table-cell>
          <table:table-cell office:value-type="float" office:value="4.015755" calcext:value-type="float">
            <text:p>4,015755</text:p>
          </table:table-cell>
          <table:table-cell office:value-type="float" office:value="4.865855" calcext:value-type="float">
            <text:p>4,8658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68438" calcext:value-type="float">
            <text:p>3,4968438</text:p>
          </table:table-cell>
          <table:table-cell office:value-type="float" office:value="3.489133" calcext:value-type="float">
            <text:p>3,489133</text:p>
          </table:table-cell>
          <table:table-cell office:value-type="float" office:value="3.485352" calcext:value-type="float">
            <text:p>3,485352</text:p>
          </table:table-cell>
          <table:table-cell office:value-type="float" office:value="3.4802961" calcext:value-type="float">
            <text:p>3,4802961</text:p>
          </table:table-cell>
          <table:table-cell office:value-type="float" office:value="3.5298922" calcext:value-type="float">
            <text:p>3,5298922</text:p>
          </table:table-cell>
          <table:table-cell office:value-type="float" office:value="3.5651276" calcext:value-type="float">
            <text:p>3,5651276</text:p>
          </table:table-cell>
          <table:table-cell office:value-type="float" office:value="3.628529" calcext:value-type="float">
            <text:p>3,628529</text:p>
          </table:table-cell>
          <table:table-cell office:value-type="float" office:value="3.6686277" calcext:value-type="float">
            <text:p>3,6686277</text:p>
          </table:table-cell>
          <table:table-cell office:value-type="float" office:value="3.776218" calcext:value-type="float">
            <text:p>3,776218</text:p>
          </table:table-cell>
          <table:table-cell office:value-type="float" office:value="3.9318657" calcext:value-type="float">
            <text:p>3,9318657</text:p>
          </table:table-cell>
          <table:table-cell office:value-type="float" office:value="3.9625225" calcext:value-type="float">
            <text:p>3,9625225</text:p>
          </table:table-cell>
          <table:table-cell office:value-type="float" office:value="4.0534797" calcext:value-type="float">
            <text:p>4,0534797</text:p>
          </table:table-cell>
          <table:table-cell office:value-type="float" office:value="4.4063144" calcext:value-type="float">
            <text:p>4,4063144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5867" calcext:value-type="float">
            <text:p>3,495867</text:p>
          </table:table-cell>
          <table:table-cell office:value-type="float" office:value="3.4911675" calcext:value-type="float">
            <text:p>3,4911675</text:p>
          </table:table-cell>
          <table:table-cell office:value-type="float" office:value="3.48516" calcext:value-type="float">
            <text:p>3,48516</text:p>
          </table:table-cell>
          <table:table-cell office:value-type="float" office:value="3.4846144" calcext:value-type="float">
            <text:p>3,4846144</text:p>
          </table:table-cell>
          <table:table-cell office:value-type="float" office:value="3.5296175" calcext:value-type="float">
            <text:p>3,5296175</text:p>
          </table:table-cell>
          <table:table-cell office:value-type="float" office:value="3.5621243" calcext:value-type="float">
            <text:p>3,5621243</text:p>
          </table:table-cell>
          <table:table-cell office:value-type="float" office:value="3.630834" calcext:value-type="float">
            <text:p>3,630834</text:p>
          </table:table-cell>
          <table:table-cell office:value-type="float" office:value="3.6588588" calcext:value-type="float">
            <text:p>3,6588588</text:p>
          </table:table-cell>
          <table:table-cell office:value-type="float" office:value="3.745479" calcext:value-type="float">
            <text:p>3,745479</text:p>
          </table:table-cell>
          <table:table-cell office:value-type="float" office:value="3.8453808" calcext:value-type="float">
            <text:p>3,8453808</text:p>
          </table:table-cell>
          <table:table-cell office:value-type="float" office:value="4.0830197" calcext:value-type="float">
            <text:p>4,0830197</text:p>
          </table:table-cell>
          <table:table-cell office:value-type="float" office:value="4.0863214" calcext:value-type="float">
            <text:p>4,0863214</text:p>
          </table:table-cell>
          <table:table-cell office:value-type="float" office:value="4.6064873" calcext:value-type="float">
            <text:p>4,6064873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44315" calcext:value-type="float">
            <text:p>3,4944315</text:p>
          </table:table-cell>
          <table:table-cell office:value-type="float" office:value="3.4885592" calcext:value-type="float">
            <text:p>3,4885592</text:p>
          </table:table-cell>
          <table:table-cell office:value-type="float" office:value="3.4838722" calcext:value-type="float">
            <text:p>3,4838722</text:p>
          </table:table-cell>
          <table:table-cell office:value-type="float" office:value="3.4794784" calcext:value-type="float">
            <text:p>3,4794784</text:p>
          </table:table-cell>
          <table:table-cell office:value-type="float" office:value="3.5270476" calcext:value-type="float">
            <text:p>3,5270476</text:p>
          </table:table-cell>
          <table:table-cell office:value-type="float" office:value="3.5591056" calcext:value-type="float">
            <text:p>3,5591056</text:p>
          </table:table-cell>
          <table:table-cell office:value-type="float" office:value="3.623471" calcext:value-type="float">
            <text:p>3,623471</text:p>
          </table:table-cell>
          <table:table-cell office:value-type="float" office:value="3.6589112" calcext:value-type="float">
            <text:p>3,6589112</text:p>
          </table:table-cell>
          <table:table-cell office:value-type="float" office:value="3.6966157" calcext:value-type="float">
            <text:p>3,6966157</text:p>
          </table:table-cell>
          <table:table-cell office:value-type="float" office:value="3.8009293" calcext:value-type="float">
            <text:p>3,8009293</text:p>
          </table:table-cell>
          <table:table-cell office:value-type="float" office:value="4.020324" calcext:value-type="float">
            <text:p>4,020324</text:p>
          </table:table-cell>
          <table:table-cell office:value-type="float" office:value="4.0647225" calcext:value-type="float">
            <text:p>4,0647225</text:p>
          </table:table-cell>
          <table:table-cell office:value-type="float" office:value="4.420996" calcext:value-type="float">
            <text:p>4,420996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273" calcext:value-type="float">
            <text:p>3,49273</text:p>
          </table:table-cell>
          <table:table-cell office:value-type="float" office:value="3.4849882" calcext:value-type="float">
            <text:p>3,4849882</text:p>
          </table:table-cell>
          <table:table-cell office:value-type="float" office:value="3.480515" calcext:value-type="float">
            <text:p>3,480515</text:p>
          </table:table-cell>
          <table:table-cell office:value-type="float" office:value="3.4871001" calcext:value-type="float">
            <text:p>3,4871001</text:p>
          </table:table-cell>
          <table:table-cell office:value-type="float" office:value="3.5284343" calcext:value-type="float">
            <text:p>3,5284343</text:p>
          </table:table-cell>
          <table:table-cell office:value-type="float" office:value="3.5617268" calcext:value-type="float">
            <text:p>3,5617268</text:p>
          </table:table-cell>
          <table:table-cell office:value-type="float" office:value="3.6401894" calcext:value-type="float">
            <text:p>3,6401894</text:p>
          </table:table-cell>
          <table:table-cell office:value-type="float" office:value="3.6613243" calcext:value-type="float">
            <text:p>3,6613243</text:p>
          </table:table-cell>
          <table:table-cell office:value-type="float" office:value="3.7735693" calcext:value-type="float">
            <text:p>3,7735693</text:p>
          </table:table-cell>
          <table:table-cell office:value-type="float" office:value="3.9744017" calcext:value-type="float">
            <text:p>3,9744017</text:p>
          </table:table-cell>
          <table:table-cell office:value-type="float" office:value="3.971565" calcext:value-type="float">
            <text:p>3,971565</text:p>
          </table:table-cell>
          <table:table-cell office:value-type="float" office:value="4.1539235" calcext:value-type="float">
            <text:p>4,1539235</text:p>
          </table:table-cell>
          <table:table-cell office:value-type="float" office:value="4.2173166" calcext:value-type="float">
            <text:p>4,2173166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24226" calcext:value-type="float">
            <text:p>3,4924226</text:p>
          </table:table-cell>
          <table:table-cell office:value-type="float" office:value="3.4897704" calcext:value-type="float">
            <text:p>3,4897704</text:p>
          </table:table-cell>
          <table:table-cell office:value-type="float" office:value="3.4775934" calcext:value-type="float">
            <text:p>3,4775934</text:p>
          </table:table-cell>
          <table:table-cell office:value-type="float" office:value="3.4770677" calcext:value-type="float">
            <text:p>3,4770677</text:p>
          </table:table-cell>
          <table:table-cell office:value-type="float" office:value="3.5315132" calcext:value-type="float">
            <text:p>3,5315132</text:p>
          </table:table-cell>
          <table:table-cell office:value-type="float" office:value="3.5541205" calcext:value-type="float">
            <text:p>3,5541205</text:p>
          </table:table-cell>
          <table:table-cell office:value-type="float" office:value="3.6355283" calcext:value-type="float">
            <text:p>3,6355283</text:p>
          </table:table-cell>
          <table:table-cell office:value-type="float" office:value="3.6627088" calcext:value-type="float">
            <text:p>3,6627088</text:p>
          </table:table-cell>
          <table:table-cell office:value-type="float" office:value="3.7430294" calcext:value-type="float">
            <text:p>3,7430294</text:p>
          </table:table-cell>
          <table:table-cell office:value-type="float" office:value="3.83947" calcext:value-type="float">
            <text:p>3,83947</text:p>
          </table:table-cell>
          <table:table-cell office:value-type="float" office:value="3.9839244" calcext:value-type="float">
            <text:p>3,9839244</text:p>
          </table:table-cell>
          <table:table-cell office:value-type="float" office:value="4.171686" calcext:value-type="float">
            <text:p>4,171686</text:p>
          </table:table-cell>
          <table:table-cell office:value-type="float" office:value="4.4709024" calcext:value-type="float">
            <text:p>4,4709024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2679" calcext:value-type="float">
            <text:p>3,492679</text:p>
          </table:table-cell>
          <table:table-cell office:value-type="float" office:value="3.4863837" calcext:value-type="float">
            <text:p>3,4863837</text:p>
          </table:table-cell>
          <table:table-cell office:value-type="float" office:value="3.480376" calcext:value-type="float">
            <text:p>3,480376</text:p>
          </table:table-cell>
          <table:table-cell office:value-type="float" office:value="3.4826772" calcext:value-type="float">
            <text:p>3,4826772</text:p>
          </table:table-cell>
          <table:table-cell office:value-type="float" office:value="3.5317657" calcext:value-type="float">
            <text:p>3,5317657</text:p>
          </table:table-cell>
          <table:table-cell office:value-type="float" office:value="3.5463333" calcext:value-type="float">
            <text:p>3,5463333</text:p>
          </table:table-cell>
          <table:table-cell office:value-type="float" office:value="3.618359" calcext:value-type="float">
            <text:p>3,618359</text:p>
          </table:table-cell>
          <table:table-cell office:value-type="float" office:value="3.6729834" calcext:value-type="float">
            <text:p>3,6729834</text:p>
          </table:table-cell>
          <table:table-cell office:value-type="float" office:value="3.7711277" calcext:value-type="float">
            <text:p>3,7711277</text:p>
          </table:table-cell>
          <table:table-cell office:value-type="float" office:value="3.77028" calcext:value-type="float">
            <text:p>3,77028</text:p>
          </table:table-cell>
          <table:table-cell office:value-type="float" office:value="4.042204" calcext:value-type="float">
            <text:p>4,042204</text:p>
          </table:table-cell>
          <table:table-cell office:value-type="float" office:value="4.0251436" calcext:value-type="float">
            <text:p>4,0251436</text:p>
          </table:table-cell>
          <table:table-cell office:value-type="float" office:value="4.8735423" calcext:value-type="float">
            <text:p>4,87354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67246" calcext:value-type="float">
            <text:p>3,4967246</text:p>
          </table:table-cell>
          <table:table-cell office:value-type="float" office:value="3.4937444" calcext:value-type="float">
            <text:p>3,4937444</text:p>
          </table:table-cell>
          <table:table-cell office:value-type="float" office:value="3.490953" calcext:value-type="float">
            <text:p>3,490953</text:p>
          </table:table-cell>
          <table:table-cell office:value-type="float" office:value="3.4870183" calcext:value-type="float">
            <text:p>3,4870183</text:p>
          </table:table-cell>
          <table:table-cell office:value-type="float" office:value="3.537619" calcext:value-type="float">
            <text:p>3,537619</text:p>
          </table:table-cell>
          <table:table-cell office:value-type="float" office:value="3.5732908" calcext:value-type="float">
            <text:p>3,5732908</text:p>
          </table:table-cell>
          <table:table-cell office:value-type="float" office:value="3.636392" calcext:value-type="float">
            <text:p>3,636392</text:p>
          </table:table-cell>
          <table:table-cell office:value-type="float" office:value="3.677254" calcext:value-type="float">
            <text:p>3,677254</text:p>
          </table:table-cell>
          <table:table-cell office:value-type="float" office:value="3.7855616" calcext:value-type="float">
            <text:p>3,7855616</text:p>
          </table:table-cell>
          <table:table-cell office:value-type="float" office:value="3.9395733" calcext:value-type="float">
            <text:p>3,9395733</text:p>
          </table:table-cell>
          <table:table-cell office:value-type="float" office:value="3.9710777" calcext:value-type="float">
            <text:p>3,9710777</text:p>
          </table:table-cell>
          <table:table-cell office:value-type="float" office:value="4.0629883" calcext:value-type="float">
            <text:p>4,0629883</text:p>
          </table:table-cell>
          <table:table-cell office:value-type="float" office:value="4.416013" calcext:value-type="float">
            <text:p>4,416013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6109" calcext:value-type="float">
            <text:p>3,496109</text:p>
          </table:table-cell>
          <table:table-cell office:value-type="float" office:value="3.4954515" calcext:value-type="float">
            <text:p>3,4954515</text:p>
          </table:table-cell>
          <table:table-cell office:value-type="float" office:value="3.4908845" calcext:value-type="float">
            <text:p>3,4908845</text:p>
          </table:table-cell>
          <table:table-cell office:value-type="float" office:value="3.4914095" calcext:value-type="float">
            <text:p>3,4914095</text:p>
          </table:table-cell>
          <table:table-cell office:value-type="float" office:value="3.5374858" calcext:value-type="float">
            <text:p>3,5374858</text:p>
          </table:table-cell>
          <table:table-cell office:value-type="float" office:value="3.5707512" calcext:value-type="float">
            <text:p>3,5707512</text:p>
          </table:table-cell>
          <table:table-cell office:value-type="float" office:value="3.6388469" calcext:value-type="float">
            <text:p>3,6388469</text:p>
          </table:table-cell>
          <table:table-cell office:value-type="float" office:value="3.6668916" calcext:value-type="float">
            <text:p>3,6668916</text:p>
          </table:table-cell>
          <table:table-cell office:value-type="float" office:value="3.754136" calcext:value-type="float">
            <text:p>3,754136</text:p>
          </table:table-cell>
          <table:table-cell office:value-type="float" office:value="3.8532274" calcext:value-type="float">
            <text:p>3,8532274</text:p>
          </table:table-cell>
          <table:table-cell office:value-type="float" office:value="4.0912075" calcext:value-type="float">
            <text:p>4,0912075</text:p>
          </table:table-cell>
          <table:table-cell office:value-type="float" office:value="4.0962634" calcext:value-type="float">
            <text:p>4,0962634</text:p>
          </table:table-cell>
          <table:table-cell office:value-type="float" office:value="4.6144943" calcext:value-type="float">
            <text:p>4,6144943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40004" calcext:value-type="float">
            <text:p>3,4940004</text:p>
          </table:table-cell>
          <table:table-cell office:value-type="float" office:value="3.492496" calcext:value-type="float">
            <text:p>3,492496</text:p>
          </table:table-cell>
          <table:table-cell office:value-type="float" office:value="3.490268" calcext:value-type="float">
            <text:p>3,490268</text:p>
          </table:table-cell>
          <table:table-cell office:value-type="float" office:value="3.4859781" calcext:value-type="float">
            <text:p>3,4859781</text:p>
          </table:table-cell>
          <table:table-cell office:value-type="float" office:value="3.5343602" calcext:value-type="float">
            <text:p>3,5343602</text:p>
          </table:table-cell>
          <table:table-cell office:value-type="float" office:value="3.5668495" calcext:value-type="float">
            <text:p>3,5668495</text:p>
          </table:table-cell>
          <table:table-cell office:value-type="float" office:value="3.631827" calcext:value-type="float">
            <text:p>3,631827</text:p>
          </table:table-cell>
          <table:table-cell office:value-type="float" office:value="3.6679335" calcext:value-type="float">
            <text:p>3,6679335</text:p>
          </table:table-cell>
          <table:table-cell office:value-type="float" office:value="3.7047281" calcext:value-type="float">
            <text:p>3,7047281</text:p>
          </table:table-cell>
          <table:table-cell office:value-type="float" office:value="3.809282" calcext:value-type="float">
            <text:p>3,809282</text:p>
          </table:table-cell>
          <table:table-cell office:value-type="float" office:value="4.0314054" calcext:value-type="float">
            <text:p>4,0314054</text:p>
          </table:table-cell>
          <table:table-cell office:value-type="float" office:value="4.0765414" calcext:value-type="float">
            <text:p>4,0765414</text:p>
          </table:table-cell>
          <table:table-cell office:value-type="float" office:value="4.430301" calcext:value-type="float">
            <text:p>4,430301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22028" calcext:value-type="float">
            <text:p>3,4922028</text:p>
          </table:table-cell>
          <table:table-cell office:value-type="float" office:value="3.4893503" calcext:value-type="float">
            <text:p>3,4893503</text:p>
          </table:table-cell>
          <table:table-cell office:value-type="float" office:value="3.486221" calcext:value-type="float">
            <text:p>3,486221</text:p>
          </table:table-cell>
          <table:table-cell office:value-type="float" office:value="3.4932535" calcext:value-type="float">
            <text:p>3,4932535</text:p>
          </table:table-cell>
          <table:table-cell office:value-type="float" office:value="3.536571" calcext:value-type="float">
            <text:p>3,536571</text:p>
          </table:table-cell>
          <table:table-cell office:value-type="float" office:value="3.56963" calcext:value-type="float">
            <text:p>3,56963</text:p>
          </table:table-cell>
          <table:table-cell office:value-type="float" office:value="3.6482778" calcext:value-type="float">
            <text:p>3,6482778</text:p>
          </table:table-cell>
          <table:table-cell office:value-type="float" office:value="3.6692905" calcext:value-type="float">
            <text:p>3,6692905</text:p>
          </table:table-cell>
          <table:table-cell office:value-type="float" office:value="3.781238" calcext:value-type="float">
            <text:p>3,781238</text:p>
          </table:table-cell>
          <table:table-cell office:value-type="float" office:value="3.9833267" calcext:value-type="float">
            <text:p>3,9833267</text:p>
          </table:table-cell>
          <table:table-cell office:value-type="float" office:value="3.9819508" calcext:value-type="float">
            <text:p>3,9819508</text:p>
          </table:table-cell>
          <table:table-cell office:value-type="float" office:value="4.1657033" calcext:value-type="float">
            <text:p>4,1657033</text:p>
          </table:table-cell>
          <table:table-cell office:value-type="float" office:value="4.2256765" calcext:value-type="float">
            <text:p>4,2256765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2557" calcext:value-type="float">
            <text:p>3,492557</text:p>
          </table:table-cell>
          <table:table-cell office:value-type="float" office:value="3.4931715" calcext:value-type="float">
            <text:p>3,4931715</text:p>
          </table:table-cell>
          <table:table-cell office:value-type="float" office:value="3.4831734" calcext:value-type="float">
            <text:p>3,4831734</text:p>
          </table:table-cell>
          <table:table-cell office:value-type="float" office:value="3.4833815" calcext:value-type="float">
            <text:p>3,4833815</text:p>
          </table:table-cell>
          <table:table-cell office:value-type="float" office:value="3.539159" calcext:value-type="float">
            <text:p>3,539159</text:p>
          </table:table-cell>
          <table:table-cell office:value-type="float" office:value="3.562507" calcext:value-type="float">
            <text:p>3,562507</text:p>
          </table:table-cell>
          <table:table-cell office:value-type="float" office:value="3.643797" calcext:value-type="float">
            <text:p>3,643797</text:p>
          </table:table-cell>
          <table:table-cell office:value-type="float" office:value="3.6701427" calcext:value-type="float">
            <text:p>3,6701427</text:p>
          </table:table-cell>
          <table:table-cell office:value-type="float" office:value="3.7514305" calcext:value-type="float">
            <text:p>3,7514305</text:p>
          </table:table-cell>
          <table:table-cell office:value-type="float" office:value="3.8460174" calcext:value-type="float">
            <text:p>3,8460174</text:p>
          </table:table-cell>
          <table:table-cell office:value-type="float" office:value="3.9929621" calcext:value-type="float">
            <text:p>3,9929621</text:p>
          </table:table-cell>
          <table:table-cell office:value-type="float" office:value="4.1822186" calcext:value-type="float">
            <text:p>4,1822186</text:p>
          </table:table-cell>
          <table:table-cell office:value-type="float" office:value="4.479605" calcext:value-type="float">
            <text:p>4,479605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20504" calcext:value-type="float">
            <text:p>3,4920504</text:p>
          </table:table-cell>
          <table:table-cell office:value-type="float" office:value="3.4901211" calcext:value-type="float">
            <text:p>3,4901211</text:p>
          </table:table-cell>
          <table:table-cell office:value-type="float" office:value="3.4859686" calcext:value-type="float">
            <text:p>3,4859686</text:p>
          </table:table-cell>
          <table:table-cell office:value-type="float" office:value="3.4892104" calcext:value-type="float">
            <text:p>3,4892104</text:p>
          </table:table-cell>
          <table:table-cell office:value-type="float" office:value="3.5400937" calcext:value-type="float">
            <text:p>3,5400937</text:p>
          </table:table-cell>
          <table:table-cell office:value-type="float" office:value="3.5542529" calcext:value-type="float">
            <text:p>3,5542529</text:p>
          </table:table-cell>
          <table:table-cell office:value-type="float" office:value="3.6268222" calcext:value-type="float">
            <text:p>3,6268222</text:p>
          </table:table-cell>
          <table:table-cell office:value-type="float" office:value="3.6820924" calcext:value-type="float">
            <text:p>3,6820924</text:p>
          </table:table-cell>
          <table:table-cell office:value-type="float" office:value="3.7795122" calcext:value-type="float">
            <text:p>3,7795122</text:p>
          </table:table-cell>
          <table:table-cell office:value-type="float" office:value="3.779246" calcext:value-type="float">
            <text:p>3,779246</text:p>
          </table:table-cell>
          <table:table-cell office:value-type="float" office:value="4.0495496" calcext:value-type="float">
            <text:p>4,0495496</text:p>
          </table:table-cell>
          <table:table-cell office:value-type="float" office:value="4.0341215" calcext:value-type="float">
            <text:p>4,0341215</text:p>
          </table:table-cell>
          <table:table-cell office:value-type="float" office:value="4.8816085" calcext:value-type="float">
            <text:p>4,88160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68946" calcext:value-type="float">
            <text:p>3,4968946</text:p>
          </table:table-cell>
          <table:table-cell office:value-type="float" office:value="3.497794" calcext:value-type="float">
            <text:p>3,497794</text:p>
          </table:table-cell>
          <table:table-cell office:value-type="float" office:value="3.4967372" calcext:value-type="float">
            <text:p>3,4967372</text:p>
          </table:table-cell>
          <table:table-cell office:value-type="float" office:value="3.4933946" calcext:value-type="float">
            <text:p>3,4933946</text:p>
          </table:table-cell>
          <table:table-cell office:value-type="float" office:value="3.544978" calcext:value-type="float">
            <text:p>3,544978</text:p>
          </table:table-cell>
          <table:table-cell office:value-type="float" office:value="3.58134" calcext:value-type="float">
            <text:p>3,58134</text:p>
          </table:table-cell>
          <table:table-cell office:value-type="float" office:value="3.64386" calcext:value-type="float">
            <text:p>3,64386</text:p>
          </table:table-cell>
          <table:table-cell office:value-type="float" office:value="3.6853428" calcext:value-type="float">
            <text:p>3,6853428</text:p>
          </table:table-cell>
          <table:table-cell office:value-type="float" office:value="3.7941556" calcext:value-type="float">
            <text:p>3,7941556</text:p>
          </table:table-cell>
          <table:table-cell office:value-type="float" office:value="3.9470222" calcext:value-type="float">
            <text:p>3,9470222</text:p>
          </table:table-cell>
          <table:table-cell office:value-type="float" office:value="3.9792283" calcext:value-type="float">
            <text:p>3,9792283</text:p>
          </table:table-cell>
          <table:table-cell office:value-type="float" office:value="4.0721316" calcext:value-type="float">
            <text:p>4,0721316</text:p>
          </table:table-cell>
          <table:table-cell office:value-type="float" office:value="4.4252787" calcext:value-type="float">
            <text:p>4,4252787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64716" calcext:value-type="float">
            <text:p>3,4964716</text:p>
          </table:table-cell>
          <table:table-cell office:value-type="float" office:value="3.4999325" calcext:value-type="float">
            <text:p>3,4999325</text:p>
          </table:table-cell>
          <table:table-cell office:value-type="float" office:value="3.496394" calcext:value-type="float">
            <text:p>3,496394</text:p>
          </table:table-cell>
          <table:table-cell office:value-type="float" office:value="3.4979289" calcext:value-type="float">
            <text:p>3,4979289</text:p>
          </table:table-cell>
          <table:table-cell office:value-type="float" office:value="3.5446243" calcext:value-type="float">
            <text:p>3,5446243</text:p>
          </table:table-cell>
          <table:table-cell office:value-type="float" office:value="3.578856" calcext:value-type="float">
            <text:p>3,578856</text:p>
          </table:table-cell>
          <table:table-cell office:value-type="float" office:value="3.646822" calcext:value-type="float">
            <text:p>3,646822</text:p>
          </table:table-cell>
          <table:table-cell office:value-type="float" office:value="3.6747499" calcext:value-type="float">
            <text:p>3,6747499</text:p>
          </table:table-cell>
          <table:table-cell office:value-type="float" office:value="3.7623155" calcext:value-type="float">
            <text:p>3,7623155</text:p>
          </table:table-cell>
          <table:table-cell office:value-type="float" office:value="3.8608823" calcext:value-type="float">
            <text:p>3,8608823</text:p>
          </table:table-cell>
          <table:table-cell office:value-type="float" office:value="4.098914" calcext:value-type="float">
            <text:p>4,098914</text:p>
          </table:table-cell>
          <table:table-cell office:value-type="float" office:value="4.1058784" calcext:value-type="float">
            <text:p>4,1058784</text:p>
          </table:table-cell>
          <table:table-cell office:value-type="float" office:value="4.622341" calcext:value-type="float">
            <text:p>4,622341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45202" calcext:value-type="float">
            <text:p>3,4945202</text:p>
          </table:table-cell>
          <table:table-cell office:value-type="float" office:value="3.496521" calcext:value-type="float">
            <text:p>3,496521</text:p>
          </table:table-cell>
          <table:table-cell office:value-type="float" office:value="3.496608" calcext:value-type="float">
            <text:p>3,496608</text:p>
          </table:table-cell>
          <table:table-cell office:value-type="float" office:value="3.4916677" calcext:value-type="float">
            <text:p>3,4916677</text:p>
          </table:table-cell>
          <table:table-cell office:value-type="float" office:value="3.5409598" calcext:value-type="float">
            <text:p>3,5409598</text:p>
          </table:table-cell>
          <table:table-cell office:value-type="float" office:value="3.5749633" calcext:value-type="float">
            <text:p>3,5749633</text:p>
          </table:table-cell>
          <table:table-cell office:value-type="float" office:value="3.6393588" calcext:value-type="float">
            <text:p>3,6393588</text:p>
          </table:table-cell>
          <table:table-cell office:value-type="float" office:value="3.676516" calcext:value-type="float">
            <text:p>3,676516</text:p>
          </table:table-cell>
          <table:table-cell office:value-type="float" office:value="3.7127287" calcext:value-type="float">
            <text:p>3,7127287</text:p>
          </table:table-cell>
          <table:table-cell office:value-type="float" office:value="3.817311" calcext:value-type="float">
            <text:p>3,817311</text:p>
          </table:table-cell>
          <table:table-cell office:value-type="float" office:value="4.04166" calcext:value-type="float">
            <text:p>4,04166</text:p>
          </table:table-cell>
          <table:table-cell office:value-type="float" office:value="4.0878763" calcext:value-type="float">
            <text:p>4,0878763</text:p>
          </table:table-cell>
          <table:table-cell office:value-type="float" office:value="4.4394207" calcext:value-type="float">
            <text:p>4,4394207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2362" calcext:value-type="float">
            <text:p>3,492362</text:p>
          </table:table-cell>
          <table:table-cell office:value-type="float" office:value="3.4929998" calcext:value-type="float">
            <text:p>3,4929998</text:p>
          </table:table-cell>
          <table:table-cell office:value-type="float" office:value="3.4913654" calcext:value-type="float">
            <text:p>3,4913654</text:p>
          </table:table-cell>
          <table:table-cell office:value-type="float" office:value="3.4992516" calcext:value-type="float">
            <text:p>3,4992516</text:p>
          </table:table-cell>
          <table:table-cell office:value-type="float" office:value="3.5442364" calcext:value-type="float">
            <text:p>3,5442364</text:p>
          </table:table-cell>
          <table:table-cell office:value-type="float" office:value="3.5774257" calcext:value-type="float">
            <text:p>3,5774257</text:p>
          </table:table-cell>
          <table:table-cell office:value-type="float" office:value="3.656226" calcext:value-type="float">
            <text:p>3,656226</text:p>
          </table:table-cell>
          <table:table-cell office:value-type="float" office:value="3.6773922" calcext:value-type="float">
            <text:p>3,6773922</text:p>
          </table:table-cell>
          <table:table-cell office:value-type="float" office:value="3.788158" calcext:value-type="float">
            <text:p>3,788158</text:p>
          </table:table-cell>
          <table:table-cell office:value-type="float" office:value="3.9917946" calcext:value-type="float">
            <text:p>3,9917946</text:p>
          </table:table-cell>
          <table:table-cell office:value-type="float" office:value="3.9917386" calcext:value-type="float">
            <text:p>3,9917386</text:p>
          </table:table-cell>
          <table:table-cell office:value-type="float" office:value="4.176839" calcext:value-type="float">
            <text:p>4,176839</text:p>
          </table:table-cell>
          <table:table-cell office:value-type="float" office:value="4.233876" calcext:value-type="float">
            <text:p>4,233876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26748" calcext:value-type="float">
            <text:p>3,4926748</text:p>
          </table:table-cell>
          <table:table-cell office:value-type="float" office:value="3.4973035" calcext:value-type="float">
            <text:p>3,4973035</text:p>
          </table:table-cell>
          <table:table-cell office:value-type="float" office:value="3.4885843" calcext:value-type="float">
            <text:p>3,4885843</text:p>
          </table:table-cell>
          <table:table-cell office:value-type="float" office:value="3.4894872" calcext:value-type="float">
            <text:p>3,4894872</text:p>
          </table:table-cell>
          <table:table-cell office:value-type="float" office:value="3.546469" calcext:value-type="float">
            <text:p>3,546469</text:p>
          </table:table-cell>
          <table:table-cell office:value-type="float" office:value="3.5708647" calcext:value-type="float">
            <text:p>3,5708647</text:p>
          </table:table-cell>
          <table:table-cell office:value-type="float" office:value="3.6520748" calcext:value-type="float">
            <text:p>3,6520748</text:p>
          </table:table-cell>
          <table:table-cell office:value-type="float" office:value="3.6778996" calcext:value-type="float">
            <text:p>3,6778996</text:p>
          </table:table-cell>
          <table:table-cell office:value-type="float" office:value="3.7595336" calcext:value-type="float">
            <text:p>3,7595336</text:p>
          </table:table-cell>
          <table:table-cell office:value-type="float" office:value="3.8527858" calcext:value-type="float">
            <text:p>3,8527858</text:p>
          </table:table-cell>
          <table:table-cell office:value-type="float" office:value="4.001467" calcext:value-type="float">
            <text:p>4,001467</text:p>
          </table:table-cell>
          <table:table-cell office:value-type="float" office:value="4.191755" calcext:value-type="float">
            <text:p>4,191755</text:p>
          </table:table-cell>
          <table:table-cell office:value-type="float" office:value="4.487648" calcext:value-type="float">
            <text:p>4,487648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2373" calcext:value-type="float">
            <text:p>3,492373</text:p>
          </table:table-cell>
          <table:table-cell office:value-type="float" office:value="3.494207" calcext:value-type="float">
            <text:p>3,494207</text:p>
          </table:table-cell>
          <table:table-cell office:value-type="float" office:value="3.4913528" calcext:value-type="float">
            <text:p>3,4913528</text:p>
          </table:table-cell>
          <table:table-cell office:value-type="float" office:value="3.4958558" calcext:value-type="float">
            <text:p>3,4958558</text:p>
          </table:table-cell>
          <table:table-cell office:value-type="float" office:value="3.5475867" calcext:value-type="float">
            <text:p>3,5475867</text:p>
          </table:table-cell>
          <table:table-cell office:value-type="float" office:value="3.5619156" calcext:value-type="float">
            <text:p>3,5619156</text:p>
          </table:table-cell>
          <table:table-cell office:value-type="float" office:value="3.6348193" calcext:value-type="float">
            <text:p>3,6348193</text:p>
          </table:table-cell>
          <table:table-cell office:value-type="float" office:value="3.6907172" calcext:value-type="float">
            <text:p>3,6907172</text:p>
          </table:table-cell>
          <table:table-cell office:value-type="float" office:value="3.7879524" calcext:value-type="float">
            <text:p>3,7879524</text:p>
          </table:table-cell>
          <table:table-cell office:value-type="float" office:value="3.7869942" calcext:value-type="float">
            <text:p>3,7869942</text:p>
          </table:table-cell>
          <table:table-cell office:value-type="float" office:value="4.056697" calcext:value-type="float">
            <text:p>4,056697</text:p>
          </table:table-cell>
          <table:table-cell office:value-type="float" office:value="4.0424967" calcext:value-type="float">
            <text:p>4,0424967</text:p>
          </table:table-cell>
          <table:table-cell office:value-type="float" office:value="4.8894715" calcext:value-type="float">
            <text:p>4,88947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71416" calcext:value-type="float">
            <text:p>3,4971416</text:p>
          </table:table-cell>
          <table:table-cell office:value-type="float" office:value="3.5021353" calcext:value-type="float">
            <text:p>3,5021353</text:p>
          </table:table-cell>
          <table:table-cell office:value-type="float" office:value="3.5020607" calcext:value-type="float">
            <text:p>3,5020607</text:p>
          </table:table-cell>
          <table:table-cell office:value-type="float" office:value="3.4996076" calcext:value-type="float">
            <text:p>3,4996076</text:p>
          </table:table-cell>
          <table:table-cell office:value-type="float" office:value="3.5520074" calcext:value-type="float">
            <text:p>3,5520074</text:p>
          </table:table-cell>
          <table:table-cell office:value-type="float" office:value="3.5891426" calcext:value-type="float">
            <text:p>3,5891426</text:p>
          </table:table-cell>
          <table:table-cell office:value-type="float" office:value="3.6511922" calcext:value-type="float">
            <text:p>3,6511922</text:p>
          </table:table-cell>
          <table:table-cell office:value-type="float" office:value="3.693147" calcext:value-type="float">
            <text:p>3,693147</text:p>
          </table:table-cell>
          <table:table-cell office:value-type="float" office:value="3.8026283" calcext:value-type="float">
            <text:p>3,8026283</text:p>
          </table:table-cell>
          <table:table-cell office:value-type="float" office:value="3.9540236" calcext:value-type="float">
            <text:p>3,9540236</text:p>
          </table:table-cell>
          <table:table-cell office:value-type="float" office:value="3.9871633" calcext:value-type="float">
            <text:p>3,9871633</text:p>
          </table:table-cell>
          <table:table-cell office:value-type="float" office:value="4.081222" calcext:value-type="float">
            <text:p>4,081222</text:p>
          </table:table-cell>
          <table:table-cell office:value-type="float" office:value="4.4341774" calcext:value-type="float">
            <text:p>4,4341774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69482" calcext:value-type="float">
            <text:p>3,4969482</text:p>
          </table:table-cell>
          <table:table-cell office:value-type="float" office:value="3.50407" calcext:value-type="float">
            <text:p>3,50407</text:p>
          </table:table-cell>
          <table:table-cell office:value-type="float" office:value="3.5019526" calcext:value-type="float">
            <text:p>3,5019526</text:p>
          </table:table-cell>
          <table:table-cell office:value-type="float" office:value="3.5044944" calcext:value-type="float">
            <text:p>3,5044944</text:p>
          </table:table-cell>
          <table:table-cell office:value-type="float" office:value="3.551564" calcext:value-type="float">
            <text:p>3,551564</text:p>
          </table:table-cell>
          <table:table-cell office:value-type="float" office:value="3.5867667" calcext:value-type="float">
            <text:p>3,5867667</text:p>
          </table:table-cell>
          <table:table-cell office:value-type="float" office:value="3.6544147" calcext:value-type="float">
            <text:p>3,6544147</text:p>
          </table:table-cell>
          <table:table-cell office:value-type="float" office:value="3.6823618" calcext:value-type="float">
            <text:p>3,6823618</text:p>
          </table:table-cell>
          <table:table-cell office:value-type="float" office:value="3.7699656" calcext:value-type="float">
            <text:p>3,7699656</text:p>
          </table:table-cell>
          <table:table-cell office:value-type="float" office:value="3.8682032" calcext:value-type="float">
            <text:p>3,8682032</text:p>
          </table:table-cell>
          <table:table-cell office:value-type="float" office:value="4.106142" calcext:value-type="float">
            <text:p>4,106142</text:p>
          </table:table-cell>
          <table:table-cell office:value-type="float" office:value="4.114976" calcext:value-type="float">
            <text:p>4,114976</text:p>
          </table:table-cell>
          <table:table-cell office:value-type="float" office:value="4.629851" calcext:value-type="float">
            <text:p>4,629851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48487" calcext:value-type="float">
            <text:p>3,4948487</text:p>
          </table:table-cell>
          <table:table-cell office:value-type="float" office:value="3.5006244" calcext:value-type="float">
            <text:p>3,5006244</text:p>
          </table:table-cell>
          <table:table-cell office:value-type="float" office:value="3.5024798" calcext:value-type="float">
            <text:p>3,5024798</text:p>
          </table:table-cell>
          <table:table-cell office:value-type="float" office:value="3.4979615" calcext:value-type="float">
            <text:p>3,4979615</text:p>
          </table:table-cell>
          <table:table-cell office:value-type="float" office:value="3.547601" calcext:value-type="float">
            <text:p>3,547601</text:p>
          </table:table-cell>
          <table:table-cell office:value-type="float" office:value="3.5823858" calcext:value-type="float">
            <text:p>3,5823858</text:p>
          </table:table-cell>
          <table:table-cell office:value-type="float" office:value="3.646747" calcext:value-type="float">
            <text:p>3,646747</text:p>
          </table:table-cell>
          <table:table-cell office:value-type="float" office:value="3.6847224" calcext:value-type="float">
            <text:p>3,6847224</text:p>
          </table:table-cell>
          <table:table-cell office:value-type="float" office:value="3.7203279" calcext:value-type="float">
            <text:p>3,7203279</text:p>
          </table:table-cell>
          <table:table-cell office:value-type="float" office:value="3.8251574" calcext:value-type="float">
            <text:p>3,8251574</text:p>
          </table:table-cell>
          <table:table-cell office:value-type="float" office:value="4.050818" calcext:value-type="float">
            <text:p>4,050818</text:p>
          </table:table-cell>
          <table:table-cell office:value-type="float" office:value="4.098595" calcext:value-type="float">
            <text:p>4,098595</text:p>
          </table:table-cell>
          <table:table-cell office:value-type="float" office:value="4.44788" calcext:value-type="float">
            <text:p>4,44788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24996" calcext:value-type="float">
            <text:p>3,4924996</text:p>
          </table:table-cell>
          <table:table-cell office:value-type="float" office:value="3.497906" calcext:value-type="float">
            <text:p>3,497906</text:p>
          </table:table-cell>
          <table:table-cell office:value-type="float" office:value="3.496848" calcext:value-type="float">
            <text:p>3,496848</text:p>
          </table:table-cell>
          <table:table-cell office:value-type="float" office:value="3.5051913" calcext:value-type="float">
            <text:p>3,5051913</text:p>
          </table:table-cell>
          <table:table-cell office:value-type="float" office:value="3.5513928" calcext:value-type="float">
            <text:p>3,5513928</text:p>
          </table:table-cell>
          <table:table-cell office:value-type="float" office:value="3.58519" calcext:value-type="float">
            <text:p>3,58519</text:p>
          </table:table-cell>
          <table:table-cell office:value-type="float" office:value="3.6635516" calcext:value-type="float">
            <text:p>3,6635516</text:p>
          </table:table-cell>
          <table:table-cell office:value-type="float" office:value="3.685082" calcext:value-type="float">
            <text:p>3,685082</text:p>
          </table:table-cell>
          <table:table-cell office:value-type="float" office:value="3.7948442" calcext:value-type="float">
            <text:p>3,7948442</text:p>
          </table:table-cell>
          <table:table-cell office:value-type="float" office:value="4.000013" calcext:value-type="float">
            <text:p>4,000013</text:p>
          </table:table-cell>
          <table:table-cell office:value-type="float" office:value="4.0011387" calcext:value-type="float">
            <text:p>4,0011387</text:p>
          </table:table-cell>
          <table:table-cell office:value-type="float" office:value="4.1873775" calcext:value-type="float">
            <text:p>4,1873775</text:p>
          </table:table-cell>
          <table:table-cell office:value-type="float" office:value="4.241738" calcext:value-type="float">
            <text:p>4,241738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32039" calcext:value-type="float">
            <text:p>3,4932039</text:p>
          </table:table-cell>
          <table:table-cell office:value-type="float" office:value="3.5010405" calcext:value-type="float">
            <text:p>3,5010405</text:p>
          </table:table-cell>
          <table:table-cell office:value-type="float" office:value="3.4936078" calcext:value-type="float">
            <text:p>3,4936078</text:p>
          </table:table-cell>
          <table:table-cell office:value-type="float" office:value="3.4955025" calcext:value-type="float">
            <text:p>3,4955025</text:p>
          </table:table-cell>
          <table:table-cell office:value-type="float" office:value="3.55336" calcext:value-type="float">
            <text:p>3,55336</text:p>
          </table:table-cell>
          <table:table-cell office:value-type="float" office:value="3.5786731" calcext:value-type="float">
            <text:p>3,5786731</text:p>
          </table:table-cell>
          <table:table-cell office:value-type="float" office:value="3.6594138" calcext:value-type="float">
            <text:p>3,6594138</text:p>
          </table:table-cell>
          <table:table-cell office:value-type="float" office:value="3.6855893" calcext:value-type="float">
            <text:p>3,6855893</text:p>
          </table:table-cell>
          <table:table-cell office:value-type="float" office:value="3.7676716" calcext:value-type="float">
            <text:p>3,7676716</text:p>
          </table:table-cell>
          <table:table-cell office:value-type="float" office:value="3.8593674" calcext:value-type="float">
            <text:p>3,8593674</text:p>
          </table:table-cell>
          <table:table-cell office:value-type="float" office:value="4.009759" calcext:value-type="float">
            <text:p>4,009759</text:p>
          </table:table-cell>
          <table:table-cell office:value-type="float" office:value="4.200753" calcext:value-type="float">
            <text:p>4,200753</text:p>
          </table:table-cell>
          <table:table-cell office:value-type="float" office:value="4.4950023" calcext:value-type="float">
            <text:p>4,4950023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24304" calcext:value-type="float">
            <text:p>3,4924304</text:p>
          </table:table-cell>
          <table:table-cell office:value-type="float" office:value="3.4983275" calcext:value-type="float">
            <text:p>3,4983275</text:p>
          </table:table-cell>
          <table:table-cell office:value-type="float" office:value="3.49742" calcext:value-type="float">
            <text:p>3,49742</text:p>
          </table:table-cell>
          <table:table-cell office:value-type="float" office:value="3.5022125" calcext:value-type="float">
            <text:p>3,5022125</text:p>
          </table:table-cell>
          <table:table-cell office:value-type="float" office:value="3.5547886" calcext:value-type="float">
            <text:p>3,5547886</text:p>
          </table:table-cell>
          <table:table-cell office:value-type="float" office:value="3.5692775" calcext:value-type="float">
            <text:p>3,5692775</text:p>
          </table:table-cell>
          <table:table-cell office:value-type="float" office:value="3.642772" calcext:value-type="float">
            <text:p>3,642772</text:p>
          </table:table-cell>
          <table:table-cell office:value-type="float" office:value="3.6987627" calcext:value-type="float">
            <text:p>3,6987627</text:p>
          </table:table-cell>
          <table:table-cell office:value-type="float" office:value="3.7960691" calcext:value-type="float">
            <text:p>3,7960691</text:p>
          </table:table-cell>
          <table:table-cell office:value-type="float" office:value="3.7943153" calcext:value-type="float">
            <text:p>3,7943153</text:p>
          </table:table-cell>
          <table:table-cell office:value-type="float" office:value="4.0634904" calcext:value-type="float">
            <text:p>4,0634904</text:p>
          </table:table-cell>
          <table:table-cell office:value-type="float" office:value="4.0505557" calcext:value-type="float">
            <text:p>4,0505557</text:p>
          </table:table-cell>
          <table:table-cell office:value-type="float" office:value="4.896671" calcext:value-type="float">
            <text:p>4,8966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78943" calcext:value-type="float">
            <text:p>3,4978943</text:p>
          </table:table-cell>
          <table:table-cell office:value-type="float" office:value="3.5060833" calcext:value-type="float">
            <text:p>3,5060833</text:p>
          </table:table-cell>
          <table:table-cell office:value-type="float" office:value="3.5072255" calcext:value-type="float">
            <text:p>3,5072255</text:p>
          </table:table-cell>
          <table:table-cell office:value-type="float" office:value="3.5056002" calcext:value-type="float">
            <text:p>3,5056002</text:p>
          </table:table-cell>
          <table:table-cell office:value-type="float" office:value="3.5591218" calcext:value-type="float">
            <text:p>3,5591218</text:p>
          </table:table-cell>
          <table:table-cell office:value-type="float" office:value="3.596616" calcext:value-type="float">
            <text:p>3,596616</text:p>
          </table:table-cell>
          <table:table-cell office:value-type="float" office:value="3.6581736" calcext:value-type="float">
            <text:p>3,6581736</text:p>
          </table:table-cell>
          <table:table-cell office:value-type="float" office:value="3.7007146" calcext:value-type="float">
            <text:p>3,7007146</text:p>
          </table:table-cell>
          <table:table-cell office:value-type="float" office:value="3.8107176" calcext:value-type="float">
            <text:p>3,8107176</text:p>
          </table:table-cell>
          <table:table-cell office:value-type="float" office:value="3.9606545" calcext:value-type="float">
            <text:p>3,9606545</text:p>
          </table:table-cell>
          <table:table-cell office:value-type="float" office:value="3.9946425" calcext:value-type="float">
            <text:p>3,9946425</text:p>
          </table:table-cell>
          <table:table-cell office:value-type="float" office:value="4.0895762" calcext:value-type="float">
            <text:p>4,0895762</text:p>
          </table:table-cell>
          <table:table-cell office:value-type="float" office:value="4.442747" calcext:value-type="float">
            <text:p>4,442747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77703" calcext:value-type="float">
            <text:p>3,4977703</text:p>
          </table:table-cell>
          <table:table-cell office:value-type="float" office:value="3.5083246" calcext:value-type="float">
            <text:p>3,5083246</text:p>
          </table:table-cell>
          <table:table-cell office:value-type="float" office:value="3.5072873" calcext:value-type="float">
            <text:p>3,5072873</text:p>
          </table:table-cell>
          <table:table-cell office:value-type="float" office:value="3.5108309" calcext:value-type="float">
            <text:p>3,5108309</text:p>
          </table:table-cell>
          <table:table-cell office:value-type="float" office:value="3.5585551" calcext:value-type="float">
            <text:p>3,5585551</text:p>
          </table:table-cell>
          <table:table-cell office:value-type="float" office:value="3.5943818" calcext:value-type="float">
            <text:p>3,5943818</text:p>
          </table:table-cell>
          <table:table-cell office:value-type="float" office:value="3.661828" calcext:value-type="float">
            <text:p>3,661828</text:p>
          </table:table-cell>
          <table:table-cell office:value-type="float" office:value="3.689555" calcext:value-type="float">
            <text:p>3,689555</text:p>
          </table:table-cell>
          <table:table-cell office:value-type="float" office:value="3.777524" calcext:value-type="float">
            <text:p>3,777524</text:p>
          </table:table-cell>
          <table:table-cell office:value-type="float" office:value="3.8751905" calcext:value-type="float">
            <text:p>3,8751905</text:p>
          </table:table-cell>
          <table:table-cell office:value-type="float" office:value="4.113084" calcext:value-type="float">
            <text:p>4,113084</text:p>
          </table:table-cell>
          <table:table-cell office:value-type="float" office:value="4.1238923" calcext:value-type="float">
            <text:p>4,1238923</text:p>
          </table:table-cell>
          <table:table-cell office:value-type="float" office:value="4.637031" calcext:value-type="float">
            <text:p>4,637031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57068" calcext:value-type="float">
            <text:p>3,4957068</text:p>
          </table:table-cell>
          <table:table-cell office:value-type="float" office:value="3.5050132" calcext:value-type="float">
            <text:p>3,5050132</text:p>
          </table:table-cell>
          <table:table-cell office:value-type="float" office:value="3.5078666" calcext:value-type="float">
            <text:p>3,5078666</text:p>
          </table:table-cell>
          <table:table-cell office:value-type="float" office:value="3.5040407" calcext:value-type="float">
            <text:p>3,5040407</text:p>
          </table:table-cell>
          <table:table-cell office:value-type="float" office:value="3.5545573" calcext:value-type="float">
            <text:p>3,5545573</text:p>
          </table:table-cell>
          <table:table-cell office:value-type="float" office:value="3.5896292" calcext:value-type="float">
            <text:p>3,5896292</text:p>
          </table:table-cell>
          <table:table-cell office:value-type="float" office:value="3.6538858" calcext:value-type="float">
            <text:p>3,6538858</text:p>
          </table:table-cell>
          <table:table-cell office:value-type="float" office:value="3.6923964" calcext:value-type="float">
            <text:p>3,6923964</text:p>
          </table:table-cell>
          <table:table-cell office:value-type="float" office:value="3.7276413" calcext:value-type="float">
            <text:p>3,7276413</text:p>
          </table:table-cell>
          <table:table-cell office:value-type="float" office:value="3.8325799" calcext:value-type="float">
            <text:p>3,8325799</text:p>
          </table:table-cell>
          <table:table-cell office:value-type="float" office:value="4.059788" calcext:value-type="float">
            <text:p>4,059788</text:p>
          </table:table-cell>
          <table:table-cell office:value-type="float" office:value="4.108534" calcext:value-type="float">
            <text:p>4,108534</text:p>
          </table:table-cell>
          <table:table-cell office:value-type="float" office:value="4.4558983" calcext:value-type="float">
            <text:p>4,4558983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3115" calcext:value-type="float">
            <text:p>3,493115</text:p>
          </table:table-cell>
          <table:table-cell office:value-type="float" office:value="3.5013878" calcext:value-type="float">
            <text:p>3,5013878</text:p>
          </table:table-cell>
          <table:table-cell office:value-type="float" office:value="3.501744" calcext:value-type="float">
            <text:p>3,501744</text:p>
          </table:table-cell>
          <table:table-cell office:value-type="float" office:value="3.5115469" calcext:value-type="float">
            <text:p>3,5115469</text:p>
          </table:table-cell>
          <table:table-cell office:value-type="float" office:value="3.5579808" calcext:value-type="float">
            <text:p>3,5579808</text:p>
          </table:table-cell>
          <table:table-cell office:value-type="float" office:value="3.5926058" calcext:value-type="float">
            <text:p>3,5926058</text:p>
          </table:table-cell>
          <table:table-cell office:value-type="float" office:value="3.6710851" calcext:value-type="float">
            <text:p>3,6710851</text:p>
          </table:table-cell>
          <table:table-cell office:value-type="float" office:value="3.6923976" calcext:value-type="float">
            <text:p>3,6923976</text:p>
          </table:table-cell>
          <table:table-cell office:value-type="float" office:value="3.8013325" calcext:value-type="float">
            <text:p>3,8013325</text:p>
          </table:table-cell>
          <table:table-cell office:value-type="float" office:value="4.0081115" calcext:value-type="float">
            <text:p>4,0081115</text:p>
          </table:table-cell>
          <table:table-cell office:value-type="float" office:value="4.0099235" calcext:value-type="float">
            <text:p>4,0099235</text:p>
          </table:table-cell>
          <table:table-cell office:value-type="float" office:value="4.197337" calcext:value-type="float">
            <text:p>4,197337</text:p>
          </table:table-cell>
          <table:table-cell office:value-type="float" office:value="4.249261" calcext:value-type="float">
            <text:p>4,249261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41995" calcext:value-type="float">
            <text:p>3,4941995</text:p>
          </table:table-cell>
          <table:table-cell office:value-type="float" office:value="3.5049453" calcext:value-type="float">
            <text:p>3,5049453</text:p>
          </table:table-cell>
          <table:table-cell office:value-type="float" office:value="3.4984138" calcext:value-type="float">
            <text:p>3,4984138</text:p>
          </table:table-cell>
          <table:table-cell office:value-type="float" office:value="3.5015354" calcext:value-type="float">
            <text:p>3,5015354</text:p>
          </table:table-cell>
          <table:table-cell office:value-type="float" office:value="3.559804" calcext:value-type="float">
            <text:p>3,559804</text:p>
          </table:table-cell>
          <table:table-cell office:value-type="float" office:value="3.5862467" calcext:value-type="float">
            <text:p>3,5862467</text:p>
          </table:table-cell>
          <table:table-cell office:value-type="float" office:value="3.6667917" calcext:value-type="float">
            <text:p>3,6667917</text:p>
          </table:table-cell>
          <table:table-cell office:value-type="float" office:value="3.6928873" calcext:value-type="float">
            <text:p>3,6928873</text:p>
          </table:table-cell>
          <table:table-cell office:value-type="float" office:value="3.7753708" calcext:value-type="float">
            <text:p>3,7753708</text:p>
          </table:table-cell>
          <table:table-cell office:value-type="float" office:value="3.865593" calcext:value-type="float">
            <text:p>3,865593</text:p>
          </table:table-cell>
          <table:table-cell office:value-type="float" office:value="4.0171704" calcext:value-type="float">
            <text:p>4,0171704</text:p>
          </table:table-cell>
          <table:table-cell office:value-type="float" office:value="4.2094903" calcext:value-type="float">
            <text:p>4,2094903</text:p>
          </table:table-cell>
          <table:table-cell office:value-type="float" office:value="4.5022736" calcext:value-type="float">
            <text:p>4,5022736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2632" calcext:value-type="float">
            <text:p>3,492632</text:p>
          </table:table-cell>
          <table:table-cell office:value-type="float" office:value="3.5029268" calcext:value-type="float">
            <text:p>3,5029268</text:p>
          </table:table-cell>
          <table:table-cell office:value-type="float" office:value="3.5021193" calcext:value-type="float">
            <text:p>3,5021193</text:p>
          </table:table-cell>
          <table:table-cell office:value-type="float" office:value="3.5080566" calcext:value-type="float">
            <text:p>3,5080566</text:p>
          </table:table-cell>
          <table:table-cell office:value-type="float" office:value="3.5614407" calcext:value-type="float">
            <text:p>3,5614407</text:p>
          </table:table-cell>
          <table:table-cell office:value-type="float" office:value="3.57648" calcext:value-type="float">
            <text:p>3,57648</text:p>
          </table:table-cell>
          <table:table-cell office:value-type="float" office:value="3.6503043" calcext:value-type="float">
            <text:p>3,6503043</text:p>
          </table:table-cell>
          <table:table-cell office:value-type="float" office:value="3.7068152" calcext:value-type="float">
            <text:p>3,7068152</text:p>
          </table:table-cell>
          <table:table-cell office:value-type="float" office:value="3.8036907" calcext:value-type="float">
            <text:p>3,8036907</text:p>
          </table:table-cell>
          <table:table-cell office:value-type="float" office:value="3.8015103" calcext:value-type="float">
            <text:p>3,8015103</text:p>
          </table:table-cell>
          <table:table-cell office:value-type="float" office:value="4.069992" calcext:value-type="float">
            <text:p>4,069992</text:p>
          </table:table-cell>
          <table:table-cell office:value-type="float" office:value="4.0579796" calcext:value-type="float">
            <text:p>4,0579796</text:p>
          </table:table-cell>
          <table:table-cell office:value-type="float" office:value="4.903341" calcext:value-type="float">
            <text:p>4,9033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88067" calcext:value-type="float">
            <text:p>3,4988067</text:p>
          </table:table-cell>
          <table:table-cell office:value-type="float" office:value="3.510508" calcext:value-type="float">
            <text:p>3,510508</text:p>
          </table:table-cell>
          <table:table-cell office:value-type="float" office:value="3.5121357" calcext:value-type="float">
            <text:p>3,5121357</text:p>
          </table:table-cell>
          <table:table-cell office:value-type="float" office:value="3.5114143" calcext:value-type="float">
            <text:p>3,5114143</text:p>
          </table:table-cell>
          <table:table-cell office:value-type="float" office:value="3.5659754" calcext:value-type="float">
            <text:p>3,5659754</text:p>
          </table:table-cell>
          <table:table-cell office:value-type="float" office:value="3.6037943" calcext:value-type="float">
            <text:p>3,6037943</text:p>
          </table:table-cell>
          <table:table-cell office:value-type="float" office:value="3.665026" calcext:value-type="float">
            <text:p>3,665026</text:p>
          </table:table-cell>
          <table:table-cell office:value-type="float" office:value="3.708027" calcext:value-type="float">
            <text:p>3,708027</text:p>
          </table:table-cell>
          <table:table-cell office:value-type="float" office:value="3.8184052" calcext:value-type="float">
            <text:p>3,8184052</text:p>
          </table:table-cell>
          <table:table-cell office:value-type="float" office:value="3.9671428" calcext:value-type="float">
            <text:p>3,9671428</text:p>
          </table:table-cell>
          <table:table-cell office:value-type="float" office:value="4.001867" calcext:value-type="float">
            <text:p>4,001867</text:p>
          </table:table-cell>
          <table:table-cell office:value-type="float" office:value="4.0975356" calcext:value-type="float">
            <text:p>4,0975356</text:p>
          </table:table-cell>
          <table:table-cell office:value-type="float" office:value="4.4508796" calcext:value-type="float">
            <text:p>4,4508796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9114" calcext:value-type="float">
            <text:p>3,499114</text:p>
          </table:table-cell>
          <table:table-cell office:value-type="float" office:value="3.5126154" calcext:value-type="float">
            <text:p>3,5126154</text:p>
          </table:table-cell>
          <table:table-cell office:value-type="float" office:value="3.5125816" calcext:value-type="float">
            <text:p>3,5125816</text:p>
          </table:table-cell>
          <table:table-cell office:value-type="float" office:value="3.5169404" calcext:value-type="float">
            <text:p>3,5169404</text:p>
          </table:table-cell>
          <table:table-cell office:value-type="float" office:value="3.565062" calcext:value-type="float">
            <text:p>3,565062</text:p>
          </table:table-cell>
          <table:table-cell office:value-type="float" office:value="3.6017654" calcext:value-type="float">
            <text:p>3,6017654</text:p>
          </table:table-cell>
          <table:table-cell office:value-type="float" office:value="3.668867" calcext:value-type="float">
            <text:p>3,668867</text:p>
          </table:table-cell>
          <table:table-cell office:value-type="float" office:value="3.6963868" calcext:value-type="float">
            <text:p>3,6963868</text:p>
          </table:table-cell>
          <table:table-cell office:value-type="float" office:value="3.7846198" calcext:value-type="float">
            <text:p>3,7846198</text:p>
          </table:table-cell>
          <table:table-cell office:value-type="float" office:value="3.8818016" calcext:value-type="float">
            <text:p>3,8818016</text:p>
          </table:table-cell>
          <table:table-cell office:value-type="float" office:value="4.119554" calcext:value-type="float">
            <text:p>4,119554</text:p>
          </table:table-cell>
          <table:table-cell office:value-type="float" office:value="4.1323647" calcext:value-type="float">
            <text:p>4,1323647</text:p>
          </table:table-cell>
          <table:table-cell office:value-type="float" office:value="4.6440015" calcext:value-type="float">
            <text:p>4,6440015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6778" calcext:value-type="float">
            <text:p>3,496778</text:p>
          </table:table-cell>
          <table:table-cell office:value-type="float" office:value="3.5088344" calcext:value-type="float">
            <text:p>3,5088344</text:p>
          </table:table-cell>
          <table:table-cell office:value-type="float" office:value="3.5131288" calcext:value-type="float">
            <text:p>3,5131288</text:p>
          </table:table-cell>
          <table:table-cell office:value-type="float" office:value="3.509714" calcext:value-type="float">
            <text:p>3,509714</text:p>
          </table:table-cell>
          <table:table-cell office:value-type="float" office:value="3.561283" calcext:value-type="float">
            <text:p>3,561283</text:p>
          </table:table-cell>
          <table:table-cell office:value-type="float" office:value="3.5967488" calcext:value-type="float">
            <text:p>3,5967488</text:p>
          </table:table-cell>
          <table:table-cell office:value-type="float" office:value="3.6607993" calcext:value-type="float">
            <text:p>3,6607993</text:p>
          </table:table-cell>
          <table:table-cell office:value-type="float" office:value="3.6995428" calcext:value-type="float">
            <text:p>3,6995428</text:p>
          </table:table-cell>
          <table:table-cell office:value-type="float" office:value="3.7348092" calcext:value-type="float">
            <text:p>3,7348092</text:p>
          </table:table-cell>
          <table:table-cell office:value-type="float" office:value="3.8395457" calcext:value-type="float">
            <text:p>3,8395457</text:p>
          </table:table-cell>
          <table:table-cell office:value-type="float" office:value="4.068202" calcext:value-type="float">
            <text:p>4,068202</text:p>
          </table:table-cell>
          <table:table-cell office:value-type="float" office:value="4.1179986" calcext:value-type="float">
            <text:p>4,1179986</text:p>
          </table:table-cell>
          <table:table-cell office:value-type="float" office:value="4.46374" calcext:value-type="float">
            <text:p>4,46374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38796" calcext:value-type="float">
            <text:p>3,4938796</text:p>
          </table:table-cell>
          <table:table-cell office:value-type="float" office:value="3.505487" calcext:value-type="float">
            <text:p>3,505487</text:p>
          </table:table-cell>
          <table:table-cell office:value-type="float" office:value="3.5069141" calcext:value-type="float">
            <text:p>3,5069141</text:p>
          </table:table-cell>
          <table:table-cell office:value-type="float" office:value="3.5173576" calcext:value-type="float">
            <text:p>3,5173576</text:p>
          </table:table-cell>
          <table:table-cell office:value-type="float" office:value="3.5645669" calcext:value-type="float">
            <text:p>3,5645669</text:p>
          </table:table-cell>
          <table:table-cell office:value-type="float" office:value="3.5998197" calcext:value-type="float">
            <text:p>3,5998197</text:p>
          </table:table-cell>
          <table:table-cell office:value-type="float" office:value="3.67811" calcext:value-type="float">
            <text:p>3,67811</text:p>
          </table:table-cell>
          <table:table-cell office:value-type="float" office:value="3.6996405" calcext:value-type="float">
            <text:p>3,6996405</text:p>
          </table:table-cell>
          <table:table-cell office:value-type="float" office:value="3.807524" calcext:value-type="float">
            <text:p>3,807524</text:p>
          </table:table-cell>
          <table:table-cell office:value-type="float" office:value="4.0153723" calcext:value-type="float">
            <text:p>4,0153723</text:p>
          </table:table-cell>
          <table:table-cell office:value-type="float" office:value="4.0182624" calcext:value-type="float">
            <text:p>4,0182624</text:p>
          </table:table-cell>
          <table:table-cell office:value-type="float" office:value="4.2067676" calcext:value-type="float">
            <text:p>4,2067676</text:p>
          </table:table-cell>
          <table:table-cell office:value-type="float" office:value="4.256591" calcext:value-type="float">
            <text:p>4,256591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47627" calcext:value-type="float">
            <text:p>3,4947627</text:p>
          </table:table-cell>
          <table:table-cell office:value-type="float" office:value="3.5096436" calcext:value-type="float">
            <text:p>3,5096436</text:p>
          </table:table-cell>
          <table:table-cell office:value-type="float" office:value="3.503139" calcext:value-type="float">
            <text:p>3,503139</text:p>
          </table:table-cell>
          <table:table-cell office:value-type="float" office:value="3.507556" calcext:value-type="float">
            <text:p>3,507556</text:p>
          </table:table-cell>
          <table:table-cell office:value-type="float" office:value="3.5662677" calcext:value-type="float">
            <text:p>3,5662677</text:p>
          </table:table-cell>
          <table:table-cell office:value-type="float" office:value="3.5936558" calcext:value-type="float">
            <text:p>3,5936558</text:p>
          </table:table-cell>
          <table:table-cell office:value-type="float" office:value="3.673813" calcext:value-type="float">
            <text:p>3,673813</text:p>
          </table:table-cell>
          <table:table-cell office:value-type="float" office:value="3.7000325" calcext:value-type="float">
            <text:p>3,7000325</text:p>
          </table:table-cell>
          <table:table-cell office:value-type="float" office:value="3.782464" calcext:value-type="float">
            <text:p>3,782464</text:p>
          </table:table-cell>
          <table:table-cell office:value-type="float" office:value="3.8716156" calcext:value-type="float">
            <text:p>3,8716156</text:p>
          </table:table-cell>
          <table:table-cell office:value-type="float" office:value="4.024459" calcext:value-type="float">
            <text:p>4,024459</text:p>
          </table:table-cell>
          <table:table-cell office:value-type="float" office:value="4.217653" calcext:value-type="float">
            <text:p>4,217653</text:p>
          </table:table-cell>
          <table:table-cell office:value-type="float" office:value="4.509249" calcext:value-type="float">
            <text:p>4,509249</text:p>
          </table:table-cell>
          <table:table-cell office:value-type="float" office:value="3.8149152" calcext:value-type="float">
            <text:p>3,8149152</text:p>
          </table:table-cell>
          <table:table-cell office:value-type="float" office:value="3.4942977" calcext:value-type="float">
            <text:p>3,4942977</text:p>
          </table:table-cell>
          <table:table-cell office:value-type="float" office:value="3.50704" calcext:value-type="float">
            <text:p>3,50704</text:p>
          </table:table-cell>
          <table:table-cell office:value-type="float" office:value="3.5071642" calcext:value-type="float">
            <text:p>3,5071642</text:p>
          </table:table-cell>
          <table:table-cell office:value-type="float" office:value="3.5137362" calcext:value-type="float">
            <text:p>3,5137362</text:p>
          </table:table-cell>
          <table:table-cell office:value-type="float" office:value="3.5677373" calcext:value-type="float">
            <text:p>3,5677373</text:p>
          </table:table-cell>
          <table:table-cell office:value-type="float" office:value="3.5835078" calcext:value-type="float">
            <text:p>3,5835078</text:p>
          </table:table-cell>
          <table:table-cell office:value-type="float" office:value="3.6575212" calcext:value-type="float">
            <text:p>3,6575212</text:p>
          </table:table-cell>
          <table:table-cell office:value-type="float" office:value="3.7140138" calcext:value-type="float">
            <text:p>3,7140138</text:p>
          </table:table-cell>
          <table:table-cell office:value-type="float" office:value="3.8109052" calcext:value-type="float">
            <text:p>3,8109052</text:p>
          </table:table-cell>
          <table:table-cell office:value-type="float" office:value="3.808551" calcext:value-type="float">
            <text:p>3,808551</text:p>
          </table:table-cell>
          <table:table-cell office:value-type="float" office:value="4.0762787" calcext:value-type="float">
            <text:p>4,0762787</text:p>
          </table:table-cell>
          <table:table-cell office:value-type="float" office:value="4.0651665" calcext:value-type="float">
            <text:p>4,0651665</text:p>
          </table:table-cell>
          <table:table-cell office:value-type="float" office:value="4.9100227" calcext:value-type="float">
            <text:p>4,91002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a" fo:country="D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lespidser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lespidser_20_1" draw:display-name="Pilespidser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-00-0000</text:date>, <text:time>00:00:00</text:time></text:p>
        </style:region-right>
      </style:header>
      <style:header-left style:display="false"/>
      <style:header-first style:display="false"/>
      <style:footer>
        <text:p>Sid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06T18:54:02.058903322</dc:date>
    <meta:editing-duration>PT2M49S</meta:editing-duration>
    <meta:editing-cycles>1</meta:editing-cycles>
    <meta:document-statistic meta:table-count="1" meta:cell-count="1785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89.255cm" svg:height="50.205cm" xlink:href=".." xlink:type="simple" chart:class="chart:scatter" chart:style-name="ch1">
        <chart:legend chart:legend-position="end" svg:x="78.809cm" svg:y="4.136cm" style:legend-expansion="high" chart:style-name="ch2"/>
        <chart:plot-area chart:style-name="ch3" table:cell-range-address="combined.A1:combined.CG21" chart:data-source-has-labels="row" svg:x="1.785cm" svg:y="1.004cm" svg:width="75.239cm" svg:height="48.197cm">
          <chart:coordinate-region svg:x="2.221cm" svg:y="1.204cm" svg:width="74.616cm" svg:height="47.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mbined.B2:combined.B21" chart:label-cell-address="combined.B1:combined.B1" chart:class="chart:scatter">
            <chart:domain table:cell-range-address="combined.A2:combined.A21"/>
            <chart:data-point chart:repeated="20"/>
          </chart:series>
          <chart:series chart:style-name="ch7" chart:values-cell-range-address="combined.C2:combined.C21" chart:label-cell-address="combined.C1:combined.C1" chart:class="chart:scatter">
            <chart:data-point chart:repeated="20"/>
          </chart:series>
          <chart:series chart:style-name="ch8" chart:values-cell-range-address="combined.D2:combined.D21" chart:label-cell-address="combined.D1:combined.D1" chart:class="chart:scatter">
            <chart:data-point chart:repeated="20"/>
          </chart:series>
          <chart:series chart:style-name="ch9" chart:values-cell-range-address="combined.E2:combined.E21" chart:label-cell-address="combined.E1:combined.E1" chart:class="chart:scatter">
            <chart:data-point chart:repeated="20"/>
          </chart:series>
          <chart:series chart:style-name="ch10" chart:values-cell-range-address="combined.F2:combined.F21" chart:label-cell-address="combined.F1:combined.F1" chart:class="chart:scatter">
            <chart:data-point chart:repeated="20"/>
          </chart:series>
          <chart:series chart:style-name="ch11" chart:values-cell-range-address="combined.G2:combined.G21" chart:label-cell-address="combined.G1:combined.G1" chart:class="chart:scatter">
            <chart:data-point chart:repeated="20"/>
          </chart:series>
          <chart:series chart:style-name="ch12" chart:values-cell-range-address="combined.H2:combined.H21" chart:label-cell-address="combined.H1:combined.H1" chart:class="chart:scatter">
            <chart:data-point chart:repeated="20"/>
          </chart:series>
          <chart:series chart:style-name="ch13" chart:values-cell-range-address="combined.I2:combined.I21" chart:label-cell-address="combined.I1:combined.I1" chart:class="chart:scatter">
            <chart:data-point chart:repeated="20"/>
          </chart:series>
          <chart:series chart:style-name="ch14" chart:values-cell-range-address="combined.J2:combined.J21" chart:label-cell-address="combined.J1:combined.J1" chart:class="chart:scatter">
            <chart:data-point chart:repeated="20"/>
          </chart:series>
          <chart:series chart:style-name="ch15" chart:values-cell-range-address="combined.K2:combined.K21" chart:label-cell-address="combined.K1:combined.K1" chart:class="chart:scatter">
            <chart:data-point chart:repeated="20"/>
          </chart:series>
          <chart:series chart:style-name="ch16" chart:values-cell-range-address="combined.L2:combined.L21" chart:label-cell-address="combined.L1:combined.L1" chart:class="chart:scatter">
            <chart:data-point chart:repeated="20"/>
          </chart:series>
          <chart:series chart:style-name="ch17" chart:values-cell-range-address="combined.M2:combined.M21" chart:label-cell-address="combined.M1:combined.M1" chart:class="chart:scatter">
            <chart:data-point chart:repeated="20"/>
          </chart:series>
          <chart:series chart:style-name="ch18" chart:values-cell-range-address="combined.N2:combined.N21" chart:label-cell-address="combined.N1:combined.N1" chart:class="chart:scatter">
            <chart:data-point chart:repeated="20"/>
          </chart:series>
          <chart:series chart:style-name="ch19" chart:values-cell-range-address="combined.O2:combined.O21" chart:label-cell-address="combined.O1:combined.O1" chart:class="chart:scatter">
            <chart:data-point chart:repeated="20"/>
          </chart:series>
          <chart:series chart:style-name="ch20" chart:values-cell-range-address="combined.P2:combined.P21" chart:label-cell-address="combined.P1:combined.P1" chart:class="chart:scatter">
            <chart:data-point chart:repeated="20"/>
          </chart:series>
          <chart:series chart:style-name="ch9" chart:values-cell-range-address="combined.Q2:combined.Q21" chart:label-cell-address="combined.Q1:combined.Q1" chart:class="chart:scatter">
            <chart:data-point chart:repeated="20"/>
          </chart:series>
          <chart:series chart:style-name="ch10" chart:values-cell-range-address="combined.R2:combined.R21" chart:label-cell-address="combined.R1:combined.R1" chart:class="chart:scatter">
            <chart:data-point chart:repeated="20"/>
          </chart:series>
          <chart:series chart:style-name="ch11" chart:values-cell-range-address="combined.S2:combined.S21" chart:label-cell-address="combined.S1:combined.S1" chart:class="chart:scatter">
            <chart:data-point chart:repeated="20"/>
          </chart:series>
          <chart:series chart:style-name="ch12" chart:values-cell-range-address="combined.T2:combined.T21" chart:label-cell-address="combined.T1:combined.T1" chart:class="chart:scatter">
            <chart:data-point chart:repeated="20"/>
          </chart:series>
          <chart:series chart:style-name="ch13" chart:values-cell-range-address="combined.U2:combined.U21" chart:label-cell-address="combined.U1:combined.U1" chart:class="chart:scatter">
            <chart:data-point chart:repeated="20"/>
          </chart:series>
          <chart:series chart:style-name="ch14" chart:values-cell-range-address="combined.V2:combined.V21" chart:label-cell-address="combined.V1:combined.V1" chart:class="chart:scatter">
            <chart:data-point chart:repeated="20"/>
          </chart:series>
          <chart:series chart:style-name="ch15" chart:values-cell-range-address="combined.W2:combined.W21" chart:label-cell-address="combined.W1:combined.W1" chart:class="chart:scatter">
            <chart:data-point chart:repeated="20"/>
          </chart:series>
          <chart:series chart:style-name="ch16" chart:values-cell-range-address="combined.X2:combined.X21" chart:label-cell-address="combined.X1:combined.X1" chart:class="chart:scatter">
            <chart:data-point chart:repeated="20"/>
          </chart:series>
          <chart:series chart:style-name="ch17" chart:values-cell-range-address="combined.Y2:combined.Y21" chart:label-cell-address="combined.Y1:combined.Y1" chart:class="chart:scatter">
            <chart:data-point chart:repeated="20"/>
          </chart:series>
          <chart:series chart:style-name="ch18" chart:values-cell-range-address="combined.Z2:combined.Z21" chart:label-cell-address="combined.Z1:combined.Z1" chart:class="chart:scatter">
            <chart:data-point chart:repeated="20"/>
          </chart:series>
          <chart:series chart:style-name="ch19" chart:values-cell-range-address="combined.AA2:combined.AA21" chart:label-cell-address="combined.AA1:combined.AA1" chart:class="chart:scatter">
            <chart:data-point chart:repeated="20"/>
          </chart:series>
          <chart:series chart:style-name="ch20" chart:values-cell-range-address="combined.AB2:combined.AB21" chart:label-cell-address="combined.AB1:combined.AB1" chart:class="chart:scatter">
            <chart:data-point chart:repeated="20"/>
          </chart:series>
          <chart:series chart:style-name="ch9" chart:values-cell-range-address="combined.AC2:combined.AC21" chart:label-cell-address="combined.AC1:combined.AC1" chart:class="chart:scatter">
            <chart:data-point chart:repeated="20"/>
          </chart:series>
          <chart:series chart:style-name="ch10" chart:values-cell-range-address="combined.AD2:combined.AD21" chart:label-cell-address="combined.AD1:combined.AD1" chart:class="chart:scatter">
            <chart:data-point chart:repeated="20"/>
          </chart:series>
          <chart:series chart:style-name="ch11" chart:values-cell-range-address="combined.AE2:combined.AE21" chart:label-cell-address="combined.AE1:combined.AE1" chart:class="chart:scatter">
            <chart:data-point chart:repeated="20"/>
          </chart:series>
          <chart:series chart:style-name="ch12" chart:values-cell-range-address="combined.AF2:combined.AF21" chart:label-cell-address="combined.AF1:combined.AF1" chart:class="chart:scatter">
            <chart:data-point chart:repeated="20"/>
          </chart:series>
          <chart:series chart:style-name="ch13" chart:values-cell-range-address="combined.AG2:combined.AG21" chart:label-cell-address="combined.AG1:combined.AG1" chart:class="chart:scatter">
            <chart:data-point chart:repeated="20"/>
          </chart:series>
          <chart:series chart:style-name="ch14" chart:values-cell-range-address="combined.AH2:combined.AH21" chart:label-cell-address="combined.AH1:combined.AH1" chart:class="chart:scatter">
            <chart:data-point chart:repeated="20"/>
          </chart:series>
          <chart:series chart:style-name="ch15" chart:values-cell-range-address="combined.AI2:combined.AI21" chart:label-cell-address="combined.AI1:combined.AI1" chart:class="chart:scatter">
            <chart:data-point chart:repeated="20"/>
          </chart:series>
          <chart:series chart:style-name="ch16" chart:values-cell-range-address="combined.AJ2:combined.AJ21" chart:label-cell-address="combined.AJ1:combined.AJ1" chart:class="chart:scatter">
            <chart:data-point chart:repeated="20"/>
          </chart:series>
          <chart:series chart:style-name="ch17" chart:values-cell-range-address="combined.AK2:combined.AK21" chart:label-cell-address="combined.AK1:combined.AK1" chart:class="chart:scatter">
            <chart:data-point chart:repeated="20"/>
          </chart:series>
          <chart:series chart:style-name="ch18" chart:values-cell-range-address="combined.AL2:combined.AL21" chart:label-cell-address="combined.AL1:combined.AL1" chart:class="chart:scatter">
            <chart:data-point chart:repeated="20"/>
          </chart:series>
          <chart:series chart:style-name="ch19" chart:values-cell-range-address="combined.AM2:combined.AM21" chart:label-cell-address="combined.AM1:combined.AM1" chart:class="chart:scatter">
            <chart:data-point chart:repeated="20"/>
          </chart:series>
          <chart:series chart:style-name="ch20" chart:values-cell-range-address="combined.AN2:combined.AN21" chart:label-cell-address="combined.AN1:combined.AN1" chart:class="chart:scatter">
            <chart:data-point chart:repeated="20"/>
          </chart:series>
          <chart:series chart:style-name="ch9" chart:values-cell-range-address="combined.AO2:combined.AO21" chart:label-cell-address="combined.AO1:combined.AO1" chart:class="chart:scatter">
            <chart:data-point chart:repeated="20"/>
          </chart:series>
          <chart:series chart:style-name="ch10" chart:values-cell-range-address="combined.AP2:combined.AP21" chart:label-cell-address="combined.AP1:combined.AP1" chart:class="chart:scatter">
            <chart:data-point chart:repeated="20"/>
          </chart:series>
          <chart:series chart:style-name="ch11" chart:values-cell-range-address="combined.AQ2:combined.AQ21" chart:label-cell-address="combined.AQ1:combined.AQ1" chart:class="chart:scatter">
            <chart:data-point chart:repeated="20"/>
          </chart:series>
          <chart:series chart:style-name="ch12" chart:values-cell-range-address="combined.AR2:combined.AR21" chart:label-cell-address="combined.AR1:combined.AR1" chart:class="chart:scatter">
            <chart:data-point chart:repeated="20"/>
          </chart:series>
          <chart:series chart:style-name="ch13" chart:values-cell-range-address="combined.AS2:combined.AS21" chart:label-cell-address="combined.AS1:combined.AS1" chart:class="chart:scatter">
            <chart:data-point chart:repeated="20"/>
          </chart:series>
          <chart:series chart:style-name="ch14" chart:values-cell-range-address="combined.AT2:combined.AT21" chart:label-cell-address="combined.AT1:combined.AT1" chart:class="chart:scatter">
            <chart:data-point chart:repeated="20"/>
          </chart:series>
          <chart:series chart:style-name="ch15" chart:values-cell-range-address="combined.AU2:combined.AU21" chart:label-cell-address="combined.AU1:combined.AU1" chart:class="chart:scatter">
            <chart:data-point chart:repeated="20"/>
          </chart:series>
          <chart:series chart:style-name="ch16" chart:values-cell-range-address="combined.AV2:combined.AV21" chart:label-cell-address="combined.AV1:combined.AV1" chart:class="chart:scatter">
            <chart:data-point chart:repeated="20"/>
          </chart:series>
          <chart:series chart:style-name="ch17" chart:values-cell-range-address="combined.AW2:combined.AW21" chart:label-cell-address="combined.AW1:combined.AW1" chart:class="chart:scatter">
            <chart:data-point chart:repeated="20"/>
          </chart:series>
          <chart:series chart:style-name="ch18" chart:values-cell-range-address="combined.AX2:combined.AX21" chart:label-cell-address="combined.AX1:combined.AX1" chart:class="chart:scatter">
            <chart:data-point chart:repeated="20"/>
          </chart:series>
          <chart:series chart:style-name="ch19" chart:values-cell-range-address="combined.AY2:combined.AY21" chart:label-cell-address="combined.AY1:combined.AY1" chart:class="chart:scatter">
            <chart:data-point chart:repeated="20"/>
          </chart:series>
          <chart:series chart:style-name="ch20" chart:values-cell-range-address="combined.AZ2:combined.AZ21" chart:label-cell-address="combined.AZ1:combined.AZ1" chart:class="chart:scatter">
            <chart:data-point chart:repeated="20"/>
          </chart:series>
          <chart:series chart:style-name="ch9" chart:values-cell-range-address="combined.BA2:combined.BA21" chart:label-cell-address="combined.BA1:combined.BA1" chart:class="chart:scatter">
            <chart:data-point chart:repeated="20"/>
          </chart:series>
          <chart:series chart:style-name="ch10" chart:values-cell-range-address="combined.BB2:combined.BB21" chart:label-cell-address="combined.BB1:combined.BB1" chart:class="chart:scatter">
            <chart:data-point chart:repeated="20"/>
          </chart:series>
          <chart:series chart:style-name="ch11" chart:values-cell-range-address="combined.BC2:combined.BC21" chart:label-cell-address="combined.BC1:combined.BC1" chart:class="chart:scatter">
            <chart:data-point chart:repeated="20"/>
          </chart:series>
          <chart:series chart:style-name="ch12" chart:values-cell-range-address="combined.BD2:combined.BD21" chart:label-cell-address="combined.BD1:combined.BD1" chart:class="chart:scatter">
            <chart:data-point chart:repeated="20"/>
          </chart:series>
          <chart:series chart:style-name="ch13" chart:values-cell-range-address="combined.BE2:combined.BE21" chart:label-cell-address="combined.BE1:combined.BE1" chart:class="chart:scatter">
            <chart:data-point chart:repeated="20"/>
          </chart:series>
          <chart:series chart:style-name="ch14" chart:values-cell-range-address="combined.BF2:combined.BF21" chart:label-cell-address="combined.BF1:combined.BF1" chart:class="chart:scatter">
            <chart:data-point chart:repeated="20"/>
          </chart:series>
          <chart:series chart:style-name="ch15" chart:values-cell-range-address="combined.BG2:combined.BG21" chart:label-cell-address="combined.BG1:combined.BG1" chart:class="chart:scatter">
            <chart:data-point chart:repeated="20"/>
          </chart:series>
          <chart:series chart:style-name="ch16" chart:values-cell-range-address="combined.BH2:combined.BH21" chart:label-cell-address="combined.BH1:combined.BH1" chart:class="chart:scatter">
            <chart:data-point chart:repeated="20"/>
          </chart:series>
          <chart:series chart:style-name="ch17" chart:values-cell-range-address="combined.BI2:combined.BI21" chart:label-cell-address="combined.BI1:combined.BI1" chart:class="chart:scatter">
            <chart:data-point chart:repeated="20"/>
          </chart:series>
          <chart:series chart:style-name="ch18" chart:values-cell-range-address="combined.BJ2:combined.BJ21" chart:label-cell-address="combined.BJ1:combined.BJ1" chart:class="chart:scatter">
            <chart:data-point chart:repeated="20"/>
          </chart:series>
          <chart:series chart:style-name="ch19" chart:values-cell-range-address="combined.BK2:combined.BK21" chart:label-cell-address="combined.BK1:combined.BK1" chart:class="chart:scatter">
            <chart:data-point chart:repeated="20"/>
          </chart:series>
          <chart:series chart:style-name="ch20" chart:values-cell-range-address="combined.BL2:combined.BL21" chart:label-cell-address="combined.BL1:combined.BL1" chart:class="chart:scatter">
            <chart:data-point chart:repeated="20"/>
          </chart:series>
          <chart:series chart:style-name="ch9" chart:values-cell-range-address="combined.BM2:combined.BM21" chart:label-cell-address="combined.BM1:combined.BM1" chart:class="chart:scatter">
            <chart:data-point chart:repeated="20"/>
          </chart:series>
          <chart:series chart:style-name="ch10" chart:values-cell-range-address="combined.BN2:combined.BN21" chart:label-cell-address="combined.BN1:combined.BN1" chart:class="chart:scatter">
            <chart:data-point chart:repeated="20"/>
          </chart:series>
          <chart:series chart:style-name="ch11" chart:values-cell-range-address="combined.BO2:combined.BO21" chart:label-cell-address="combined.BO1:combined.BO1" chart:class="chart:scatter">
            <chart:data-point chart:repeated="20"/>
          </chart:series>
          <chart:series chart:style-name="ch12" chart:values-cell-range-address="combined.BP2:combined.BP21" chart:label-cell-address="combined.BP1:combined.BP1" chart:class="chart:scatter">
            <chart:data-point chart:repeated="20"/>
          </chart:series>
          <chart:series chart:style-name="ch13" chart:values-cell-range-address="combined.BQ2:combined.BQ21" chart:label-cell-address="combined.BQ1:combined.BQ1" chart:class="chart:scatter">
            <chart:data-point chart:repeated="20"/>
          </chart:series>
          <chart:series chart:style-name="ch14" chart:values-cell-range-address="combined.BR2:combined.BR21" chart:label-cell-address="combined.BR1:combined.BR1" chart:class="chart:scatter">
            <chart:data-point chart:repeated="20"/>
          </chart:series>
          <chart:series chart:style-name="ch15" chart:values-cell-range-address="combined.BS2:combined.BS21" chart:label-cell-address="combined.BS1:combined.BS1" chart:class="chart:scatter">
            <chart:data-point chart:repeated="20"/>
          </chart:series>
          <chart:series chart:style-name="ch16" chart:values-cell-range-address="combined.BT2:combined.BT21" chart:label-cell-address="combined.BT1:combined.BT1" chart:class="chart:scatter">
            <chart:data-point chart:repeated="20"/>
          </chart:series>
          <chart:series chart:style-name="ch17" chart:values-cell-range-address="combined.BU2:combined.BU21" chart:label-cell-address="combined.BU1:combined.BU1" chart:class="chart:scatter">
            <chart:data-point chart:repeated="20"/>
          </chart:series>
          <chart:series chart:style-name="ch18" chart:values-cell-range-address="combined.BV2:combined.BV21" chart:label-cell-address="combined.BV1:combined.BV1" chart:class="chart:scatter">
            <chart:data-point chart:repeated="20"/>
          </chart:series>
          <chart:series chart:style-name="ch19" chart:values-cell-range-address="combined.BW2:combined.BW21" chart:label-cell-address="combined.BW1:combined.BW1" chart:class="chart:scatter">
            <chart:data-point chart:repeated="20"/>
          </chart:series>
          <chart:series chart:style-name="ch20" chart:values-cell-range-address="combined.BX2:combined.BX21" chart:label-cell-address="combined.BX1:combined.BX1" chart:class="chart:scatter">
            <chart:data-point chart:repeated="20"/>
          </chart:series>
          <chart:series chart:style-name="ch9" chart:values-cell-range-address="combined.BY2:combined.BY21" chart:label-cell-address="combined.BY1:combined.BY1" chart:class="chart:scatter">
            <chart:data-point chart:repeated="20"/>
          </chart:series>
          <chart:series chart:style-name="ch10" chart:values-cell-range-address="combined.BZ2:combined.BZ21" chart:label-cell-address="combined.BZ1:combined.BZ1" chart:class="chart:scatter">
            <chart:data-point chart:repeated="20"/>
          </chart:series>
          <chart:series chart:style-name="ch11" chart:values-cell-range-address="combined.CA2:combined.CA21" chart:label-cell-address="combined.CA1:combined.CA1" chart:class="chart:scatter">
            <chart:data-point chart:repeated="20"/>
          </chart:series>
          <chart:series chart:style-name="ch12" chart:values-cell-range-address="combined.CB2:combined.CB21" chart:label-cell-address="combined.CB1:combined.CB1" chart:class="chart:scatter">
            <chart:data-point chart:repeated="20"/>
          </chart:series>
          <chart:series chart:style-name="ch13" chart:values-cell-range-address="combined.CC2:combined.CC21" chart:label-cell-address="combined.CC1:combined.CC1" chart:class="chart:scatter">
            <chart:data-point chart:repeated="20"/>
          </chart:series>
          <chart:series chart:style-name="ch14" chart:values-cell-range-address="combined.CD2:combined.CD21" chart:label-cell-address="combined.CD1:combined.CD1" chart:class="chart:scatter">
            <chart:data-point chart:repeated="20"/>
          </chart:series>
          <chart:series chart:style-name="ch15" chart:values-cell-range-address="combined.CE2:combined.CE21" chart:label-cell-address="combined.CE1:combined.CE1" chart:class="chart:scatter">
            <chart:data-point chart:repeated="20"/>
          </chart:series>
          <chart:series chart:style-name="ch16" chart:values-cell-range-address="combined.CF2:combined.CF21" chart:label-cell-address="combined.CF1:combined.CF1" chart:class="chart:scatter">
            <chart:data-point chart:repeated="20"/>
          </chart:series>
          <chart:series chart:style-name="ch17" chart:values-cell-range-address="combined.CG2:combined.CG21" chart:label-cell-address="combined.CG1:combined.CG1" chart:class="chart:scatter">
            <chart:data-point chart:repeated="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A</text:p>
              </table:table-cell>
              <table:table-cell office:value-type="string">
                <text:p>noise_0.009999999776482582_ln_0.0</text:p>
                <draw:g>
                  <svg:desc>combined.B1:combined.B1</svg:desc>
                </draw:g>
              </table:table-cell>
              <table:table-cell office:value-type="string">
                <text:p>noise_0.009999999776482582_ln_0.007499999832361937</text:p>
                <draw:g>
                  <svg:desc>combined.C1:combined.C1</svg:desc>
                </draw:g>
              </table:table-cell>
              <table:table-cell office:value-type="string">
                <text:p>noise_0.009999999776482582_ln_0.014999999664723873</text:p>
                <draw:g>
                  <svg:desc>combined.D1:combined.D1</svg:desc>
                </draw:g>
              </table:table-cell>
              <table:table-cell office:value-type="string">
                <text:p>noise_0.009999999776482582_ln_0.022499999031424522</text:p>
                <draw:g>
                  <svg:desc>combined.E1:combined.E1</svg:desc>
                </draw:g>
              </table:table-cell>
              <table:table-cell office:value-type="string">
                <text:p>noise_0.009999999776482582_ln_0.029999999329447746</text:p>
                <draw:g>
                  <svg:desc>combined.F1:combined.F1</svg:desc>
                </draw:g>
              </table:table-cell>
              <table:table-cell office:value-type="string">
                <text:p>noise_0.009999999776482582_ln_0.03749999776482582</text:p>
                <draw:g>
                  <svg:desc>combined.G1:combined.G1</svg:desc>
                </draw:g>
              </table:table-cell>
              <table:table-cell office:value-type="string">
                <text:p>noise_0.009999999776482582_ln_0.044999998062849045</text:p>
                <draw:g>
                  <svg:desc>combined.H1:combined.H1</svg:desc>
                </draw:g>
              </table:table-cell>
              <table:table-cell office:value-type="string">
                <text:p>noise_0.009999999776482582_ln_0.05249999836087227</text:p>
                <draw:g>
                  <svg:desc>combined.I1:combined.I1</svg:desc>
                </draw:g>
              </table:table-cell>
              <table:table-cell office:value-type="string">
                <text:p>noise_0.009999999776482582_ln_0.05999999865889549</text:p>
                <draw:g>
                  <svg:desc>combined.J1:combined.J1</svg:desc>
                </draw:g>
              </table:table-cell>
              <table:table-cell office:value-type="string">
                <text:p>noise_0.009999999776482582_ln_0.06749999523162842</text:p>
                <draw:g>
                  <svg:desc>combined.K1:combined.K1</svg:desc>
                </draw:g>
              </table:table-cell>
              <table:table-cell office:value-type="string">
                <text:p>noise_0.009999999776482582_ln_0.07499999552965164</text:p>
                <draw:g>
                  <svg:desc>combined.L1:combined.L1</svg:desc>
                </draw:g>
              </table:table-cell>
              <table:table-cell office:value-type="string">
                <text:p>noise_0.009999999776482582_ln_0.08249999582767487</text:p>
                <draw:g>
                  <svg:desc>combined.M1:combined.M1</svg:desc>
                </draw:g>
              </table:table-cell>
              <table:table-cell office:value-type="string">
                <text:p>noise_0.009999999776482582_ln_0.08999999612569809</text:p>
                <draw:g>
                  <svg:desc>combined.N1:combined.N1</svg:desc>
                </draw:g>
              </table:table-cell>
              <table:table-cell office:value-type="string">
                <text:p>noise_0.009999999776482582_ln_0.09749999642372131</text:p>
                <draw:g>
                  <svg:desc>combined.O1:combined.O1</svg:desc>
                </draw:g>
              </table:table-cell>
              <table:table-cell office:value-type="string">
                <text:p>noise_0.017500000074505806_ln_0.0</text:p>
                <draw:g>
                  <svg:desc>combined.P1:combined.P1</svg:desc>
                </draw:g>
              </table:table-cell>
              <table:table-cell office:value-type="string">
                <text:p>noise_0.017500000074505806_ln_0.007499999832361937</text:p>
                <draw:g>
                  <svg:desc>combined.Q1:combined.Q1</svg:desc>
                </draw:g>
              </table:table-cell>
              <table:table-cell office:value-type="string">
                <text:p>noise_0.017500000074505806_ln_0.014999999664723873</text:p>
                <draw:g>
                  <svg:desc>combined.R1:combined.R1</svg:desc>
                </draw:g>
              </table:table-cell>
              <table:table-cell office:value-type="string">
                <text:p>noise_0.017500000074505806_ln_0.022499999031424522</text:p>
                <draw:g>
                  <svg:desc>combined.S1:combined.S1</svg:desc>
                </draw:g>
              </table:table-cell>
              <table:table-cell office:value-type="string">
                <text:p>noise_0.017500000074505806_ln_0.029999999329447746</text:p>
                <draw:g>
                  <svg:desc>combined.T1:combined.T1</svg:desc>
                </draw:g>
              </table:table-cell>
              <table:table-cell office:value-type="string">
                <text:p>noise_0.017500000074505806_ln_0.03749999776482582</text:p>
                <draw:g>
                  <svg:desc>combined.U1:combined.U1</svg:desc>
                </draw:g>
              </table:table-cell>
              <table:table-cell office:value-type="string">
                <text:p>noise_0.017500000074505806_ln_0.044999998062849045</text:p>
                <draw:g>
                  <svg:desc>combined.V1:combined.V1</svg:desc>
                </draw:g>
              </table:table-cell>
              <table:table-cell office:value-type="string">
                <text:p>noise_0.017500000074505806_ln_0.05249999836087227</text:p>
                <draw:g>
                  <svg:desc>combined.W1:combined.W1</svg:desc>
                </draw:g>
              </table:table-cell>
              <table:table-cell office:value-type="string">
                <text:p>noise_0.017500000074505806_ln_0.05999999865889549</text:p>
                <draw:g>
                  <svg:desc>combined.X1:combined.X1</svg:desc>
                </draw:g>
              </table:table-cell>
              <table:table-cell office:value-type="string">
                <text:p>noise_0.017500000074505806_ln_0.06749999523162842</text:p>
                <draw:g>
                  <svg:desc>combined.Y1:combined.Y1</svg:desc>
                </draw:g>
              </table:table-cell>
              <table:table-cell office:value-type="string">
                <text:p>noise_0.017500000074505806_ln_0.07499999552965164</text:p>
                <draw:g>
                  <svg:desc>combined.Z1:combined.Z1</svg:desc>
                </draw:g>
              </table:table-cell>
              <table:table-cell office:value-type="string">
                <text:p>noise_0.017500000074505806_ln_0.08249999582767487</text:p>
                <draw:g>
                  <svg:desc>combined.AA1:combined.AA1</svg:desc>
                </draw:g>
              </table:table-cell>
              <table:table-cell office:value-type="string">
                <text:p>noise_0.017500000074505806_ln_0.08999999612569809</text:p>
                <draw:g>
                  <svg:desc>combined.AB1:combined.AB1</svg:desc>
                </draw:g>
              </table:table-cell>
              <table:table-cell office:value-type="string">
                <text:p>noise_0.017500000074505806_ln_0.09749999642372131</text:p>
                <draw:g>
                  <svg:desc>combined.AC1:combined.AC1</svg:desc>
                </draw:g>
              </table:table-cell>
              <table:table-cell office:value-type="string">
                <text:p>noise_0.02500000037252903_ln_0.0</text:p>
                <draw:g>
                  <svg:desc>combined.AD1:combined.AD1</svg:desc>
                </draw:g>
              </table:table-cell>
              <table:table-cell office:value-type="string">
                <text:p>noise_0.02500000037252903_ln_0.007499999832361937</text:p>
                <draw:g>
                  <svg:desc>combined.AE1:combined.AE1</svg:desc>
                </draw:g>
              </table:table-cell>
              <table:table-cell office:value-type="string">
                <text:p>noise_0.02500000037252903_ln_0.014999999664723873</text:p>
                <draw:g>
                  <svg:desc>combined.AF1:combined.AF1</svg:desc>
                </draw:g>
              </table:table-cell>
              <table:table-cell office:value-type="string">
                <text:p>noise_0.02500000037252903_ln_0.022499999031424522</text:p>
                <draw:g>
                  <svg:desc>combined.AG1:combined.AG1</svg:desc>
                </draw:g>
              </table:table-cell>
              <table:table-cell office:value-type="string">
                <text:p>noise_0.02500000037252903_ln_0.029999999329447746</text:p>
                <draw:g>
                  <svg:desc>combined.AH1:combined.AH1</svg:desc>
                </draw:g>
              </table:table-cell>
              <table:table-cell office:value-type="string">
                <text:p>noise_0.02500000037252903_ln_0.03749999776482582</text:p>
                <draw:g>
                  <svg:desc>combined.AI1:combined.AI1</svg:desc>
                </draw:g>
              </table:table-cell>
              <table:table-cell office:value-type="string">
                <text:p>noise_0.02500000037252903_ln_0.044999998062849045</text:p>
                <draw:g>
                  <svg:desc>combined.AJ1:combined.AJ1</svg:desc>
                </draw:g>
              </table:table-cell>
              <table:table-cell office:value-type="string">
                <text:p>noise_0.02500000037252903_ln_0.05249999836087227</text:p>
                <draw:g>
                  <svg:desc>combined.AK1:combined.AK1</svg:desc>
                </draw:g>
              </table:table-cell>
              <table:table-cell office:value-type="string">
                <text:p>noise_0.02500000037252903_ln_0.05999999865889549</text:p>
                <draw:g>
                  <svg:desc>combined.AL1:combined.AL1</svg:desc>
                </draw:g>
              </table:table-cell>
              <table:table-cell office:value-type="string">
                <text:p>noise_0.02500000037252903_ln_0.06749999523162842</text:p>
                <draw:g>
                  <svg:desc>combined.AM1:combined.AM1</svg:desc>
                </draw:g>
              </table:table-cell>
              <table:table-cell office:value-type="string">
                <text:p>noise_0.02500000037252903_ln_0.07499999552965164</text:p>
                <draw:g>
                  <svg:desc>combined.AN1:combined.AN1</svg:desc>
                </draw:g>
              </table:table-cell>
              <table:table-cell office:value-type="string">
                <text:p>noise_0.02500000037252903_ln_0.08249999582767487</text:p>
                <draw:g>
                  <svg:desc>combined.AO1:combined.AO1</svg:desc>
                </draw:g>
              </table:table-cell>
              <table:table-cell office:value-type="string">
                <text:p>noise_0.02500000037252903_ln_0.08999999612569809</text:p>
                <draw:g>
                  <svg:desc>combined.AP1:combined.AP1</svg:desc>
                </draw:g>
              </table:table-cell>
              <table:table-cell office:value-type="string">
                <text:p>noise_0.02500000037252903_ln_0.09749999642372131</text:p>
                <draw:g>
                  <svg:desc>combined.AQ1:combined.AQ1</svg:desc>
                </draw:g>
              </table:table-cell>
              <table:table-cell office:value-type="string">
                <text:p>noise_0.032499998807907104_ln_0.0</text:p>
                <draw:g>
                  <svg:desc>combined.AR1:combined.AR1</svg:desc>
                </draw:g>
              </table:table-cell>
              <table:table-cell office:value-type="string">
                <text:p>noise_0.032499998807907104_ln_0.007499999832361937</text:p>
                <draw:g>
                  <svg:desc>combined.AS1:combined.AS1</svg:desc>
                </draw:g>
              </table:table-cell>
              <table:table-cell office:value-type="string">
                <text:p>noise_0.032499998807907104_ln_0.014999999664723873</text:p>
                <draw:g>
                  <svg:desc>combined.AT1:combined.AT1</svg:desc>
                </draw:g>
              </table:table-cell>
              <table:table-cell office:value-type="string">
                <text:p>noise_0.032499998807907104_ln_0.022499999031424522</text:p>
                <draw:g>
                  <svg:desc>combined.AU1:combined.AU1</svg:desc>
                </draw:g>
              </table:table-cell>
              <table:table-cell office:value-type="string">
                <text:p>noise_0.032499998807907104_ln_0.029999999329447746</text:p>
                <draw:g>
                  <svg:desc>combined.AV1:combined.AV1</svg:desc>
                </draw:g>
              </table:table-cell>
              <table:table-cell office:value-type="string">
                <text:p>noise_0.032499998807907104_ln_0.03749999776482582</text:p>
                <draw:g>
                  <svg:desc>combined.AW1:combined.AW1</svg:desc>
                </draw:g>
              </table:table-cell>
              <table:table-cell office:value-type="string">
                <text:p>noise_0.032499998807907104_ln_0.044999998062849045</text:p>
                <draw:g>
                  <svg:desc>combined.AX1:combined.AX1</svg:desc>
                </draw:g>
              </table:table-cell>
              <table:table-cell office:value-type="string">
                <text:p>noise_0.032499998807907104_ln_0.05249999836087227</text:p>
                <draw:g>
                  <svg:desc>combined.AY1:combined.AY1</svg:desc>
                </draw:g>
              </table:table-cell>
              <table:table-cell office:value-type="string">
                <text:p>noise_0.032499998807907104_ln_0.05999999865889549</text:p>
                <draw:g>
                  <svg:desc>combined.AZ1:combined.AZ1</svg:desc>
                </draw:g>
              </table:table-cell>
              <table:table-cell office:value-type="string">
                <text:p>noise_0.032499998807907104_ln_0.06749999523162842</text:p>
                <draw:g>
                  <svg:desc>combined.BA1:combined.BA1</svg:desc>
                </draw:g>
              </table:table-cell>
              <table:table-cell office:value-type="string">
                <text:p>noise_0.032499998807907104_ln_0.07499999552965164</text:p>
                <draw:g>
                  <svg:desc>combined.BB1:combined.BB1</svg:desc>
                </draw:g>
              </table:table-cell>
              <table:table-cell office:value-type="string">
                <text:p>noise_0.032499998807907104_ln_0.08249999582767487</text:p>
                <draw:g>
                  <svg:desc>combined.BC1:combined.BC1</svg:desc>
                </draw:g>
              </table:table-cell>
              <table:table-cell office:value-type="string">
                <text:p>noise_0.032499998807907104_ln_0.08999999612569809</text:p>
                <draw:g>
                  <svg:desc>combined.BD1:combined.BD1</svg:desc>
                </draw:g>
              </table:table-cell>
              <table:table-cell office:value-type="string">
                <text:p>noise_0.032499998807907104_ln_0.09749999642372131</text:p>
                <draw:g>
                  <svg:desc>combined.BE1:combined.BE1</svg:desc>
                </draw:g>
              </table:table-cell>
              <table:table-cell office:value-type="string">
                <text:p>noise_0.03999999910593033_ln_0.0</text:p>
                <draw:g>
                  <svg:desc>combined.BF1:combined.BF1</svg:desc>
                </draw:g>
              </table:table-cell>
              <table:table-cell office:value-type="string">
                <text:p>noise_0.03999999910593033_ln_0.007499999832361937</text:p>
                <draw:g>
                  <svg:desc>combined.BG1:combined.BG1</svg:desc>
                </draw:g>
              </table:table-cell>
              <table:table-cell office:value-type="string">
                <text:p>noise_0.03999999910593033_ln_0.014999999664723873</text:p>
                <draw:g>
                  <svg:desc>combined.BH1:combined.BH1</svg:desc>
                </draw:g>
              </table:table-cell>
              <table:table-cell office:value-type="string">
                <text:p>noise_0.03999999910593033_ln_0.022499999031424522</text:p>
                <draw:g>
                  <svg:desc>combined.BI1:combined.BI1</svg:desc>
                </draw:g>
              </table:table-cell>
              <table:table-cell office:value-type="string">
                <text:p>noise_0.03999999910593033_ln_0.029999999329447746</text:p>
                <draw:g>
                  <svg:desc>combined.BJ1:combined.BJ1</svg:desc>
                </draw:g>
              </table:table-cell>
              <table:table-cell office:value-type="string">
                <text:p>noise_0.03999999910593033_ln_0.03749999776482582</text:p>
                <draw:g>
                  <svg:desc>combined.BK1:combined.BK1</svg:desc>
                </draw:g>
              </table:table-cell>
              <table:table-cell office:value-type="string">
                <text:p>noise_0.03999999910593033_ln_0.044999998062849045</text:p>
                <draw:g>
                  <svg:desc>combined.BL1:combined.BL1</svg:desc>
                </draw:g>
              </table:table-cell>
              <table:table-cell office:value-type="string">
                <text:p>noise_0.03999999910593033_ln_0.05249999836087227</text:p>
                <draw:g>
                  <svg:desc>combined.BM1:combined.BM1</svg:desc>
                </draw:g>
              </table:table-cell>
              <table:table-cell office:value-type="string">
                <text:p>noise_0.03999999910593033_ln_0.05999999865889549</text:p>
                <draw:g>
                  <svg:desc>combined.BN1:combined.BN1</svg:desc>
                </draw:g>
              </table:table-cell>
              <table:table-cell office:value-type="string">
                <text:p>noise_0.03999999910593033_ln_0.06749999523162842</text:p>
                <draw:g>
                  <svg:desc>combined.BO1:combined.BO1</svg:desc>
                </draw:g>
              </table:table-cell>
              <table:table-cell office:value-type="string">
                <text:p>noise_0.03999999910593033_ln_0.07499999552965164</text:p>
                <draw:g>
                  <svg:desc>combined.BP1:combined.BP1</svg:desc>
                </draw:g>
              </table:table-cell>
              <table:table-cell office:value-type="string">
                <text:p>noise_0.03999999910593033_ln_0.08249999582767487</text:p>
                <draw:g>
                  <svg:desc>combined.BQ1:combined.BQ1</svg:desc>
                </draw:g>
              </table:table-cell>
              <table:table-cell office:value-type="string">
                <text:p>noise_0.03999999910593033_ln_0.08999999612569809</text:p>
                <draw:g>
                  <svg:desc>combined.BR1:combined.BR1</svg:desc>
                </draw:g>
              </table:table-cell>
              <table:table-cell office:value-type="string">
                <text:p>noise_0.03999999910593033_ln_0.09749999642372131</text:p>
                <draw:g>
                  <svg:desc>combined.BS1:combined.BS1</svg:desc>
                </draw:g>
              </table:table-cell>
              <table:table-cell office:value-type="string">
                <text:p>noise_0.04749999940395355_ln_0.0</text:p>
                <draw:g>
                  <svg:desc>combined.BT1:combined.BT1</svg:desc>
                </draw:g>
              </table:table-cell>
              <table:table-cell office:value-type="string">
                <text:p>noise_0.04749999940395355_ln_0.007499999832361937</text:p>
                <draw:g>
                  <svg:desc>combined.BU1:combined.BU1</svg:desc>
                </draw:g>
              </table:table-cell>
              <table:table-cell office:value-type="string">
                <text:p>noise_0.04749999940395355_ln_0.014999999664723873</text:p>
                <draw:g>
                  <svg:desc>combined.BV1:combined.BV1</svg:desc>
                </draw:g>
              </table:table-cell>
              <table:table-cell office:value-type="string">
                <text:p>noise_0.04749999940395355_ln_0.022499999031424522</text:p>
                <draw:g>
                  <svg:desc>combined.BW1:combined.BW1</svg:desc>
                </draw:g>
              </table:table-cell>
              <table:table-cell office:value-type="string">
                <text:p>noise_0.04749999940395355_ln_0.029999999329447746</text:p>
                <draw:g>
                  <svg:desc>combined.BX1:combined.BX1</svg:desc>
                </draw:g>
              </table:table-cell>
              <table:table-cell office:value-type="string">
                <text:p>noise_0.04749999940395355_ln_0.03749999776482582</text:p>
                <draw:g>
                  <svg:desc>combined.BY1:combined.BY1</svg:desc>
                </draw:g>
              </table:table-cell>
              <table:table-cell office:value-type="string">
                <text:p>noise_0.04749999940395355_ln_0.044999998062849045</text:p>
                <draw:g>
                  <svg:desc>combined.BZ1:combined.BZ1</svg:desc>
                </draw:g>
              </table:table-cell>
              <table:table-cell office:value-type="string">
                <text:p>noise_0.04749999940395355_ln_0.05249999836087227</text:p>
                <draw:g>
                  <svg:desc>combined.CA1:combined.CA1</svg:desc>
                </draw:g>
              </table:table-cell>
              <table:table-cell office:value-type="string">
                <text:p>noise_0.04749999940395355_ln_0.05999999865889549</text:p>
                <draw:g>
                  <svg:desc>combined.CB1:combined.CB1</svg:desc>
                </draw:g>
              </table:table-cell>
              <table:table-cell office:value-type="string">
                <text:p>noise_0.04749999940395355_ln_0.06749999523162842</text:p>
                <draw:g>
                  <svg:desc>combined.CC1:combined.CC1</svg:desc>
                </draw:g>
              </table:table-cell>
              <table:table-cell office:value-type="string">
                <text:p>noise_0.04749999940395355_ln_0.07499999552965164</text:p>
                <draw:g>
                  <svg:desc>combined.CD1:combined.CD1</svg:desc>
                </draw:g>
              </table:table-cell>
              <table:table-cell office:value-type="string">
                <text:p>noise_0.04749999940395355_ln_0.08249999582767487</text:p>
                <draw:g>
                  <svg:desc>combined.CE1:combined.CE1</svg:desc>
                </draw:g>
              </table:table-cell>
              <table:table-cell office:value-type="string">
                <text:p>noise_0.04749999940395355_ln_0.08999999612569809</text:p>
                <draw:g>
                  <svg:desc>combined.CF1:combined.CF1</svg:desc>
                </draw:g>
              </table:table-cell>
              <table:table-cell office:value-type="string">
                <text:p>noise_0.04749999940395355_ln_0.09749999642372131</text:p>
                <draw:g>
                  <svg:desc>combined.CG1:combined.C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mbined.A2:combined.A21</svg:desc>
                </draw:g>
              </table:table-cell>
              <table:table-cell office:value-type="float" office:value="3.8149152">
                <text:p>3.8149152</text:p>
                <draw:g>
                  <svg:desc>combined.B2:combined.B21</svg:desc>
                </draw:g>
              </table:table-cell>
              <table:table-cell office:value-type="float" office:value="3.737733">
                <text:p>3.737733</text:p>
                <draw:g>
                  <svg:desc>combined.C2:combined.C21</svg:desc>
                </draw:g>
              </table:table-cell>
              <table:table-cell office:value-type="float" office:value="3.6917698">
                <text:p>3.6917698</text:p>
                <draw:g>
                  <svg:desc>combined.D2:combined.D21</svg:desc>
                </draw:g>
              </table:table-cell>
              <table:table-cell office:value-type="float" office:value="3.667106">
                <text:p>3.667106</text:p>
                <draw:g>
                  <svg:desc>combined.E2:combined.E21</svg:desc>
                </draw:g>
              </table:table-cell>
              <table:table-cell office:value-type="float" office:value="3.6669576">
                <text:p>3.6669576</text:p>
                <draw:g>
                  <svg:desc>combined.F2:combined.F21</svg:desc>
                </draw:g>
              </table:table-cell>
              <table:table-cell office:value-type="float" office:value="3.67493">
                <text:p>3.67493</text:p>
                <draw:g>
                  <svg:desc>combined.G2:combined.G21</svg:desc>
                </draw:g>
              </table:table-cell>
              <table:table-cell office:value-type="float" office:value="3.703432">
                <text:p>3.703432</text:p>
                <draw:g>
                  <svg:desc>combined.H2:combined.H21</svg:desc>
                </draw:g>
              </table:table-cell>
              <table:table-cell office:value-type="float" office:value="3.7389457">
                <text:p>3.7389457</text:p>
                <draw:g>
                  <svg:desc>combined.I2:combined.I21</svg:desc>
                </draw:g>
              </table:table-cell>
              <table:table-cell office:value-type="float" office:value="3.780009">
                <text:p>3.780009</text:p>
                <draw:g>
                  <svg:desc>combined.J2:combined.J21</svg:desc>
                </draw:g>
              </table:table-cell>
              <table:table-cell office:value-type="float" office:value="3.815562">
                <text:p>3.815562</text:p>
                <draw:g>
                  <svg:desc>combined.K2:combined.K21</svg:desc>
                </draw:g>
              </table:table-cell>
              <table:table-cell office:value-type="float" office:value="3.8558137">
                <text:p>3.8558137</text:p>
                <draw:g>
                  <svg:desc>combined.L2:combined.L21</svg:desc>
                </draw:g>
              </table:table-cell>
              <table:table-cell office:value-type="float" office:value="3.8877268">
                <text:p>3.8877268</text:p>
                <draw:g>
                  <svg:desc>combined.M2:combined.M21</svg:desc>
                </draw:g>
              </table:table-cell>
              <table:table-cell office:value-type="float" office:value="3.9178846">
                <text:p>3.9178846</text:p>
                <draw:g>
                  <svg:desc>combined.N2:combined.N21</svg:desc>
                </draw:g>
              </table:table-cell>
              <table:table-cell office:value-type="float" office:value="3.941391">
                <text:p>3.941391</text:p>
                <draw:g>
                  <svg:desc>combined.O2:combined.O21</svg:desc>
                </draw:g>
              </table:table-cell>
              <table:table-cell office:value-type="float" office:value="3.8149152">
                <text:p>3.8149152</text:p>
                <draw:g>
                  <svg:desc>combined.P2:combined.P21</svg:desc>
                </draw:g>
              </table:table-cell>
              <table:table-cell office:value-type="float" office:value="3.7378974">
                <text:p>3.7378974</text:p>
                <draw:g>
                  <svg:desc>combined.Q2:combined.Q21</svg:desc>
                </draw:g>
              </table:table-cell>
              <table:table-cell office:value-type="float" office:value="3.6904368">
                <text:p>3.6904368</text:p>
                <draw:g>
                  <svg:desc>combined.R2:combined.R21</svg:desc>
                </draw:g>
              </table:table-cell>
              <table:table-cell office:value-type="float" office:value="3.6678774">
                <text:p>3.6678774</text:p>
                <draw:g>
                  <svg:desc>combined.S2:combined.S21</svg:desc>
                </draw:g>
              </table:table-cell>
              <table:table-cell office:value-type="float" office:value="3.6669939">
                <text:p>3.6669939</text:p>
                <draw:g>
                  <svg:desc>combined.T2:combined.T21</svg:desc>
                </draw:g>
              </table:table-cell>
              <table:table-cell office:value-type="float" office:value="3.67933">
                <text:p>3.67933</text:p>
                <draw:g>
                  <svg:desc>combined.U2:combined.U21</svg:desc>
                </draw:g>
              </table:table-cell>
              <table:table-cell office:value-type="float" office:value="3.703746">
                <text:p>3.703746</text:p>
                <draw:g>
                  <svg:desc>combined.V2:combined.V21</svg:desc>
                </draw:g>
              </table:table-cell>
              <table:table-cell office:value-type="float" office:value="3.740914">
                <text:p>3.740914</text:p>
                <draw:g>
                  <svg:desc>combined.W2:combined.W21</svg:desc>
                </draw:g>
              </table:table-cell>
              <table:table-cell office:value-type="float" office:value="3.7837174">
                <text:p>3.7837174</text:p>
                <draw:g>
                  <svg:desc>combined.X2:combined.X21</svg:desc>
                </draw:g>
              </table:table-cell>
              <table:table-cell office:value-type="float" office:value="3.8079402">
                <text:p>3.8079402</text:p>
                <draw:g>
                  <svg:desc>combined.Y2:combined.Y21</svg:desc>
                </draw:g>
              </table:table-cell>
              <table:table-cell office:value-type="float" office:value="3.8560164">
                <text:p>3.8560164</text:p>
                <draw:g>
                  <svg:desc>combined.Z2:combined.Z21</svg:desc>
                </draw:g>
              </table:table-cell>
              <table:table-cell office:value-type="float" office:value="3.8795512">
                <text:p>3.8795512</text:p>
                <draw:g>
                  <svg:desc>combined.AA2:combined.AA21</svg:desc>
                </draw:g>
              </table:table-cell>
              <table:table-cell office:value-type="float" office:value="3.9141667">
                <text:p>3.9141667</text:p>
                <draw:g>
                  <svg:desc>combined.AB2:combined.AB21</svg:desc>
                </draw:g>
              </table:table-cell>
              <table:table-cell office:value-type="float" office:value="3.9532254">
                <text:p>3.9532254</text:p>
                <draw:g>
                  <svg:desc>combined.AC2:combined.AC21</svg:desc>
                </draw:g>
              </table:table-cell>
              <table:table-cell office:value-type="float" office:value="3.8149152">
                <text:p>3.8149152</text:p>
                <draw:g>
                  <svg:desc>combined.AD2:combined.AD21</svg:desc>
                </draw:g>
              </table:table-cell>
              <table:table-cell office:value-type="float" office:value="3.7377334">
                <text:p>3.7377334</text:p>
                <draw:g>
                  <svg:desc>combined.AE2:combined.AE21</svg:desc>
                </draw:g>
              </table:table-cell>
              <table:table-cell office:value-type="float" office:value="3.6907747">
                <text:p>3.6907747</text:p>
                <draw:g>
                  <svg:desc>combined.AF2:combined.AF21</svg:desc>
                </draw:g>
              </table:table-cell>
              <table:table-cell office:value-type="float" office:value="3.6673443">
                <text:p>3.6673443</text:p>
                <draw:g>
                  <svg:desc>combined.AG2:combined.AG21</svg:desc>
                </draw:g>
              </table:table-cell>
              <table:table-cell office:value-type="float" office:value="3.6652498">
                <text:p>3.6652498</text:p>
                <draw:g>
                  <svg:desc>combined.AH2:combined.AH21</svg:desc>
                </draw:g>
              </table:table-cell>
              <table:table-cell office:value-type="float" office:value="3.6748238">
                <text:p>3.6748238</text:p>
                <draw:g>
                  <svg:desc>combined.AI2:combined.AI21</svg:desc>
                </draw:g>
              </table:table-cell>
              <table:table-cell office:value-type="float" office:value="3.7072968">
                <text:p>3.7072968</text:p>
                <draw:g>
                  <svg:desc>combined.AJ2:combined.AJ21</svg:desc>
                </draw:g>
              </table:table-cell>
              <table:table-cell office:value-type="float" office:value="3.738107">
                <text:p>3.738107</text:p>
                <draw:g>
                  <svg:desc>combined.AK2:combined.AK21</svg:desc>
                </draw:g>
              </table:table-cell>
              <table:table-cell office:value-type="float" office:value="3.7784348">
                <text:p>3.7784348</text:p>
                <draw:g>
                  <svg:desc>combined.AL2:combined.AL21</svg:desc>
                </draw:g>
              </table:table-cell>
              <table:table-cell office:value-type="float" office:value="3.8126476">
                <text:p>3.8126476</text:p>
                <draw:g>
                  <svg:desc>combined.AM2:combined.AM21</svg:desc>
                </draw:g>
              </table:table-cell>
              <table:table-cell office:value-type="float" office:value="3.8601015">
                <text:p>3.8601015</text:p>
                <draw:g>
                  <svg:desc>combined.AN2:combined.AN21</svg:desc>
                </draw:g>
              </table:table-cell>
              <table:table-cell office:value-type="float" office:value="3.8757203">
                <text:p>3.8757203</text:p>
                <draw:g>
                  <svg:desc>combined.AO2:combined.AO21</svg:desc>
                </draw:g>
              </table:table-cell>
              <table:table-cell office:value-type="float" office:value="3.9182913">
                <text:p>3.9182913</text:p>
                <draw:g>
                  <svg:desc>combined.AP2:combined.AP21</svg:desc>
                </draw:g>
              </table:table-cell>
              <table:table-cell office:value-type="float" office:value="3.9468663">
                <text:p>3.9468663</text:p>
                <draw:g>
                  <svg:desc>combined.AQ2:combined.AQ21</svg:desc>
                </draw:g>
              </table:table-cell>
              <table:table-cell office:value-type="float" office:value="3.8149152">
                <text:p>3.8149152</text:p>
                <draw:g>
                  <svg:desc>combined.AR2:combined.AR21</svg:desc>
                </draw:g>
              </table:table-cell>
              <table:table-cell office:value-type="float" office:value="3.7379198">
                <text:p>3.7379198</text:p>
                <draw:g>
                  <svg:desc>combined.AS2:combined.AS21</svg:desc>
                </draw:g>
              </table:table-cell>
              <table:table-cell office:value-type="float" office:value="3.691459">
                <text:p>3.691459</text:p>
                <draw:g>
                  <svg:desc>combined.AT2:combined.AT21</svg:desc>
                </draw:g>
              </table:table-cell>
              <table:table-cell office:value-type="float" office:value="3.6664953">
                <text:p>3.6664953</text:p>
                <draw:g>
                  <svg:desc>combined.AU2:combined.AU21</svg:desc>
                </draw:g>
              </table:table-cell>
              <table:table-cell office:value-type="float" office:value="3.6700196">
                <text:p>3.6700196</text:p>
                <draw:g>
                  <svg:desc>combined.AV2:combined.AV21</svg:desc>
                </draw:g>
              </table:table-cell>
              <table:table-cell office:value-type="float" office:value="3.674509">
                <text:p>3.674509</text:p>
                <draw:g>
                  <svg:desc>combined.AW2:combined.AW21</svg:desc>
                </draw:g>
              </table:table-cell>
              <table:table-cell office:value-type="float" office:value="3.7033334">
                <text:p>3.7033334</text:p>
                <draw:g>
                  <svg:desc>combined.AX2:combined.AX21</svg:desc>
                </draw:g>
              </table:table-cell>
              <table:table-cell office:value-type="float" office:value="3.7369661">
                <text:p>3.7369661</text:p>
                <draw:g>
                  <svg:desc>combined.AY2:combined.AY21</svg:desc>
                </draw:g>
              </table:table-cell>
              <table:table-cell office:value-type="float" office:value="3.7768571">
                <text:p>3.7768571</text:p>
                <draw:g>
                  <svg:desc>combined.AZ2:combined.AZ21</svg:desc>
                </draw:g>
              </table:table-cell>
              <table:table-cell office:value-type="float" office:value="3.8147266">
                <text:p>3.8147266</text:p>
                <draw:g>
                  <svg:desc>combined.BA2:combined.BA21</svg:desc>
                </draw:g>
              </table:table-cell>
              <table:table-cell office:value-type="float" office:value="3.8540819">
                <text:p>3.8540819</text:p>
                <draw:g>
                  <svg:desc>combined.BB2:combined.BB21</svg:desc>
                </draw:g>
              </table:table-cell>
              <table:table-cell office:value-type="float" office:value="3.9052813">
                <text:p>3.9052813</text:p>
                <draw:g>
                  <svg:desc>combined.BC2:combined.BC21</svg:desc>
                </draw:g>
              </table:table-cell>
              <table:table-cell office:value-type="float" office:value="3.9087245">
                <text:p>3.9087245</text:p>
                <draw:g>
                  <svg:desc>combined.BD2:combined.BD21</svg:desc>
                </draw:g>
              </table:table-cell>
              <table:table-cell office:value-type="float" office:value="3.932562">
                <text:p>3.932562</text:p>
                <draw:g>
                  <svg:desc>combined.BE2:combined.BE21</svg:desc>
                </draw:g>
              </table:table-cell>
              <table:table-cell office:value-type="float" office:value="3.8149152">
                <text:p>3.8149152</text:p>
                <draw:g>
                  <svg:desc>combined.BF2:combined.BF21</svg:desc>
                </draw:g>
              </table:table-cell>
              <table:table-cell office:value-type="float" office:value="3.7380645">
                <text:p>3.7380645</text:p>
                <draw:g>
                  <svg:desc>combined.BG2:combined.BG21</svg:desc>
                </draw:g>
              </table:table-cell>
              <table:table-cell office:value-type="float" office:value="3.6912513">
                <text:p>3.6912513</text:p>
                <draw:g>
                  <svg:desc>combined.BH2:combined.BH21</svg:desc>
                </draw:g>
              </table:table-cell>
              <table:table-cell office:value-type="float" office:value="3.6669598">
                <text:p>3.6669598</text:p>
                <draw:g>
                  <svg:desc>combined.BI2:combined.BI21</svg:desc>
                </draw:g>
              </table:table-cell>
              <table:table-cell office:value-type="float" office:value="3.6680267">
                <text:p>3.6680267</text:p>
                <draw:g>
                  <svg:desc>combined.BJ2:combined.BJ21</svg:desc>
                </draw:g>
              </table:table-cell>
              <table:table-cell office:value-type="float" office:value="3.6714761">
                <text:p>3.6714761</text:p>
                <draw:g>
                  <svg:desc>combined.BK2:combined.BK21</svg:desc>
                </draw:g>
              </table:table-cell>
              <table:table-cell office:value-type="float" office:value="3.6961126">
                <text:p>3.6961126</text:p>
                <draw:g>
                  <svg:desc>combined.BL2:combined.BL21</svg:desc>
                </draw:g>
              </table:table-cell>
              <table:table-cell office:value-type="float" office:value="3.7418287">
                <text:p>3.7418287</text:p>
                <draw:g>
                  <svg:desc>combined.BM2:combined.BM21</svg:desc>
                </draw:g>
              </table:table-cell>
              <table:table-cell office:value-type="float" office:value="3.774884">
                <text:p>3.774884</text:p>
                <draw:g>
                  <svg:desc>combined.BN2:combined.BN21</svg:desc>
                </draw:g>
              </table:table-cell>
              <table:table-cell office:value-type="float" office:value="3.8128653">
                <text:p>3.8128653</text:p>
                <draw:g>
                  <svg:desc>combined.BO2:combined.BO21</svg:desc>
                </draw:g>
              </table:table-cell>
              <table:table-cell office:value-type="float" office:value="3.8502333">
                <text:p>3.8502333</text:p>
                <draw:g>
                  <svg:desc>combined.BP2:combined.BP21</svg:desc>
                </draw:g>
              </table:table-cell>
              <table:table-cell office:value-type="float" office:value="3.8840275">
                <text:p>3.8840275</text:p>
                <draw:g>
                  <svg:desc>combined.BQ2:combined.BQ21</svg:desc>
                </draw:g>
              </table:table-cell>
              <table:table-cell office:value-type="float" office:value="3.9001932">
                <text:p>3.9001932</text:p>
                <draw:g>
                  <svg:desc>combined.BR2:combined.BR21</svg:desc>
                </draw:g>
              </table:table-cell>
              <table:table-cell office:value-type="float" office:value="3.936186">
                <text:p>3.936186</text:p>
                <draw:g>
                  <svg:desc>combined.BS2:combined.BS21</svg:desc>
                </draw:g>
              </table:table-cell>
              <table:table-cell office:value-type="float" office:value="3.8149152">
                <text:p>3.8149152</text:p>
                <draw:g>
                  <svg:desc>combined.BT2:combined.BT21</svg:desc>
                </draw:g>
              </table:table-cell>
              <table:table-cell office:value-type="float" office:value="3.738014">
                <text:p>3.738014</text:p>
                <draw:g>
                  <svg:desc>combined.BU2:combined.BU21</svg:desc>
                </draw:g>
              </table:table-cell>
              <table:table-cell office:value-type="float" office:value="3.6887887">
                <text:p>3.6887887</text:p>
                <draw:g>
                  <svg:desc>combined.BV2:combined.BV21</svg:desc>
                </draw:g>
              </table:table-cell>
              <table:table-cell office:value-type="float" office:value="3.6649191">
                <text:p>3.6649191</text:p>
                <draw:g>
                  <svg:desc>combined.BW2:combined.BW21</svg:desc>
                </draw:g>
              </table:table-cell>
              <table:table-cell office:value-type="float" office:value="3.6660993">
                <text:p>3.6660993</text:p>
                <draw:g>
                  <svg:desc>combined.BX2:combined.BX21</svg:desc>
                </draw:g>
              </table:table-cell>
              <table:table-cell office:value-type="float" office:value="3.684212">
                <text:p>3.684212</text:p>
                <draw:g>
                  <svg:desc>combined.BY2:combined.BY21</svg:desc>
                </draw:g>
              </table:table-cell>
              <table:table-cell office:value-type="float" office:value="3.701272">
                <text:p>3.701272</text:p>
                <draw:g>
                  <svg:desc>combined.BZ2:combined.BZ21</svg:desc>
                </draw:g>
              </table:table-cell>
              <table:table-cell office:value-type="float" office:value="3.7467084">
                <text:p>3.7467084</text:p>
                <draw:g>
                  <svg:desc>combined.CA2:combined.CA21</svg:desc>
                </draw:g>
              </table:table-cell>
              <table:table-cell office:value-type="float" office:value="3.7829013">
                <text:p>3.7829013</text:p>
                <draw:g>
                  <svg:desc>combined.CB2:combined.CB21</svg:desc>
                </draw:g>
              </table:table-cell>
              <table:table-cell office:value-type="float" office:value="3.8169248">
                <text:p>3.8169248</text:p>
                <draw:g>
                  <svg:desc>combined.CC2:combined.CC21</svg:desc>
                </draw:g>
              </table:table-cell>
              <table:table-cell office:value-type="float" office:value="3.84784">
                <text:p>3.84784</text:p>
                <draw:g>
                  <svg:desc>combined.CD2:combined.CD21</svg:desc>
                </draw:g>
              </table:table-cell>
              <table:table-cell office:value-type="float" office:value="3.8941715">
                <text:p>3.8941715</text:p>
                <draw:g>
                  <svg:desc>combined.CE2:combined.CE21</svg:desc>
                </draw:g>
              </table:table-cell>
              <table:table-cell office:value-type="float" office:value="3.9122336">
                <text:p>3.9122336</text:p>
                <draw:g>
                  <svg:desc>combined.CF2:combined.CF21</svg:desc>
                </draw:g>
              </table:table-cell>
              <table:table-cell office:value-type="float" office:value="3.9540424">
                <text:p>3.9540424</text:p>
                <draw:g>
                  <svg:desc>combined.CG2:combined.C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8149152">
                <text:p>3.8149152</text:p>
              </table:table-cell>
              <table:table-cell office:value-type="float" office:value="3.6569183">
                <text:p>3.6569183</text:p>
              </table:table-cell>
              <table:table-cell office:value-type="float" office:value="3.6566548">
                <text:p>3.6566548</text:p>
              </table:table-cell>
              <table:table-cell office:value-type="float" office:value="3.816775">
                <text:p>3.816775</text:p>
              </table:table-cell>
              <table:table-cell office:value-type="float" office:value="3.7732017">
                <text:p>3.7732017</text:p>
              </table:table-cell>
              <table:table-cell office:value-type="float" office:value="3.7515645">
                <text:p>3.7515645</text:p>
              </table:table-cell>
              <table:table-cell office:value-type="float" office:value="3.8028133">
                <text:p>3.8028133</text:p>
              </table:table-cell>
              <table:table-cell office:value-type="float" office:value="3.8972366">
                <text:p>3.8972366</text:p>
              </table:table-cell>
              <table:table-cell office:value-type="float" office:value="3.9733114">
                <text:p>3.9733114</text:p>
              </table:table-cell>
              <table:table-cell office:value-type="float" office:value="4.0820665">
                <text:p>4.0820665</text:p>
              </table:table-cell>
              <table:table-cell office:value-type="float" office:value="4.1802855">
                <text:p>4.1802855</text:p>
              </table:table-cell>
              <table:table-cell office:value-type="float" office:value="4.2989373">
                <text:p>4.2989373</text:p>
              </table:table-cell>
              <table:table-cell office:value-type="float" office:value="4.346622">
                <text:p>4.346622</text:p>
              </table:table-cell>
              <table:table-cell office:value-type="float" office:value="4.4517474">
                <text:p>4.4517474</text:p>
              </table:table-cell>
              <table:table-cell office:value-type="float" office:value="3.8149152">
                <text:p>3.8149152</text:p>
              </table:table-cell>
              <table:table-cell office:value-type="float" office:value="3.6576488">
                <text:p>3.6576488</text:p>
              </table:table-cell>
              <table:table-cell office:value-type="float" office:value="3.65102">
                <text:p>3.65102</text:p>
              </table:table-cell>
              <table:table-cell office:value-type="float" office:value="3.811651">
                <text:p>3.811651</text:p>
              </table:table-cell>
              <table:table-cell office:value-type="float" office:value="3.7587194">
                <text:p>3.7587194</text:p>
              </table:table-cell>
              <table:table-cell office:value-type="float" office:value="3.7591376">
                <text:p>3.7591376</text:p>
              </table:table-cell>
              <table:table-cell office:value-type="float" office:value="3.8030233">
                <text:p>3.8030233</text:p>
              </table:table-cell>
              <table:table-cell office:value-type="float" office:value="3.8900332">
                <text:p>3.8900332</text:p>
              </table:table-cell>
              <table:table-cell office:value-type="float" office:value="3.9772642">
                <text:p>3.9772642</text:p>
              </table:table-cell>
              <table:table-cell office:value-type="float" office:value="4.0621924">
                <text:p>4.0621924</text:p>
              </table:table-cell>
              <table:table-cell office:value-type="float" office:value="4.2085495">
                <text:p>4.2085495</text:p>
              </table:table-cell>
              <table:table-cell office:value-type="float" office:value="4.2995315">
                <text:p>4.2995315</text:p>
              </table:table-cell>
              <table:table-cell office:value-type="float" office:value="4.3879757">
                <text:p>4.3879757</text:p>
              </table:table-cell>
              <table:table-cell office:value-type="float" office:value="4.511319">
                <text:p>4.511319</text:p>
              </table:table-cell>
              <table:table-cell office:value-type="float" office:value="3.8149152">
                <text:p>3.8149152</text:p>
              </table:table-cell>
              <table:table-cell office:value-type="float" office:value="3.6576955">
                <text:p>3.6576955</text:p>
              </table:table-cell>
              <table:table-cell office:value-type="float" office:value="3.6501548">
                <text:p>3.6501548</text:p>
              </table:table-cell>
              <table:table-cell office:value-type="float" office:value="3.8124452">
                <text:p>3.8124452</text:p>
              </table:table-cell>
              <table:table-cell office:value-type="float" office:value="3.7710323">
                <text:p>3.7710323</text:p>
              </table:table-cell>
              <table:table-cell office:value-type="float" office:value="3.7524536">
                <text:p>3.7524536</text:p>
              </table:table-cell>
              <table:table-cell office:value-type="float" office:value="3.8062077">
                <text:p>3.8062077</text:p>
              </table:table-cell>
              <table:table-cell office:value-type="float" office:value="3.8878827">
                <text:p>3.8878827</text:p>
              </table:table-cell>
              <table:table-cell office:value-type="float" office:value="3.9921982">
                <text:p>3.9921982</text:p>
              </table:table-cell>
              <table:table-cell office:value-type="float" office:value="4.057608">
                <text:p>4.057608</text:p>
              </table:table-cell>
              <table:table-cell office:value-type="float" office:value="4.209515">
                <text:p>4.209515</text:p>
              </table:table-cell>
              <table:table-cell office:value-type="float" office:value="4.3114614">
                <text:p>4.3114614</text:p>
              </table:table-cell>
              <table:table-cell office:value-type="float" office:value="4.3582835">
                <text:p>4.3582835</text:p>
              </table:table-cell>
              <table:table-cell office:value-type="float" office:value="4.440671">
                <text:p>4.440671</text:p>
              </table:table-cell>
              <table:table-cell office:value-type="float" office:value="3.8149152">
                <text:p>3.8149152</text:p>
              </table:table-cell>
              <table:table-cell office:value-type="float" office:value="3.6566224">
                <text:p>3.6566224</text:p>
              </table:table-cell>
              <table:table-cell office:value-type="float" office:value="3.6493874">
                <text:p>3.6493874</text:p>
              </table:table-cell>
              <table:table-cell office:value-type="float" office:value="3.8120873">
                <text:p>3.8120873</text:p>
              </table:table-cell>
              <table:table-cell office:value-type="float" office:value="3.7692654">
                <text:p>3.7692654</text:p>
              </table:table-cell>
              <table:table-cell office:value-type="float" office:value="3.7609787">
                <text:p>3.7609787</text:p>
              </table:table-cell>
              <table:table-cell office:value-type="float" office:value="3.8105373">
                <text:p>3.8105373</text:p>
              </table:table-cell>
              <table:table-cell office:value-type="float" office:value="3.890553">
                <text:p>3.890553</text:p>
              </table:table-cell>
              <table:table-cell office:value-type="float" office:value="3.9856012">
                <text:p>3.9856012</text:p>
              </table:table-cell>
              <table:table-cell office:value-type="float" office:value="4.070407">
                <text:p>4.070407</text:p>
              </table:table-cell>
              <table:table-cell office:value-type="float" office:value="4.180522">
                <text:p>4.180522</text:p>
              </table:table-cell>
              <table:table-cell office:value-type="float" office:value="4.365314">
                <text:p>4.365314</text:p>
              </table:table-cell>
              <table:table-cell office:value-type="float" office:value="4.377252">
                <text:p>4.377252</text:p>
              </table:table-cell>
              <table:table-cell office:value-type="float" office:value="4.4789453">
                <text:p>4.4789453</text:p>
              </table:table-cell>
              <table:table-cell office:value-type="float" office:value="3.8149152">
                <text:p>3.8149152</text:p>
              </table:table-cell>
              <table:table-cell office:value-type="float" office:value="3.6574945">
                <text:p>3.6574945</text:p>
              </table:table-cell>
              <table:table-cell office:value-type="float" office:value="3.6481886">
                <text:p>3.6481886</text:p>
              </table:table-cell>
              <table:table-cell office:value-type="float" office:value="3.8087277">
                <text:p>3.8087277</text:p>
              </table:table-cell>
              <table:table-cell office:value-type="float" office:value="3.7637253">
                <text:p>3.7637253</text:p>
              </table:table-cell>
              <table:table-cell office:value-type="float" office:value="3.7690532">
                <text:p>3.7690532</text:p>
              </table:table-cell>
              <table:table-cell office:value-type="float" office:value="3.8106596">
                <text:p>3.8106596</text:p>
              </table:table-cell>
              <table:table-cell office:value-type="float" office:value="3.8840532">
                <text:p>3.8840532</text:p>
              </table:table-cell>
              <table:table-cell office:value-type="float" office:value="3.9770086">
                <text:p>3.9770086</text:p>
              </table:table-cell>
              <table:table-cell office:value-type="float" office:value="4.114605">
                <text:p>4.114605</text:p>
              </table:table-cell>
              <table:table-cell office:value-type="float" office:value="4.218366">
                <text:p>4.218366</text:p>
              </table:table-cell>
              <table:table-cell office:value-type="float" office:value="4.301604">
                <text:p>4.301604</text:p>
              </table:table-cell>
              <table:table-cell office:value-type="float" office:value="4.3761373">
                <text:p>4.3761373</text:p>
              </table:table-cell>
              <table:table-cell office:value-type="float" office:value="4.384974">
                <text:p>4.384974</text:p>
              </table:table-cell>
              <table:table-cell office:value-type="float" office:value="3.8149152">
                <text:p>3.8149152</text:p>
              </table:table-cell>
              <table:table-cell office:value-type="float" office:value="3.6570327">
                <text:p>3.6570327</text:p>
              </table:table-cell>
              <table:table-cell office:value-type="float" office:value="3.648491">
                <text:p>3.648491</text:p>
              </table:table-cell>
              <table:table-cell office:value-type="float" office:value="3.809041">
                <text:p>3.809041</text:p>
              </table:table-cell>
              <table:table-cell office:value-type="float" office:value="3.770489">
                <text:p>3.770489</text:p>
              </table:table-cell>
              <table:table-cell office:value-type="float" office:value="3.7610252">
                <text:p>3.7610252</text:p>
              </table:table-cell>
              <table:table-cell office:value-type="float" office:value="3.7979815">
                <text:p>3.7979815</text:p>
              </table:table-cell>
              <table:table-cell office:value-type="float" office:value="3.9077866">
                <text:p>3.9077866</text:p>
              </table:table-cell>
              <table:table-cell office:value-type="float" office:value="3.993228">
                <text:p>3.993228</text:p>
              </table:table-cell>
              <table:table-cell office:value-type="float" office:value="4.1014085">
                <text:p>4.1014085</text:p>
              </table:table-cell>
              <table:table-cell office:value-type="float" office:value="4.225486">
                <text:p>4.225486</text:p>
              </table:table-cell>
              <table:table-cell office:value-type="float" office:value="4.3409266">
                <text:p>4.3409266</text:p>
              </table:table-cell>
              <table:table-cell office:value-type="float" office:value="4.466553">
                <text:p>4.466553</text:p>
              </table:table-cell>
              <table:table-cell office:value-type="float" office:value="4.482005">
                <text:p>4.482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8149152">
                <text:p>3.8149152</text:p>
              </table:table-cell>
              <table:table-cell office:value-type="float" office:value="3.6146908">
                <text:p>3.6146908</text:p>
              </table:table-cell>
              <table:table-cell office:value-type="float" office:value="3.6474023">
                <text:p>3.6474023</text:p>
              </table:table-cell>
              <table:table-cell office:value-type="float" office:value="3.5954695">
                <text:p>3.5954695</text:p>
              </table:table-cell>
              <table:table-cell office:value-type="float" office:value="3.5645173">
                <text:p>3.5645173</text:p>
              </table:table-cell>
              <table:table-cell office:value-type="float" office:value="3.6168456">
                <text:p>3.6168456</text:p>
              </table:table-cell>
              <table:table-cell office:value-type="float" office:value="3.7164783">
                <text:p>3.7164783</text:p>
              </table:table-cell>
              <table:table-cell office:value-type="float" office:value="3.8668308">
                <text:p>3.8668308</text:p>
              </table:table-cell>
              <table:table-cell office:value-type="float" office:value="4.0445576">
                <text:p>4.0445576</text:p>
              </table:table-cell>
              <table:table-cell office:value-type="float" office:value="4.1380577">
                <text:p>4.1380577</text:p>
              </table:table-cell>
              <table:table-cell office:value-type="float" office:value="3.9659424">
                <text:p>3.9659424</text:p>
              </table:table-cell>
              <table:table-cell office:value-type="float" office:value="3.9749656">
                <text:p>3.9749656</text:p>
              </table:table-cell>
              <table:table-cell office:value-type="float" office:value="4.311093">
                <text:p>4.311093</text:p>
              </table:table-cell>
              <table:table-cell office:value-type="float" office:value="4.791395">
                <text:p>4.791395</text:p>
              </table:table-cell>
              <table:table-cell office:value-type="float" office:value="3.8149152">
                <text:p>3.8149152</text:p>
              </table:table-cell>
              <table:table-cell office:value-type="float" office:value="3.614853">
                <text:p>3.614853</text:p>
              </table:table-cell>
              <table:table-cell office:value-type="float" office:value="3.6471834">
                <text:p>3.6471834</text:p>
              </table:table-cell>
              <table:table-cell office:value-type="float" office:value="3.590708">
                <text:p>3.590708</text:p>
              </table:table-cell>
              <table:table-cell office:value-type="float" office:value="3.5645916">
                <text:p>3.5645916</text:p>
              </table:table-cell>
              <table:table-cell office:value-type="float" office:value="3.6062434">
                <text:p>3.6062434</text:p>
              </table:table-cell>
              <table:table-cell office:value-type="float" office:value="3.7189665">
                <text:p>3.7189665</text:p>
              </table:table-cell>
              <table:table-cell office:value-type="float" office:value="3.8150184">
                <text:p>3.8150184</text:p>
              </table:table-cell>
              <table:table-cell office:value-type="float" office:value="4.047516">
                <text:p>4.047516</text:p>
              </table:table-cell>
              <table:table-cell office:value-type="float" office:value="4.1700797">
                <text:p>4.1700797</text:p>
              </table:table-cell>
              <table:table-cell office:value-type="float" office:value="4.0411263">
                <text:p>4.0411263</text:p>
              </table:table-cell>
              <table:table-cell office:value-type="float" office:value="4.00312">
                <text:p>4.00312</text:p>
              </table:table-cell>
              <table:table-cell office:value-type="float" office:value="4.3125496">
                <text:p>4.3125496</text:p>
              </table:table-cell>
              <table:table-cell office:value-type="float" office:value="4.840187">
                <text:p>4.840187</text:p>
              </table:table-cell>
              <table:table-cell office:value-type="float" office:value="3.8149152">
                <text:p>3.8149152</text:p>
              </table:table-cell>
              <table:table-cell office:value-type="float" office:value="3.615159">
                <text:p>3.615159</text:p>
              </table:table-cell>
              <table:table-cell office:value-type="float" office:value="3.6494663">
                <text:p>3.6494663</text:p>
              </table:table-cell>
              <table:table-cell office:value-type="float" office:value="3.5936787">
                <text:p>3.5936787</text:p>
              </table:table-cell>
              <table:table-cell office:value-type="float" office:value="3.5832884">
                <text:p>3.5832884</text:p>
              </table:table-cell>
              <table:table-cell office:value-type="float" office:value="3.612492">
                <text:p>3.612492</text:p>
              </table:table-cell>
              <table:table-cell office:value-type="float" office:value="3.711533">
                <text:p>3.711533</text:p>
              </table:table-cell>
              <table:table-cell office:value-type="float" office:value="3.8718843">
                <text:p>3.8718843</text:p>
              </table:table-cell>
              <table:table-cell office:value-type="float" office:value="4.0640235">
                <text:p>4.0640235</text:p>
              </table:table-cell>
              <table:table-cell office:value-type="float" office:value="4.037559">
                <text:p>4.037559</text:p>
              </table:table-cell>
              <table:table-cell office:value-type="float" office:value="4.018916">
                <text:p>4.018916</text:p>
              </table:table-cell>
              <table:table-cell office:value-type="float" office:value="4.057028">
                <text:p>4.057028</text:p>
              </table:table-cell>
              <table:table-cell office:value-type="float" office:value="4.398497">
                <text:p>4.398497</text:p>
              </table:table-cell>
              <table:table-cell office:value-type="float" office:value="4.699218">
                <text:p>4.699218</text:p>
              </table:table-cell>
              <table:table-cell office:value-type="float" office:value="3.8149152">
                <text:p>3.8149152</text:p>
              </table:table-cell>
              <table:table-cell office:value-type="float" office:value="3.6132104">
                <text:p>3.6132104</text:p>
              </table:table-cell>
              <table:table-cell office:value-type="float" office:value="3.6471593">
                <text:p>3.6471593</text:p>
              </table:table-cell>
              <table:table-cell office:value-type="float" office:value="3.59219">
                <text:p>3.59219</text:p>
              </table:table-cell>
              <table:table-cell office:value-type="float" office:value="3.5751972">
                <text:p>3.5751972</text:p>
              </table:table-cell>
              <table:table-cell office:value-type="float" office:value="3.6032932">
                <text:p>3.6032932</text:p>
              </table:table-cell>
              <table:table-cell office:value-type="float" office:value="3.7061977">
                <text:p>3.7061977</text:p>
              </table:table-cell>
              <table:table-cell office:value-type="float" office:value="3.8527353">
                <text:p>3.8527353</text:p>
              </table:table-cell>
              <table:table-cell office:value-type="float" office:value="4.064181">
                <text:p>4.064181</text:p>
              </table:table-cell>
              <table:table-cell office:value-type="float" office:value="4.077503">
                <text:p>4.077503</text:p>
              </table:table-cell>
              <table:table-cell office:value-type="float" office:value="3.9909084">
                <text:p>3.9909084</text:p>
              </table:table-cell>
              <table:table-cell office:value-type="float" office:value="4.1053686">
                <text:p>4.1053686</text:p>
              </table:table-cell>
              <table:table-cell office:value-type="float" office:value="4.2334833">
                <text:p>4.2334833</text:p>
              </table:table-cell>
              <table:table-cell office:value-type="float" office:value="4.702349">
                <text:p>4.702349</text:p>
              </table:table-cell>
              <table:table-cell office:value-type="float" office:value="3.8149152">
                <text:p>3.8149152</text:p>
              </table:table-cell>
              <table:table-cell office:value-type="float" office:value="3.61481">
                <text:p>3.61481</text:p>
              </table:table-cell>
              <table:table-cell office:value-type="float" office:value="3.6508582">
                <text:p>3.6508582</text:p>
              </table:table-cell>
              <table:table-cell office:value-type="float" office:value="3.5936522">
                <text:p>3.5936522</text:p>
              </table:table-cell>
              <table:table-cell office:value-type="float" office:value="3.569931">
                <text:p>3.569931</text:p>
              </table:table-cell>
              <table:table-cell office:value-type="float" office:value="3.6153276">
                <text:p>3.6153276</text:p>
              </table:table-cell>
              <table:table-cell office:value-type="float" office:value="3.7264152">
                <text:p>3.7264152</text:p>
              </table:table-cell>
              <table:table-cell office:value-type="float" office:value="3.8389282">
                <text:p>3.8389282</text:p>
              </table:table-cell>
              <table:table-cell office:value-type="float" office:value="4.015617">
                <text:p>4.015617</text:p>
              </table:table-cell>
              <table:table-cell office:value-type="float" office:value="4.146314">
                <text:p>4.146314</text:p>
              </table:table-cell>
              <table:table-cell office:value-type="float" office:value="4.0452867">
                <text:p>4.0452867</text:p>
              </table:table-cell>
              <table:table-cell office:value-type="float" office:value="3.9757178">
                <text:p>3.9757178</text:p>
              </table:table-cell>
              <table:table-cell office:value-type="float" office:value="4.1686406">
                <text:p>4.1686406</text:p>
              </table:table-cell>
              <table:table-cell office:value-type="float" office:value="4.576373">
                <text:p>4.576373</text:p>
              </table:table-cell>
              <table:table-cell office:value-type="float" office:value="3.8149152">
                <text:p>3.8149152</text:p>
              </table:table-cell>
              <table:table-cell office:value-type="float" office:value="3.6145396">
                <text:p>3.6145396</text:p>
              </table:table-cell>
              <table:table-cell office:value-type="float" office:value="3.6400375">
                <text:p>3.6400375</text:p>
              </table:table-cell>
              <table:table-cell office:value-type="float" office:value="3.5860426">
                <text:p>3.5860426</text:p>
              </table:table-cell>
              <table:table-cell office:value-type="float" office:value="3.5792058">
                <text:p>3.5792058</text:p>
              </table:table-cell>
              <table:table-cell office:value-type="float" office:value="3.6078143">
                <text:p>3.6078143</text:p>
              </table:table-cell>
              <table:table-cell office:value-type="float" office:value="3.7098193">
                <text:p>3.7098193</text:p>
              </table:table-cell>
              <table:table-cell office:value-type="float" office:value="3.8200665">
                <text:p>3.8200665</text:p>
              </table:table-cell>
              <table:table-cell office:value-type="float" office:value="4.066224">
                <text:p>4.066224</text:p>
              </table:table-cell>
              <table:table-cell office:value-type="float" office:value="4.220988">
                <text:p>4.220988</text:p>
              </table:table-cell>
              <table:table-cell office:value-type="float" office:value="3.9968252">
                <text:p>3.9968252</text:p>
              </table:table-cell>
              <table:table-cell office:value-type="float" office:value="4.0016723">
                <text:p>4.0016723</text:p>
              </table:table-cell>
              <table:table-cell office:value-type="float" office:value="4.4560676">
                <text:p>4.4560676</text:p>
              </table:table-cell>
              <table:table-cell office:value-type="float" office:value="4.8602996">
                <text:p>4.8602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834928">
                <text:p>3.5834928</text:p>
              </table:table-cell>
              <table:table-cell office:value-type="float" office:value="3.5154088">
                <text:p>3.5154088</text:p>
              </table:table-cell>
              <table:table-cell office:value-type="float" office:value="3.6400137">
                <text:p>3.6400137</text:p>
              </table:table-cell>
              <table:table-cell office:value-type="float" office:value="3.6246889">
                <text:p>3.6246889</text:p>
              </table:table-cell>
              <table:table-cell office:value-type="float" office:value="3.6882582">
                <text:p>3.6882582</text:p>
              </table:table-cell>
              <table:table-cell office:value-type="float" office:value="3.8245165">
                <text:p>3.8245165</text:p>
              </table:table-cell>
              <table:table-cell office:value-type="float" office:value="3.9366136">
                <text:p>3.9366136</text:p>
              </table:table-cell>
              <table:table-cell office:value-type="float" office:value="3.9450476">
                <text:p>3.9450476</text:p>
              </table:table-cell>
              <table:table-cell office:value-type="float" office:value="3.9635253">
                <text:p>3.9635253</text:p>
              </table:table-cell>
              <table:table-cell office:value-type="float" office:value="4.093953">
                <text:p>4.093953</text:p>
              </table:table-cell>
              <table:table-cell office:value-type="float" office:value="4.4606276">
                <text:p>4.4606276</text:p>
              </table:table-cell>
              <table:table-cell office:value-type="float" office:value="4.236344">
                <text:p>4.236344</text:p>
              </table:table-cell>
              <table:table-cell office:value-type="float" office:value="4.481027">
                <text:p>4.481027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828633">
                <text:p>3.5828633</text:p>
              </table:table-cell>
              <table:table-cell office:value-type="float" office:value="3.5140948">
                <text:p>3.5140948</text:p>
              </table:table-cell>
              <table:table-cell office:value-type="float" office:value="3.6341305">
                <text:p>3.6341305</text:p>
              </table:table-cell>
              <table:table-cell office:value-type="float" office:value="3.5826297">
                <text:p>3.5826297</text:p>
              </table:table-cell>
              <table:table-cell office:value-type="float" office:value="3.6562884">
                <text:p>3.6562884</text:p>
              </table:table-cell>
              <table:table-cell office:value-type="float" office:value="3.813946">
                <text:p>3.813946</text:p>
              </table:table-cell>
              <table:table-cell office:value-type="float" office:value="3.95218">
                <text:p>3.95218</text:p>
              </table:table-cell>
              <table:table-cell office:value-type="float" office:value="3.9340167">
                <text:p>3.9340167</text:p>
              </table:table-cell>
              <table:table-cell office:value-type="float" office:value="3.9520595">
                <text:p>3.9520595</text:p>
              </table:table-cell>
              <table:table-cell office:value-type="float" office:value="3.969519">
                <text:p>3.969519</text:p>
              </table:table-cell>
              <table:table-cell office:value-type="float" office:value="4.4148917">
                <text:p>4.4148917</text:p>
              </table:table-cell>
              <table:table-cell office:value-type="float" office:value="4.1875587">
                <text:p>4.1875587</text:p>
              </table:table-cell>
              <table:table-cell office:value-type="float" office:value="4.5497036">
                <text:p>4.5497036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837235">
                <text:p>3.5837235</text:p>
              </table:table-cell>
              <table:table-cell office:value-type="float" office:value="3.5141885">
                <text:p>3.5141885</text:p>
              </table:table-cell>
              <table:table-cell office:value-type="float" office:value="3.6470482">
                <text:p>3.6470482</text:p>
              </table:table-cell>
              <table:table-cell office:value-type="float" office:value="3.6719027">
                <text:p>3.6719027</text:p>
              </table:table-cell>
              <table:table-cell office:value-type="float" office:value="3.668609">
                <text:p>3.668609</text:p>
              </table:table-cell>
              <table:table-cell office:value-type="float" office:value="3.8205924">
                <text:p>3.8205924</text:p>
              </table:table-cell>
              <table:table-cell office:value-type="float" office:value="3.91406">
                <text:p>3.91406</text:p>
              </table:table-cell>
              <table:table-cell office:value-type="float" office:value="3.9221582">
                <text:p>3.9221582</text:p>
              </table:table-cell>
              <table:table-cell office:value-type="float" office:value="3.8668497">
                <text:p>3.8668497</text:p>
              </table:table-cell>
              <table:table-cell office:value-type="float" office:value="3.9566412">
                <text:p>3.9566412</text:p>
              </table:table-cell>
              <table:table-cell office:value-type="float" office:value="4.6167083">
                <text:p>4.6167083</text:p>
              </table:table-cell>
              <table:table-cell office:value-type="float" office:value="4.2546144">
                <text:p>4.2546144</text:p>
              </table:table-cell>
              <table:table-cell office:value-type="float" office:value="4.4829826">
                <text:p>4.4829826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81889">
                <text:p>3.581889</text:p>
              </table:table-cell>
              <table:table-cell office:value-type="float" office:value="3.511994">
                <text:p>3.511994</text:p>
              </table:table-cell>
              <table:table-cell office:value-type="float" office:value="3.637057">
                <text:p>3.637057</text:p>
              </table:table-cell>
              <table:table-cell office:value-type="float" office:value="3.6374824">
                <text:p>3.6374824</text:p>
              </table:table-cell>
              <table:table-cell office:value-type="float" office:value="3.6870658">
                <text:p>3.6870658</text:p>
              </table:table-cell>
              <table:table-cell office:value-type="float" office:value="3.8165693">
                <text:p>3.8165693</text:p>
              </table:table-cell>
              <table:table-cell office:value-type="float" office:value="3.9302065">
                <text:p>3.9302065</text:p>
              </table:table-cell>
              <table:table-cell office:value-type="float" office:value="3.9109507">
                <text:p>3.9109507</text:p>
              </table:table-cell>
              <table:table-cell office:value-type="float" office:value="3.9321308">
                <text:p>3.9321308</text:p>
              </table:table-cell>
              <table:table-cell office:value-type="float" office:value="4.079877">
                <text:p>4.079877</text:p>
              </table:table-cell>
              <table:table-cell office:value-type="float" office:value="4.4710274">
                <text:p>4.4710274</text:p>
              </table:table-cell>
              <table:table-cell office:value-type="float" office:value="4.2403316">
                <text:p>4.2403316</text:p>
              </table:table-cell>
              <table:table-cell office:value-type="float" office:value="4.753625">
                <text:p>4.753625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82519">
                <text:p>3.582519</text:p>
              </table:table-cell>
              <table:table-cell office:value-type="float" office:value="3.5133927">
                <text:p>3.5133927</text:p>
              </table:table-cell>
              <table:table-cell office:value-type="float" office:value="3.6327236">
                <text:p>3.6327236</text:p>
              </table:table-cell>
              <table:table-cell office:value-type="float" office:value="3.6179278">
                <text:p>3.6179278</text:p>
              </table:table-cell>
              <table:table-cell office:value-type="float" office:value="3.6670575">
                <text:p>3.6670575</text:p>
              </table:table-cell>
              <table:table-cell office:value-type="float" office:value="3.7813005">
                <text:p>3.7813005</text:p>
              </table:table-cell>
              <table:table-cell office:value-type="float" office:value="3.934746">
                <text:p>3.934746</text:p>
              </table:table-cell>
              <table:table-cell office:value-type="float" office:value="3.9475834">
                <text:p>3.9475834</text:p>
              </table:table-cell>
              <table:table-cell office:value-type="float" office:value="3.9391513">
                <text:p>3.9391513</text:p>
              </table:table-cell>
              <table:table-cell office:value-type="float" office:value="3.923536">
                <text:p>3.923536</text:p>
              </table:table-cell>
              <table:table-cell office:value-type="float" office:value="4.508383">
                <text:p>4.508383</text:p>
              </table:table-cell>
              <table:table-cell office:value-type="float" office:value="4.2957306">
                <text:p>4.2957306</text:p>
              </table:table-cell>
              <table:table-cell office:value-type="float" office:value="4.8908315">
                <text:p>4.8908315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83612">
                <text:p>3.583612</text:p>
              </table:table-cell>
              <table:table-cell office:value-type="float" office:value="3.5104105">
                <text:p>3.5104105</text:p>
              </table:table-cell>
              <table:table-cell office:value-type="float" office:value="3.6393812">
                <text:p>3.6393812</text:p>
              </table:table-cell>
              <table:table-cell office:value-type="float" office:value="3.6502585">
                <text:p>3.6502585</text:p>
              </table:table-cell>
              <table:table-cell office:value-type="float" office:value="3.6685088">
                <text:p>3.6685088</text:p>
              </table:table-cell>
              <table:table-cell office:value-type="float" office:value="3.810708">
                <text:p>3.810708</text:p>
              </table:table-cell>
              <table:table-cell office:value-type="float" office:value="3.9395874">
                <text:p>3.9395874</text:p>
              </table:table-cell>
              <table:table-cell office:value-type="float" office:value="3.891049">
                <text:p>3.891049</text:p>
              </table:table-cell>
              <table:table-cell office:value-type="float" office:value="3.9995768">
                <text:p>3.9995768</text:p>
              </table:table-cell>
              <table:table-cell office:value-type="float" office:value="3.959475">
                <text:p>3.959475</text:p>
              </table:table-cell>
              <table:table-cell office:value-type="float" office:value="4.5011196">
                <text:p>4.5011196</text:p>
              </table:table-cell>
              <table:table-cell office:value-type="float" office:value="4.243851">
                <text:p>4.243851</text:p>
              </table:table-cell>
              <table:table-cell office:value-type="float" office:value="4.7817607">
                <text:p>4.7817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603797">
                <text:p>3.5603797</text:p>
              </table:table-cell>
              <table:table-cell office:value-type="float" office:value="3.4919446">
                <text:p>3.4919446</text:p>
              </table:table-cell>
              <table:table-cell office:value-type="float" office:value="3.5744693">
                <text:p>3.5744693</text:p>
              </table:table-cell>
              <table:table-cell office:value-type="float" office:value="3.7197514">
                <text:p>3.7197514</text:p>
              </table:table-cell>
              <table:table-cell office:value-type="float" office:value="3.6499252">
                <text:p>3.6499252</text:p>
              </table:table-cell>
              <table:table-cell office:value-type="float" office:value="3.7302089">
                <text:p>3.7302089</text:p>
              </table:table-cell>
              <table:table-cell office:value-type="float" office:value="3.8873827">
                <text:p>3.8873827</text:p>
              </table:table-cell>
              <table:table-cell office:value-type="float" office:value="3.9724636">
                <text:p>3.9724636</text:p>
              </table:table-cell>
              <table:table-cell office:value-type="float" office:value="4.036974">
                <text:p>4.036974</text:p>
              </table:table-cell>
              <table:table-cell office:value-type="float" office:value="4.224291">
                <text:p>4.224291</text:p>
              </table:table-cell>
              <table:table-cell office:value-type="float" office:value="4.3531075">
                <text:p>4.3531075</text:p>
              </table:table-cell>
              <table:table-cell office:value-type="float" office:value="4.898872">
                <text:p>4.898872</text:p>
              </table:table-cell>
              <table:table-cell office:value-type="float" office:value="4.8468122">
                <text:p>4.8468122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59767">
                <text:p>3.559767</text:p>
              </table:table-cell>
              <table:table-cell office:value-type="float" office:value="3.489882">
                <text:p>3.489882</text:p>
              </table:table-cell>
              <table:table-cell office:value-type="float" office:value="3.5734658">
                <text:p>3.5734658</text:p>
              </table:table-cell>
              <table:table-cell office:value-type="float" office:value="3.6725736">
                <text:p>3.6725736</text:p>
              </table:table-cell>
              <table:table-cell office:value-type="float" office:value="3.648998">
                <text:p>3.648998</text:p>
              </table:table-cell>
              <table:table-cell office:value-type="float" office:value="3.7522895">
                <text:p>3.7522895</text:p>
              </table:table-cell>
              <table:table-cell office:value-type="float" office:value="3.924355">
                <text:p>3.924355</text:p>
              </table:table-cell>
              <table:table-cell office:value-type="float" office:value="3.9762878">
                <text:p>3.9762878</text:p>
              </table:table-cell>
              <table:table-cell office:value-type="float" office:value="4.0292287">
                <text:p>4.0292287</text:p>
              </table:table-cell>
              <table:table-cell office:value-type="float" office:value="4.4830093">
                <text:p>4.4830093</text:p>
              </table:table-cell>
              <table:table-cell office:value-type="float" office:value="4.4461417">
                <text:p>4.4461417</text:p>
              </table:table-cell>
              <table:table-cell office:value-type="float" office:value="4.7990265">
                <text:p>4.7990265</text:p>
              </table:table-cell>
              <table:table-cell office:value-type="float" office:value="5.196081">
                <text:p>5.196081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593252">
                <text:p>3.5593252</text:p>
              </table:table-cell>
              <table:table-cell office:value-type="float" office:value="3.4887486">
                <text:p>3.4887486</text:p>
              </table:table-cell>
              <table:table-cell office:value-type="float" office:value="3.5697188">
                <text:p>3.5697188</text:p>
              </table:table-cell>
              <table:table-cell office:value-type="float" office:value="3.6708305">
                <text:p>3.6708305</text:p>
              </table:table-cell>
              <table:table-cell office:value-type="float" office:value="3.647973">
                <text:p>3.647973</text:p>
              </table:table-cell>
              <table:table-cell office:value-type="float" office:value="3.7814076">
                <text:p>3.7814076</text:p>
              </table:table-cell>
              <table:table-cell office:value-type="float" office:value="3.908213">
                <text:p>3.908213</text:p>
              </table:table-cell>
              <table:table-cell office:value-type="float" office:value="3.9261622">
                <text:p>3.9261622</text:p>
              </table:table-cell>
              <table:table-cell office:value-type="float" office:value="4.043914">
                <text:p>4.043914</text:p>
              </table:table-cell>
              <table:table-cell office:value-type="float" office:value="4.4180627">
                <text:p>4.4180627</text:p>
              </table:table-cell>
              <table:table-cell office:value-type="float" office:value="4.432041">
                <text:p>4.432041</text:p>
              </table:table-cell>
              <table:table-cell office:value-type="float" office:value="5.2865205">
                <text:p>5.2865205</text:p>
              </table:table-cell>
              <table:table-cell office:value-type="float" office:value="4.9962797">
                <text:p>4.9962797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590649">
                <text:p>3.5590649</text:p>
              </table:table-cell>
              <table:table-cell office:value-type="float" office:value="3.4882743">
                <text:p>3.4882743</text:p>
              </table:table-cell>
              <table:table-cell office:value-type="float" office:value="3.5748034">
                <text:p>3.5748034</text:p>
              </table:table-cell>
              <table:table-cell office:value-type="float" office:value="3.720635">
                <text:p>3.720635</text:p>
              </table:table-cell>
              <table:table-cell office:value-type="float" office:value="3.6536438">
                <text:p>3.6536438</text:p>
              </table:table-cell>
              <table:table-cell office:value-type="float" office:value="3.7929962">
                <text:p>3.7929962</text:p>
              </table:table-cell>
              <table:table-cell office:value-type="float" office:value="3.9681423">
                <text:p>3.9681423</text:p>
              </table:table-cell>
              <table:table-cell office:value-type="float" office:value="3.9951756">
                <text:p>3.9951756</text:p>
              </table:table-cell>
              <table:table-cell office:value-type="float" office:value="4.105839">
                <text:p>4.105839</text:p>
              </table:table-cell>
              <table:table-cell office:value-type="float" office:value="4.5154366">
                <text:p>4.5154366</text:p>
              </table:table-cell>
              <table:table-cell office:value-type="float" office:value="4.5383525">
                <text:p>4.5383525</text:p>
              </table:table-cell>
              <table:table-cell office:value-type="float" office:value="5.0856895">
                <text:p>5.0856895</text:p>
              </table:table-cell>
              <table:table-cell office:value-type="float" office:value="5.062827">
                <text:p>5.062827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583935">
                <text:p>3.5583935</text:p>
              </table:table-cell>
              <table:table-cell office:value-type="float" office:value="3.490125">
                <text:p>3.490125</text:p>
              </table:table-cell>
              <table:table-cell office:value-type="float" office:value="3.5666192">
                <text:p>3.5666192</text:p>
              </table:table-cell>
              <table:table-cell office:value-type="float" office:value="3.6987412">
                <text:p>3.6987412</text:p>
              </table:table-cell>
              <table:table-cell office:value-type="float" office:value="3.6573334">
                <text:p>3.6573334</text:p>
              </table:table-cell>
              <table:table-cell office:value-type="float" office:value="3.7817538">
                <text:p>3.7817538</text:p>
              </table:table-cell>
              <table:table-cell office:value-type="float" office:value="3.9839344">
                <text:p>3.9839344</text:p>
              </table:table-cell>
              <table:table-cell office:value-type="float" office:value="4.0046477">
                <text:p>4.0046477</text:p>
              </table:table-cell>
              <table:table-cell office:value-type="float" office:value="4.0271373">
                <text:p>4.0271373</text:p>
              </table:table-cell>
              <table:table-cell office:value-type="float" office:value="4.4258986">
                <text:p>4.4258986</text:p>
              </table:table-cell>
              <table:table-cell office:value-type="float" office:value="4.4504776">
                <text:p>4.4504776</text:p>
              </table:table-cell>
              <table:table-cell office:value-type="float" office:value="5.1432085">
                <text:p>5.1432085</text:p>
              </table:table-cell>
              <table:table-cell office:value-type="float" office:value="5.784819">
                <text:p>5.784819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589151">
                <text:p>3.5589151</text:p>
              </table:table-cell>
              <table:table-cell office:value-type="float" office:value="3.4854147">
                <text:p>3.4854147</text:p>
              </table:table-cell>
              <table:table-cell office:value-type="float" office:value="3.5816998">
                <text:p>3.5816998</text:p>
              </table:table-cell>
              <table:table-cell office:value-type="float" office:value="3.7061136">
                <text:p>3.7061136</text:p>
              </table:table-cell>
              <table:table-cell office:value-type="float" office:value="3.6660717">
                <text:p>3.6660717</text:p>
              </table:table-cell>
              <table:table-cell office:value-type="float" office:value="3.7495205">
                <text:p>3.7495205</text:p>
              </table:table-cell>
              <table:table-cell office:value-type="float" office:value="3.8743293">
                <text:p>3.8743293</text:p>
              </table:table-cell>
              <table:table-cell office:value-type="float" office:value="3.9196525">
                <text:p>3.9196525</text:p>
              </table:table-cell>
              <table:table-cell office:value-type="float" office:value="4.070955">
                <text:p>4.070955</text:p>
              </table:table-cell>
              <table:table-cell office:value-type="float" office:value="4.5840187">
                <text:p>4.5840187</text:p>
              </table:table-cell>
              <table:table-cell office:value-type="float" office:value="4.3735847">
                <text:p>4.3735847</text:p>
              </table:table-cell>
              <table:table-cell office:value-type="float" office:value="4.753591">
                <text:p>4.753591</text:p>
              </table:table-cell>
              <table:table-cell office:value-type="float" office:value="5.807826">
                <text:p>5.8078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451934">
                <text:p>3.5451934</text:p>
              </table:table-cell>
              <table:table-cell office:value-type="float" office:value="3.4938664">
                <text:p>3.4938664</text:p>
              </table:table-cell>
              <table:table-cell office:value-type="float" office:value="3.4627507">
                <text:p>3.4627507</text:p>
              </table:table-cell>
              <table:table-cell office:value-type="float" office:value="3.5734591">
                <text:p>3.5734591</text:p>
              </table:table-cell>
              <table:table-cell office:value-type="float" office:value="3.5916562">
                <text:p>3.5916562</text:p>
              </table:table-cell>
              <table:table-cell office:value-type="float" office:value="3.5428138">
                <text:p>3.5428138</text:p>
              </table:table-cell>
              <table:table-cell office:value-type="float" office:value="3.6787264">
                <text:p>3.6787264</text:p>
              </table:table-cell>
              <table:table-cell office:value-type="float" office:value="3.9170702">
                <text:p>3.9170702</text:p>
              </table:table-cell>
              <table:table-cell office:value-type="float" office:value="3.8020763">
                <text:p>3.8020763</text:p>
              </table:table-cell>
              <table:table-cell office:value-type="float" office:value="4.3496304">
                <text:p>4.3496304</text:p>
              </table:table-cell>
              <table:table-cell office:value-type="float" office:value="4.232765">
                <text:p>4.232765</text:p>
              </table:table-cell>
              <table:table-cell office:value-type="float" office:value="4.965374">
                <text:p>4.965374</text:p>
              </table:table-cell>
              <table:table-cell office:value-type="float" office:value="5.235267">
                <text:p>5.235267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450585">
                <text:p>3.5450585</text:p>
              </table:table-cell>
              <table:table-cell office:value-type="float" office:value="3.4912977">
                <text:p>3.4912977</text:p>
              </table:table-cell>
              <table:table-cell office:value-type="float" office:value="3.461508">
                <text:p>3.461508</text:p>
              </table:table-cell>
              <table:table-cell office:value-type="float" office:value="3.6459413">
                <text:p>3.6459413</text:p>
              </table:table-cell>
              <table:table-cell office:value-type="float" office:value="3.6041539">
                <text:p>3.6041539</text:p>
              </table:table-cell>
              <table:table-cell office:value-type="float" office:value="3.54056">
                <text:p>3.54056</text:p>
              </table:table-cell>
              <table:table-cell office:value-type="float" office:value="3.6698086">
                <text:p>3.6698086</text:p>
              </table:table-cell>
              <table:table-cell office:value-type="float" office:value="3.9476886">
                <text:p>3.9476886</text:p>
              </table:table-cell>
              <table:table-cell office:value-type="float" office:value="3.9017992">
                <text:p>3.9017992</text:p>
              </table:table-cell>
              <table:table-cell office:value-type="float" office:value="4.273439">
                <text:p>4.273439</text:p>
              </table:table-cell>
              <table:table-cell office:value-type="float" office:value="4.3382087">
                <text:p>4.3382087</text:p>
              </table:table-cell>
              <table:table-cell office:value-type="float" office:value="4.699443">
                <text:p>4.699443</text:p>
              </table:table-cell>
              <table:table-cell office:value-type="float" office:value="5.083182">
                <text:p>5.083182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438097">
                <text:p>3.5438097</text:p>
              </table:table-cell>
              <table:table-cell office:value-type="float" office:value="3.489325">
                <text:p>3.489325</text:p>
              </table:table-cell>
              <table:table-cell office:value-type="float" office:value="3.4587336">
                <text:p>3.4587336</text:p>
              </table:table-cell>
              <table:table-cell office:value-type="float" office:value="3.5160887">
                <text:p>3.5160887</text:p>
              </table:table-cell>
              <table:table-cell office:value-type="float" office:value="3.61269">
                <text:p>3.61269</text:p>
              </table:table-cell>
              <table:table-cell office:value-type="float" office:value="3.5491393">
                <text:p>3.5491393</text:p>
              </table:table-cell>
              <table:table-cell office:value-type="float" office:value="3.6373858">
                <text:p>3.6373858</text:p>
              </table:table-cell>
              <table:table-cell office:value-type="float" office:value="3.7833178">
                <text:p>3.7833178</text:p>
              </table:table-cell>
              <table:table-cell office:value-type="float" office:value="4.0688205">
                <text:p>4.0688205</text:p>
              </table:table-cell>
              <table:table-cell office:value-type="float" office:value="4.0815277">
                <text:p>4.0815277</text:p>
              </table:table-cell>
              <table:table-cell office:value-type="float" office:value="4.529377">
                <text:p>4.529377</text:p>
              </table:table-cell>
              <table:table-cell office:value-type="float" office:value="4.5866547">
                <text:p>4.5866547</text:p>
              </table:table-cell>
              <table:table-cell office:value-type="float" office:value="5.794311">
                <text:p>5.794311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426786">
                <text:p>3.5426786</text:p>
              </table:table-cell>
              <table:table-cell office:value-type="float" office:value="3.490131">
                <text:p>3.490131</text:p>
              </table:table-cell>
              <table:table-cell office:value-type="float" office:value="3.4614196">
                <text:p>3.4614196</text:p>
              </table:table-cell>
              <table:table-cell office:value-type="float" office:value="3.5643516">
                <text:p>3.5643516</text:p>
              </table:table-cell>
              <table:table-cell office:value-type="float" office:value="3.5900106">
                <text:p>3.5900106</text:p>
              </table:table-cell>
              <table:table-cell office:value-type="float" office:value="3.5589535">
                <text:p>3.5589535</text:p>
              </table:table-cell>
              <table:table-cell office:value-type="float" office:value="3.6970124">
                <text:p>3.6970124</text:p>
              </table:table-cell>
              <table:table-cell office:value-type="float" office:value="3.8579545">
                <text:p>3.8579545</text:p>
              </table:table-cell>
              <table:table-cell office:value-type="float" office:value="4.222745">
                <text:p>4.222745</text:p>
              </table:table-cell>
              <table:table-cell office:value-type="float" office:value="4.386682">
                <text:p>4.386682</text:p>
              </table:table-cell>
              <table:table-cell office:value-type="float" office:value="4.477114">
                <text:p>4.477114</text:p>
              </table:table-cell>
              <table:table-cell office:value-type="float" office:value="5.4996686">
                <text:p>5.4996686</text:p>
              </table:table-cell>
              <table:table-cell office:value-type="float" office:value="4.6181226">
                <text:p>4.6181226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425923">
                <text:p>3.5425923</text:p>
              </table:table-cell>
              <table:table-cell office:value-type="float" office:value="3.4909248">
                <text:p>3.4909248</text:p>
              </table:table-cell>
              <table:table-cell office:value-type="float" office:value="3.4549975">
                <text:p>3.4549975</text:p>
              </table:table-cell>
              <table:table-cell office:value-type="float" office:value="3.5779855">
                <text:p>3.5779855</text:p>
              </table:table-cell>
              <table:table-cell office:value-type="float" office:value="3.6235013">
                <text:p>3.6235013</text:p>
              </table:table-cell>
              <table:table-cell office:value-type="float" office:value="3.5346377">
                <text:p>3.5346377</text:p>
              </table:table-cell>
              <table:table-cell office:value-type="float" office:value="3.7167096">
                <text:p>3.7167096</text:p>
              </table:table-cell>
              <table:table-cell office:value-type="float" office:value="3.930345">
                <text:p>3.930345</text:p>
              </table:table-cell>
              <table:table-cell office:value-type="float" office:value="3.7242296">
                <text:p>3.7242296</text:p>
              </table:table-cell>
              <table:table-cell office:value-type="float" office:value="4.244981">
                <text:p>4.244981</text:p>
              </table:table-cell>
              <table:table-cell office:value-type="float" office:value="4.470581">
                <text:p>4.470581</text:p>
              </table:table-cell>
              <table:table-cell office:value-type="float" office:value="4.9861355">
                <text:p>4.9861355</text:p>
              </table:table-cell>
              <table:table-cell office:value-type="float" office:value="4.929505">
                <text:p>4.929505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43335">
                <text:p>3.543335</text:p>
              </table:table-cell>
              <table:table-cell office:value-type="float" office:value="3.4820006">
                <text:p>3.4820006</text:p>
              </table:table-cell>
              <table:table-cell office:value-type="float" office:value="3.466051">
                <text:p>3.466051</text:p>
              </table:table-cell>
              <table:table-cell office:value-type="float" office:value="3.565475">
                <text:p>3.565475</text:p>
              </table:table-cell>
              <table:table-cell office:value-type="float" office:value="3.6382499">
                <text:p>3.6382499</text:p>
              </table:table-cell>
              <table:table-cell office:value-type="float" office:value="3.5480852">
                <text:p>3.5480852</text:p>
              </table:table-cell>
              <table:table-cell office:value-type="float" office:value="3.678781">
                <text:p>3.678781</text:p>
              </table:table-cell>
              <table:table-cell office:value-type="float" office:value="3.9176812">
                <text:p>3.9176812</text:p>
              </table:table-cell>
              <table:table-cell office:value-type="float" office:value="4.0887747">
                <text:p>4.0887747</text:p>
              </table:table-cell>
              <table:table-cell office:value-type="float" office:value="4.141389">
                <text:p>4.141389</text:p>
              </table:table-cell>
              <table:table-cell office:value-type="float" office:value="4.258964">
                <text:p>4.258964</text:p>
              </table:table-cell>
              <table:table-cell office:value-type="float" office:value="4.559968">
                <text:p>4.559968</text:p>
              </table:table-cell>
              <table:table-cell office:value-type="float" office:value="5.6284695">
                <text:p>5.62846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33827">
                <text:p>3.533827</text:p>
              </table:table-cell>
              <table:table-cell office:value-type="float" office:value="3.4922795">
                <text:p>3.4922795</text:p>
              </table:table-cell>
              <table:table-cell office:value-type="float" office:value="3.4427052">
                <text:p>3.4427052</text:p>
              </table:table-cell>
              <table:table-cell office:value-type="float" office:value="3.4247332">
                <text:p>3.4247332</text:p>
              </table:table-cell>
              <table:table-cell office:value-type="float" office:value="3.4543943">
                <text:p>3.4543943</text:p>
              </table:table-cell>
              <table:table-cell office:value-type="float" office:value="3.47675">
                <text:p>3.47675</text:p>
              </table:table-cell>
              <table:table-cell office:value-type="float" office:value="3.5630507">
                <text:p>3.5630507</text:p>
              </table:table-cell>
              <table:table-cell office:value-type="float" office:value="3.649212">
                <text:p>3.649212</text:p>
              </table:table-cell>
              <table:table-cell office:value-type="float" office:value="3.6821015">
                <text:p>3.6821015</text:p>
              </table:table-cell>
              <table:table-cell office:value-type="float" office:value="4.012044">
                <text:p>4.012044</text:p>
              </table:table-cell>
              <table:table-cell office:value-type="float" office:value="3.9995139">
                <text:p>3.9995139</text:p>
              </table:table-cell>
              <table:table-cell office:value-type="float" office:value="4.210921">
                <text:p>4.210921</text:p>
              </table:table-cell>
              <table:table-cell office:value-type="float" office:value="4.806288">
                <text:p>4.806288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336015">
                <text:p>3.5336015</text:p>
              </table:table-cell>
              <table:table-cell office:value-type="float" office:value="3.492019">
                <text:p>3.492019</text:p>
              </table:table-cell>
              <table:table-cell office:value-type="float" office:value="3.4405708">
                <text:p>3.4405708</text:p>
              </table:table-cell>
              <table:table-cell office:value-type="float" office:value="3.4572806">
                <text:p>3.4572806</text:p>
              </table:table-cell>
              <table:table-cell office:value-type="float" office:value="3.4612896">
                <text:p>3.4612896</text:p>
              </table:table-cell>
              <table:table-cell office:value-type="float" office:value="3.4795575">
                <text:p>3.4795575</text:p>
              </table:table-cell>
              <table:table-cell office:value-type="float" office:value="3.5633745">
                <text:p>3.5633745</text:p>
              </table:table-cell>
              <table:table-cell office:value-type="float" office:value="3.8033938">
                <text:p>3.8033938</text:p>
              </table:table-cell>
              <table:table-cell office:value-type="float" office:value="3.7551215">
                <text:p>3.7551215</text:p>
              </table:table-cell>
              <table:table-cell office:value-type="float" office:value="3.8237545">
                <text:p>3.8237545</text:p>
              </table:table-cell>
              <table:table-cell office:value-type="float" office:value="4.4857645">
                <text:p>4.4857645</text:p>
              </table:table-cell>
              <table:table-cell office:value-type="float" office:value="4.367902">
                <text:p>4.367902</text:p>
              </table:table-cell>
              <table:table-cell office:value-type="float" office:value="5.9718795">
                <text:p>5.9718795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321999">
                <text:p>3.5321999</text:p>
              </table:table-cell>
              <table:table-cell office:value-type="float" office:value="3.4889855">
                <text:p>3.4889855</text:p>
              </table:table-cell>
              <table:table-cell office:value-type="float" office:value="3.4419005">
                <text:p>3.4419005</text:p>
              </table:table-cell>
              <table:table-cell office:value-type="float" office:value="3.4254234">
                <text:p>3.4254234</text:p>
              </table:table-cell>
              <table:table-cell office:value-type="float" office:value="3.4535851">
                <text:p>3.4535851</text:p>
              </table:table-cell>
              <table:table-cell office:value-type="float" office:value="3.4793303">
                <text:p>3.4793303</text:p>
              </table:table-cell>
              <table:table-cell office:value-type="float" office:value="3.5526006">
                <text:p>3.5526006</text:p>
              </table:table-cell>
              <table:table-cell office:value-type="float" office:value="3.5827663">
                <text:p>3.5827663</text:p>
              </table:table-cell>
              <table:table-cell office:value-type="float" office:value="3.7572188">
                <text:p>3.7572188</text:p>
              </table:table-cell>
              <table:table-cell office:value-type="float" office:value="3.7618449">
                <text:p>3.7618449</text:p>
              </table:table-cell>
              <table:table-cell office:value-type="float" office:value="4.0797505">
                <text:p>4.0797505</text:p>
              </table:table-cell>
              <table:table-cell office:value-type="float" office:value="4.198746">
                <text:p>4.198746</text:p>
              </table:table-cell>
              <table:table-cell office:value-type="float" office:value="4.7812967">
                <text:p>4.7812967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310419">
                <text:p>3.5310419</text:p>
              </table:table-cell>
              <table:table-cell office:value-type="float" office:value="3.4896374">
                <text:p>3.4896374</text:p>
              </table:table-cell>
              <table:table-cell office:value-type="float" office:value="3.4383414">
                <text:p>3.4383414</text:p>
              </table:table-cell>
              <table:table-cell office:value-type="float" office:value="3.433339">
                <text:p>3.433339</text:p>
              </table:table-cell>
              <table:table-cell office:value-type="float" office:value="3.4551694">
                <text:p>3.4551694</text:p>
              </table:table-cell>
              <table:table-cell office:value-type="float" office:value="3.4822395">
                <text:p>3.4822395</text:p>
              </table:table-cell>
              <table:table-cell office:value-type="float" office:value="3.5781565">
                <text:p>3.5781565</text:p>
              </table:table-cell>
              <table:table-cell office:value-type="float" office:value="3.7827652">
                <text:p>3.7827652</text:p>
              </table:table-cell>
              <table:table-cell office:value-type="float" office:value="4.277904">
                <text:p>4.277904</text:p>
              </table:table-cell>
              <table:table-cell office:value-type="float" office:value="4.592842">
                <text:p>4.592842</text:p>
              </table:table-cell>
              <table:table-cell office:value-type="float" office:value="3.9921882">
                <text:p>3.9921882</text:p>
              </table:table-cell>
              <table:table-cell office:value-type="float" office:value="4.3547587">
                <text:p>4.3547587</text:p>
              </table:table-cell>
              <table:table-cell office:value-type="float" office:value="4.3568773">
                <text:p>4.3568773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320666">
                <text:p>3.5320666</text:p>
              </table:table-cell>
              <table:table-cell office:value-type="float" office:value="3.4896379">
                <text:p>3.4896379</text:p>
              </table:table-cell>
              <table:table-cell office:value-type="float" office:value="3.4337246">
                <text:p>3.4337246</text:p>
              </table:table-cell>
              <table:table-cell office:value-type="float" office:value="3.422436">
                <text:p>3.422436</text:p>
              </table:table-cell>
              <table:table-cell office:value-type="float" office:value="3.46133">
                <text:p>3.46133</text:p>
              </table:table-cell>
              <table:table-cell office:value-type="float" office:value="3.4675305">
                <text:p>3.4675305</text:p>
              </table:table-cell>
              <table:table-cell office:value-type="float" office:value="3.5830157">
                <text:p>3.5830157</text:p>
              </table:table-cell>
              <table:table-cell office:value-type="float" office:value="3.7008023">
                <text:p>3.7008023</text:p>
              </table:table-cell>
              <table:table-cell office:value-type="float" office:value="3.6552331">
                <text:p>3.6552331</text:p>
              </table:table-cell>
              <table:table-cell office:value-type="float" office:value="4.019848">
                <text:p>4.019848</text:p>
              </table:table-cell>
              <table:table-cell office:value-type="float" office:value="3.9904583">
                <text:p>3.9904583</text:p>
              </table:table-cell>
              <table:table-cell office:value-type="float" office:value="4.648652">
                <text:p>4.648652</text:p>
              </table:table-cell>
              <table:table-cell office:value-type="float" office:value="4.7811685">
                <text:p>4.7811685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316982">
                <text:p>3.5316982</text:p>
              </table:table-cell>
              <table:table-cell office:value-type="float" office:value="3.4828146">
                <text:p>3.4828146</text:p>
              </table:table-cell>
              <table:table-cell office:value-type="float" office:value="3.4412453">
                <text:p>3.4412453</text:p>
              </table:table-cell>
              <table:table-cell office:value-type="float" office:value="3.4285657">
                <text:p>3.4285657</text:p>
              </table:table-cell>
              <table:table-cell office:value-type="float" office:value="3.458002">
                <text:p>3.458002</text:p>
              </table:table-cell>
              <table:table-cell office:value-type="float" office:value="3.4741385">
                <text:p>3.4741385</text:p>
              </table:table-cell>
              <table:table-cell office:value-type="float" office:value="3.5548549">
                <text:p>3.5548549</text:p>
              </table:table-cell>
              <table:table-cell office:value-type="float" office:value="3.6303148">
                <text:p>3.6303148</text:p>
              </table:table-cell>
              <table:table-cell office:value-type="float" office:value="3.7630281">
                <text:p>3.7630281</text:p>
              </table:table-cell>
              <table:table-cell office:value-type="float" office:value="3.7205548">
                <text:p>3.7205548</text:p>
              </table:table-cell>
              <table:table-cell office:value-type="float" office:value="4.1275578">
                <text:p>4.1275578</text:p>
              </table:table-cell>
              <table:table-cell office:value-type="float" office:value="4.785038">
                <text:p>4.785038</text:p>
              </table:table-cell>
              <table:table-cell office:value-type="float" office:value="5.9762535">
                <text:p>5.97625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246727">
                <text:p>3.5246727</text:p>
              </table:table-cell>
              <table:table-cell office:value-type="float" office:value="3.4789436">
                <text:p>3.4789436</text:p>
              </table:table-cell>
              <table:table-cell office:value-type="float" office:value="3.4484043">
                <text:p>3.4484043</text:p>
              </table:table-cell>
              <table:table-cell office:value-type="float" office:value="3.431878">
                <text:p>3.431878</text:p>
              </table:table-cell>
              <table:table-cell office:value-type="float" office:value="3.4697835">
                <text:p>3.4697835</text:p>
              </table:table-cell>
              <table:table-cell office:value-type="float" office:value="3.4928317">
                <text:p>3.4928317</text:p>
              </table:table-cell>
              <table:table-cell office:value-type="float" office:value="3.5629113">
                <text:p>3.5629113</text:p>
              </table:table-cell>
              <table:table-cell office:value-type="float" office:value="3.600754">
                <text:p>3.600754</text:p>
              </table:table-cell>
              <table:table-cell office:value-type="float" office:value="3.6943078">
                <text:p>3.6943078</text:p>
              </table:table-cell>
              <table:table-cell office:value-type="float" office:value="3.8602352">
                <text:p>3.8602352</text:p>
              </table:table-cell>
              <table:table-cell office:value-type="float" office:value="3.8895745">
                <text:p>3.8895745</text:p>
              </table:table-cell>
              <table:table-cell office:value-type="float" office:value="3.957566">
                <text:p>3.957566</text:p>
              </table:table-cell>
              <table:table-cell office:value-type="float" office:value="4.388667">
                <text:p>4.388667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240884">
                <text:p>3.5240884</text:p>
              </table:table-cell>
              <table:table-cell office:value-type="float" office:value="3.4792948">
                <text:p>3.4792948</text:p>
              </table:table-cell>
              <table:table-cell office:value-type="float" office:value="3.4454298">
                <text:p>3.4454298</text:p>
              </table:table-cell>
              <table:table-cell office:value-type="float" office:value="3.4361012">
                <text:p>3.4361012</text:p>
              </table:table-cell>
              <table:table-cell office:value-type="float" office:value="3.4677815">
                <text:p>3.4677815</text:p>
              </table:table-cell>
              <table:table-cell office:value-type="float" office:value="3.4920583">
                <text:p>3.4920583</text:p>
              </table:table-cell>
              <table:table-cell office:value-type="float" office:value="3.5691175">
                <text:p>3.5691175</text:p>
              </table:table-cell>
              <table:table-cell office:value-type="float" office:value="3.611894">
                <text:p>3.611894</text:p>
              </table:table-cell>
              <table:table-cell office:value-type="float" office:value="3.6745784">
                <text:p>3.6745784</text:p>
              </table:table-cell>
              <table:table-cell office:value-type="float" office:value="3.7846029">
                <text:p>3.7846029</text:p>
              </table:table-cell>
              <table:table-cell office:value-type="float" office:value="4.1116824">
                <text:p>4.1116824</text:p>
              </table:table-cell>
              <table:table-cell office:value-type="float" office:value="4.0103083">
                <text:p>4.0103083</text:p>
              </table:table-cell>
              <table:table-cell office:value-type="float" office:value="5.1078897">
                <text:p>5.1078897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2316">
                <text:p>3.52316</text:p>
              </table:table-cell>
              <table:table-cell office:value-type="float" office:value="3.4766698">
                <text:p>3.4766698</text:p>
              </table:table-cell>
              <table:table-cell office:value-type="float" office:value="3.4462025">
                <text:p>3.4462025</text:p>
              </table:table-cell>
              <table:table-cell office:value-type="float" office:value="3.429686">
                <text:p>3.429686</text:p>
              </table:table-cell>
              <table:table-cell office:value-type="float" office:value="3.4645176">
                <text:p>3.4645176</text:p>
              </table:table-cell>
              <table:table-cell office:value-type="float" office:value="3.491863">
                <text:p>3.491863</text:p>
              </table:table-cell>
              <table:table-cell office:value-type="float" office:value="3.5597372">
                <text:p>3.5597372</text:p>
              </table:table-cell>
              <table:table-cell office:value-type="float" office:value="3.5882418">
                <text:p>3.5882418</text:p>
              </table:table-cell>
              <table:table-cell office:value-type="float" office:value="3.6224704">
                <text:p>3.6224704</text:p>
              </table:table-cell>
              <table:table-cell office:value-type="float" office:value="3.7382023">
                <text:p>3.7382023</text:p>
              </table:table-cell>
              <table:table-cell office:value-type="float" office:value="3.908761">
                <text:p>3.908761</text:p>
              </table:table-cell>
              <table:table-cell office:value-type="float" office:value="3.9550765">
                <text:p>3.9550765</text:p>
              </table:table-cell>
              <table:table-cell office:value-type="float" office:value="4.4793334">
                <text:p>4.4793334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220542">
                <text:p>3.5220542</text:p>
              </table:table-cell>
              <table:table-cell office:value-type="float" office:value="3.474452">
                <text:p>3.474452</text:p>
              </table:table-cell>
              <table:table-cell office:value-type="float" office:value="3.4431176">
                <text:p>3.4431176</text:p>
              </table:table-cell>
              <table:table-cell office:value-type="float" office:value="3.4395337">
                <text:p>3.4395337</text:p>
              </table:table-cell>
              <table:table-cell office:value-type="float" office:value="3.4666286">
                <text:p>3.4666286</text:p>
              </table:table-cell>
              <table:table-cell office:value-type="float" office:value="3.4928539">
                <text:p>3.4928539</text:p>
              </table:table-cell>
              <table:table-cell office:value-type="float" office:value="3.5751088">
                <text:p>3.5751088</text:p>
              </table:table-cell>
              <table:table-cell office:value-type="float" office:value="3.6141474">
                <text:p>3.6141474</text:p>
              </table:table-cell>
              <table:table-cell office:value-type="float" office:value="3.7625194">
                <text:p>3.7625194</text:p>
              </table:table-cell>
              <table:table-cell office:value-type="float" office:value="3.9125264">
                <text:p>3.9125264</text:p>
              </table:table-cell>
              <table:table-cell office:value-type="float" office:value="3.8564258">
                <text:p>3.8564258</text:p>
              </table:table-cell>
              <table:table-cell office:value-type="float" office:value="4.030483">
                <text:p>4.030483</text:p>
              </table:table-cell>
              <table:table-cell office:value-type="float" office:value="4.1875944">
                <text:p>4.1875944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231514">
                <text:p>3.5231514</text:p>
              </table:table-cell>
              <table:table-cell office:value-type="float" office:value="3.4783175">
                <text:p>3.4783175</text:p>
              </table:table-cell>
              <table:table-cell office:value-type="float" office:value="3.4406798">
                <text:p>3.4406798</text:p>
              </table:table-cell>
              <table:table-cell office:value-type="float" office:value="3.4305813">
                <text:p>3.4305813</text:p>
              </table:table-cell>
              <table:table-cell office:value-type="float" office:value="3.4669929">
                <text:p>3.4669929</text:p>
              </table:table-cell>
              <table:table-cell office:value-type="float" office:value="3.4816456">
                <text:p>3.4816456</text:p>
              </table:table-cell>
              <table:table-cell office:value-type="float" office:value="3.5726728">
                <text:p>3.5726728</text:p>
              </table:table-cell>
              <table:table-cell office:value-type="float" office:value="3.6096284">
                <text:p>3.6096284</text:p>
              </table:table-cell>
              <table:table-cell office:value-type="float" office:value="3.6665974">
                <text:p>3.6665974</text:p>
              </table:table-cell>
              <table:table-cell office:value-type="float" office:value="3.7971911">
                <text:p>3.7971911</text:p>
              </table:table-cell>
              <table:table-cell office:value-type="float" office:value="3.9003162">
                <text:p>3.9003162</text:p>
              </table:table-cell>
              <table:table-cell office:value-type="float" office:value="4.1437535">
                <text:p>4.1437535</text:p>
              </table:table-cell>
              <table:table-cell office:value-type="float" office:value="4.4256687">
                <text:p>4.4256687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221028">
                <text:p>3.5221028</text:p>
              </table:table-cell>
              <table:table-cell office:value-type="float" office:value="3.4761896">
                <text:p>3.4761896</text:p>
              </table:table-cell>
              <table:table-cell office:value-type="float" office:value="3.4463496">
                <text:p>3.4463496</text:p>
              </table:table-cell>
              <table:table-cell office:value-type="float" office:value="3.4353049">
                <text:p>3.4353049</text:p>
              </table:table-cell>
              <table:table-cell office:value-type="float" office:value="3.4694602">
                <text:p>3.4694602</text:p>
              </table:table-cell>
              <table:table-cell office:value-type="float" office:value="3.4837847">
                <text:p>3.4837847</text:p>
              </table:table-cell>
              <table:table-cell office:value-type="float" office:value="3.5560844">
                <text:p>3.5560844</text:p>
              </table:table-cell>
              <table:table-cell office:value-type="float" office:value="3.5966837">
                <text:p>3.5966837</text:p>
              </table:table-cell>
              <table:table-cell office:value-type="float" office:value="3.6970866">
                <text:p>3.6970866</text:p>
              </table:table-cell>
              <table:table-cell office:value-type="float" office:value="3.6980755">
                <text:p>3.6980755</text:p>
              </table:table-cell>
              <table:table-cell office:value-type="float" office:value="3.9813714">
                <text:p>3.9813714</text:p>
              </table:table-cell>
              <table:table-cell office:value-type="float" office:value="4.347986">
                <text:p>4.347986</text:p>
              </table:table-cell>
              <table:table-cell office:value-type="float" office:value="6.37758">
                <text:p>6.377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170355">
                <text:p>3.5170355</text:p>
              </table:table-cell>
              <table:table-cell office:value-type="float" office:value="3.4707518">
                <text:p>3.4707518</text:p>
              </table:table-cell>
              <table:table-cell office:value-type="float" office:value="3.4526484">
                <text:p>3.4526484</text:p>
              </table:table-cell>
              <table:table-cell office:value-type="float" office:value="3.4385834">
                <text:p>3.4385834</text:p>
              </table:table-cell>
              <table:table-cell office:value-type="float" office:value="3.4792516">
                <text:p>3.4792516</text:p>
              </table:table-cell>
              <table:table-cell office:value-type="float" office:value="3.5044582">
                <text:p>3.5044582</text:p>
              </table:table-cell>
              <table:table-cell office:value-type="float" office:value="3.5721748">
                <text:p>3.5721748</text:p>
              </table:table-cell>
              <table:table-cell office:value-type="float" office:value="3.609358">
                <text:p>3.609358</text:p>
              </table:table-cell>
              <table:table-cell office:value-type="float" office:value="3.7075481">
                <text:p>3.7075481</text:p>
              </table:table-cell>
              <table:table-cell office:value-type="float" office:value="3.8717346">
                <text:p>3.8717346</text:p>
              </table:table-cell>
              <table:table-cell office:value-type="float" office:value="3.8971694">
                <text:p>3.8971694</text:p>
              </table:table-cell>
              <table:table-cell office:value-type="float" office:value="3.975917">
                <text:p>3.975917</text:p>
              </table:table-cell>
              <table:table-cell office:value-type="float" office:value="4.339547">
                <text:p>4.339547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16726">
                <text:p>3.516726</text:p>
              </table:table-cell>
              <table:table-cell office:value-type="float" office:value="3.4713914">
                <text:p>3.4713914</text:p>
              </table:table-cell>
              <table:table-cell office:value-type="float" office:value="3.4502985">
                <text:p>3.4502985</text:p>
              </table:table-cell>
              <table:table-cell office:value-type="float" office:value="3.442985">
                <text:p>3.442985</text:p>
              </table:table-cell>
              <table:table-cell office:value-type="float" office:value="3.4765751">
                <text:p>3.4765751</text:p>
              </table:table-cell>
              <table:table-cell office:value-type="float" office:value="3.5029716">
                <text:p>3.5029716</text:p>
              </table:table-cell>
              <table:table-cell office:value-type="float" office:value="3.5784044">
                <text:p>3.5784044</text:p>
              </table:table-cell>
              <table:table-cell office:value-type="float" office:value="3.6100156">
                <text:p>3.6100156</text:p>
              </table:table-cell>
              <table:table-cell office:value-type="float" office:value="3.6850045">
                <text:p>3.6850045</text:p>
              </table:table-cell>
              <table:table-cell office:value-type="float" office:value="3.792997">
                <text:p>3.792997</text:p>
              </table:table-cell>
              <table:table-cell office:value-type="float" office:value="4.0354795">
                <text:p>4.0354795</text:p>
              </table:table-cell>
              <table:table-cell office:value-type="float" office:value="4.017597">
                <text:p>4.017597</text:p>
              </table:table-cell>
              <table:table-cell office:value-type="float" office:value="4.8317122">
                <text:p>4.8317122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148816">
                <text:p>3.5148816</text:p>
              </table:table-cell>
              <table:table-cell office:value-type="float" office:value="3.469151">
                <text:p>3.469151</text:p>
              </table:table-cell>
              <table:table-cell office:value-type="float" office:value="3.4497857">
                <text:p>3.4497857</text:p>
              </table:table-cell>
              <table:table-cell office:value-type="float" office:value="3.436707">
                <text:p>3.436707</text:p>
              </table:table-cell>
              <table:table-cell office:value-type="float" office:value="3.4751365">
                <text:p>3.4751365</text:p>
              </table:table-cell>
              <table:table-cell office:value-type="float" office:value="3.5027308">
                <text:p>3.5027308</text:p>
              </table:table-cell>
              <table:table-cell office:value-type="float" office:value="3.5681188">
                <text:p>3.5681188</text:p>
              </table:table-cell>
              <table:table-cell office:value-type="float" office:value="3.5999002">
                <text:p>3.5999002</text:p>
              </table:table-cell>
              <table:table-cell office:value-type="float" office:value="3.6368895">
                <text:p>3.6368895</text:p>
              </table:table-cell>
              <table:table-cell office:value-type="float" office:value="3.7470107">
                <text:p>3.7470107</text:p>
              </table:table-cell>
              <table:table-cell office:value-type="float" office:value="3.9293058">
                <text:p>3.9293058</text:p>
              </table:table-cell>
              <table:table-cell office:value-type="float" office:value="3.9681451">
                <text:p>3.9681451</text:p>
              </table:table-cell>
              <table:table-cell office:value-type="float" office:value="4.3513694">
                <text:p>4.3513694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134726">
                <text:p>3.5134726</text:p>
              </table:table-cell>
              <table:table-cell office:value-type="float" office:value="3.4677298">
                <text:p>3.4677298</text:p>
              </table:table-cell>
              <table:table-cell office:value-type="float" office:value="3.4480166">
                <text:p>3.4480166</text:p>
              </table:table-cell>
              <table:table-cell office:value-type="float" office:value="3.4455814">
                <text:p>3.4455814</text:p>
              </table:table-cell>
              <table:table-cell office:value-type="float" office:value="3.4748266">
                <text:p>3.4748266</text:p>
              </table:table-cell>
              <table:table-cell office:value-type="float" office:value="3.5039802">
                <text:p>3.5039802</text:p>
              </table:table-cell>
              <table:table-cell office:value-type="float" office:value="3.582783">
                <text:p>3.582783</text:p>
              </table:table-cell>
              <table:table-cell office:value-type="float" office:value="3.6114385">
                <text:p>3.6114385</text:p>
              </table:table-cell>
              <table:table-cell office:value-type="float" office:value="3.7144501">
                <text:p>3.7144501</text:p>
              </table:table-cell>
              <table:table-cell office:value-type="float" office:value="3.9022317">
                <text:p>3.9022317</text:p>
              </table:table-cell>
              <table:table-cell office:value-type="float" office:value="3.8819947">
                <text:p>3.8819947</text:p>
              </table:table-cell>
              <table:table-cell office:value-type="float" office:value="4.054431">
                <text:p>4.054431</text:p>
              </table:table-cell>
              <table:table-cell office:value-type="float" office:value="4.1638427">
                <text:p>4.1638427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142481">
                <text:p>3.5142481</text:p>
              </table:table-cell>
              <table:table-cell office:value-type="float" office:value="3.4704463">
                <text:p>3.4704463</text:p>
              </table:table-cell>
              <table:table-cell office:value-type="float" office:value="3.4449186">
                <text:p>3.4449186</text:p>
              </table:table-cell>
              <table:table-cell office:value-type="float" office:value="3.4366646">
                <text:p>3.4366646</text:p>
              </table:table-cell>
              <table:table-cell office:value-type="float" office:value="3.4767668">
                <text:p>3.4767668</text:p>
              </table:table-cell>
              <table:table-cell office:value-type="float" office:value="3.4926736">
                <text:p>3.4926736</text:p>
              </table:table-cell>
              <table:table-cell office:value-type="float" office:value="3.5805366">
                <text:p>3.5805366</text:p>
              </table:table-cell>
              <table:table-cell office:value-type="float" office:value="3.612213">
                <text:p>3.612213</text:p>
              </table:table-cell>
              <table:table-cell office:value-type="float" office:value="3.6798635">
                <text:p>3.6798635</text:p>
              </table:table-cell>
              <table:table-cell office:value-type="float" office:value="3.7972796">
                <text:p>3.7972796</text:p>
              </table:table-cell>
              <table:table-cell office:value-type="float" office:value="3.9161816">
                <text:p>3.9161816</text:p>
              </table:table-cell>
              <table:table-cell office:value-type="float" office:value="4.098529">
                <text:p>4.098529</text:p>
              </table:table-cell>
              <table:table-cell office:value-type="float" office:value="4.4079485">
                <text:p>4.4079485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145051">
                <text:p>3.5145051</text:p>
              </table:table-cell>
              <table:table-cell office:value-type="float" office:value="3.469067">
                <text:p>3.469067</text:p>
              </table:table-cell>
              <table:table-cell office:value-type="float" office:value="3.450421">
                <text:p>3.450421</text:p>
              </table:table-cell>
              <table:table-cell office:value-type="float" office:value="3.4421287">
                <text:p>3.4421287</text:p>
              </table:table-cell>
              <table:table-cell office:value-type="float" office:value="3.4783835">
                <text:p>3.4783835</text:p>
              </table:table-cell>
              <table:table-cell office:value-type="float" office:value="3.4923978">
                <text:p>3.4923978</text:p>
              </table:table-cell>
              <table:table-cell office:value-type="float" office:value="3.562627">
                <text:p>3.562627</text:p>
              </table:table-cell>
              <table:table-cell office:value-type="float" office:value="3.6088881">
                <text:p>3.6088881</text:p>
              </table:table-cell>
              <table:table-cell office:value-type="float" office:value="3.7078123">
                <text:p>3.7078123</text:p>
              </table:table-cell>
              <table:table-cell office:value-type="float" office:value="3.7091572">
                <text:p>3.7091572</text:p>
              </table:table-cell>
              <table:table-cell office:value-type="float" office:value="3.989023">
                <text:p>3.989023</text:p>
              </table:table-cell>
              <table:table-cell office:value-type="float" office:value="3.9551978">
                <text:p>3.9551978</text:p>
              </table:table-cell>
              <table:table-cell office:value-type="float" office:value="5.5675807">
                <text:p>5.5675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102072">
                <text:p>3.5102072</text:p>
              </table:table-cell>
              <table:table-cell office:value-type="float" office:value="3.4722505">
                <text:p>3.4722505</text:p>
              </table:table-cell>
              <table:table-cell office:value-type="float" office:value="3.4567373">
                <text:p>3.4567373</text:p>
              </table:table-cell>
              <table:table-cell office:value-type="float" office:value="3.4450617">
                <text:p>3.4450617</text:p>
              </table:table-cell>
              <table:table-cell office:value-type="float" office:value="3.4877398">
                <text:p>3.4877398</text:p>
              </table:table-cell>
              <table:table-cell office:value-type="float" office:value="3.5158274">
                <text:p>3.5158274</text:p>
              </table:table-cell>
              <table:table-cell office:value-type="float" office:value="3.5827253">
                <text:p>3.5827253</text:p>
              </table:table-cell>
              <table:table-cell office:value-type="float" office:value="3.6201046">
                <text:p>3.6201046</text:p>
              </table:table-cell>
              <table:table-cell office:value-type="float" office:value="3.7205443">
                <text:p>3.7205443</text:p>
              </table:table-cell>
              <table:table-cell office:value-type="float" office:value="3.8831997">
                <text:p>3.8831997</text:p>
              </table:table-cell>
              <table:table-cell office:value-type="float" office:value="3.909752">
                <text:p>3.909752</text:p>
              </table:table-cell>
              <table:table-cell office:value-type="float" office:value="3.9919693">
                <text:p>3.9919693</text:p>
              </table:table-cell>
              <table:table-cell office:value-type="float" office:value="4.3513947">
                <text:p>4.3513947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09542">
                <text:p>3.509542</text:p>
              </table:table-cell>
              <table:table-cell office:value-type="float" office:value="3.4729366">
                <text:p>3.4729366</text:p>
              </table:table-cell>
              <table:table-cell office:value-type="float" office:value="3.455729">
                <text:p>3.455729</text:p>
              </table:table-cell>
              <table:table-cell office:value-type="float" office:value="3.4503496">
                <text:p>3.4503496</text:p>
              </table:table-cell>
              <table:table-cell office:value-type="float" office:value="3.4856532">
                <text:p>3.4856532</text:p>
              </table:table-cell>
              <table:table-cell office:value-type="float" office:value="3.5136063">
                <text:p>3.5136063</text:p>
              </table:table-cell>
              <table:table-cell office:value-type="float" office:value="3.5880167">
                <text:p>3.5880167</text:p>
              </table:table-cell>
              <table:table-cell office:value-type="float" office:value="3.6164277">
                <text:p>3.6164277</text:p>
              </table:table-cell>
              <table:table-cell office:value-type="float" office:value="3.6958697">
                <text:p>3.6958697</text:p>
              </table:table-cell>
              <table:table-cell office:value-type="float" office:value="3.8021426">
                <text:p>3.8021426</text:p>
              </table:table-cell>
              <table:table-cell office:value-type="float" office:value="4.039813">
                <text:p>4.039813</text:p>
              </table:table-cell>
              <table:table-cell office:value-type="float" office:value="4.029128">
                <text:p>4.029128</text:p>
              </table:table-cell>
              <table:table-cell office:value-type="float" office:value="4.578512">
                <text:p>4.578512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081856">
                <text:p>3.5081856</text:p>
              </table:table-cell>
              <table:table-cell office:value-type="float" office:value="3.4689844">
                <text:p>3.4689844</text:p>
              </table:table-cell>
              <table:table-cell office:value-type="float" office:value="3.4552245">
                <text:p>3.4552245</text:p>
              </table:table-cell>
              <table:table-cell office:value-type="float" office:value="3.4446445">
                <text:p>3.4446445</text:p>
              </table:table-cell>
              <table:table-cell office:value-type="float" office:value="3.4845793">
                <text:p>3.4845793</text:p>
              </table:table-cell>
              <table:table-cell office:value-type="float" office:value="3.5131984">
                <text:p>3.5131984</text:p>
              </table:table-cell>
              <table:table-cell office:value-type="float" office:value="3.5775836">
                <text:p>3.5775836</text:p>
              </table:table-cell>
              <table:table-cell office:value-type="float" office:value="3.6107543">
                <text:p>3.6107543</text:p>
              </table:table-cell>
              <table:table-cell office:value-type="float" office:value="3.6483238">
                <text:p>3.6483238</text:p>
              </table:table-cell>
              <table:table-cell office:value-type="float" office:value="3.756402">
                <text:p>3.756402</text:p>
              </table:table-cell>
              <table:table-cell office:value-type="float" office:value="3.9485867">
                <text:p>3.9485867</text:p>
              </table:table-cell>
              <table:table-cell office:value-type="float" office:value="3.9893844">
                <text:p>3.9893844</text:p>
              </table:table-cell>
              <table:table-cell office:value-type="float" office:value="4.3642893">
                <text:p>4.3642893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064359">
                <text:p>3.5064359</text:p>
              </table:table-cell>
              <table:table-cell office:value-type="float" office:value="3.4689748">
                <text:p>3.4689748</text:p>
              </table:table-cell>
              <table:table-cell office:value-type="float" office:value="3.4514208">
                <text:p>3.4514208</text:p>
              </table:table-cell>
              <table:table-cell office:value-type="float" office:value="3.453203">
                <text:p>3.453203</text:p>
              </table:table-cell>
              <table:table-cell office:value-type="float" office:value="3.4850307">
                <text:p>3.4850307</text:p>
              </table:table-cell>
              <table:table-cell office:value-type="float" office:value="3.5148375">
                <text:p>3.5148375</text:p>
              </table:table-cell>
              <table:table-cell office:value-type="float" office:value="3.5928104">
                <text:p>3.5928104</text:p>
              </table:table-cell>
              <table:table-cell office:value-type="float" office:value="3.617532">
                <text:p>3.617532</text:p>
              </table:table-cell>
              <table:table-cell office:value-type="float" office:value="3.7246654">
                <text:p>3.7246654</text:p>
              </table:table-cell>
              <table:table-cell office:value-type="float" office:value="3.915736">
                <text:p>3.915736</text:p>
              </table:table-cell>
              <table:table-cell office:value-type="float" office:value="3.902115">
                <text:p>3.902115</text:p>
              </table:table-cell>
              <table:table-cell office:value-type="float" office:value="4.075966">
                <text:p>4.075966</text:p>
              </table:table-cell>
              <table:table-cell office:value-type="float" office:value="4.1710477">
                <text:p>4.1710477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0726">
                <text:p>3.50726</text:p>
              </table:table-cell>
              <table:table-cell office:value-type="float" office:value="3.4717305">
                <text:p>3.4717305</text:p>
              </table:table-cell>
              <table:table-cell office:value-type="float" office:value="3.4491231">
                <text:p>3.4491231</text:p>
              </table:table-cell>
              <table:table-cell office:value-type="float" office:value="3.4430697">
                <text:p>3.4430697</text:p>
              </table:table-cell>
              <table:table-cell office:value-type="float" office:value="3.4871974">
                <text:p>3.4871974</text:p>
              </table:table-cell>
              <table:table-cell office:value-type="float" office:value="3.503404">
                <text:p>3.503404</text:p>
              </table:table-cell>
              <table:table-cell office:value-type="float" office:value="3.590072">
                <text:p>3.590072</text:p>
              </table:table-cell>
              <table:table-cell office:value-type="float" office:value="3.6192477">
                <text:p>3.6192477</text:p>
              </table:table-cell>
              <table:table-cell office:value-type="float" office:value="3.6920927">
                <text:p>3.6920927</text:p>
              </table:table-cell>
              <table:table-cell office:value-type="float" office:value="3.8027947">
                <text:p>3.8027947</text:p>
              </table:table-cell>
              <table:table-cell office:value-type="float" office:value="3.930025">
                <text:p>3.930025</text:p>
              </table:table-cell>
              <table:table-cell office:value-type="float" office:value="4.11167">
                <text:p>4.11167</text:p>
              </table:table-cell>
              <table:table-cell office:value-type="float" office:value="4.418408">
                <text:p>4.418408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073264">
                <text:p>3.5073264</text:p>
              </table:table-cell>
              <table:table-cell office:value-type="float" office:value="3.4697003">
                <text:p>3.4697003</text:p>
              </table:table-cell>
              <table:table-cell office:value-type="float" office:value="3.454582">
                <text:p>3.454582</text:p>
              </table:table-cell>
              <table:table-cell office:value-type="float" office:value="3.448712">
                <text:p>3.448712</text:p>
              </table:table-cell>
              <table:table-cell office:value-type="float" office:value="3.4880352">
                <text:p>3.4880352</text:p>
              </table:table-cell>
              <table:table-cell office:value-type="float" office:value="3.5009727">
                <text:p>3.5009727</text:p>
              </table:table-cell>
              <table:table-cell office:value-type="float" office:value="3.572391">
                <text:p>3.572391</text:p>
              </table:table-cell>
              <table:table-cell office:value-type="float" office:value="3.620587">
                <text:p>3.620587</text:p>
              </table:table-cell>
              <table:table-cell office:value-type="float" office:value="3.7188733">
                <text:p>3.7188733</text:p>
              </table:table-cell>
              <table:table-cell office:value-type="float" office:value="3.721421">
                <text:p>3.721421</text:p>
              </table:table-cell>
              <table:table-cell office:value-type="float" office:value="3.9987905">
                <text:p>3.9987905</text:p>
              </table:table-cell>
              <table:table-cell office:value-type="float" office:value="3.9700036">
                <text:p>3.9700036</text:p>
              </table:table-cell>
              <table:table-cell office:value-type="float" office:value="4.8769407">
                <text:p>4.8769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04861">
                <text:p>3.504861</text:p>
              </table:table-cell>
              <table:table-cell office:value-type="float" office:value="3.4748933">
                <text:p>3.4748933</text:p>
              </table:table-cell>
              <table:table-cell office:value-type="float" office:value="3.4613128">
                <text:p>3.4613128</text:p>
              </table:table-cell>
              <table:table-cell office:value-type="float" office:value="3.452393">
                <text:p>3.452393</text:p>
              </table:table-cell>
              <table:table-cell office:value-type="float" office:value="3.4967816">
                <text:p>3.4967816</text:p>
              </table:table-cell>
              <table:table-cell office:value-type="float" office:value="3.5271697">
                <text:p>3.5271697</text:p>
              </table:table-cell>
              <table:table-cell office:value-type="float" office:value="3.5926752">
                <text:p>3.5926752</text:p>
              </table:table-cell>
              <table:table-cell office:value-type="float" office:value="3.6312535">
                <text:p>3.6312535</text:p>
              </table:table-cell>
              <table:table-cell office:value-type="float" office:value="3.7332">
                <text:p>3.7332</text:p>
              </table:table-cell>
              <table:table-cell office:value-type="float" office:value="3.8944995">
                <text:p>3.8944995</text:p>
              </table:table-cell>
              <table:table-cell office:value-type="float" office:value="3.9214852">
                <text:p>3.9214852</text:p>
              </table:table-cell>
              <table:table-cell office:value-type="float" office:value="4.0064473">
                <text:p>4.0064473</text:p>
              </table:table-cell>
              <table:table-cell office:value-type="float" office:value="4.363253">
                <text:p>4.363253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04132">
                <text:p>3.504132</text:p>
              </table:table-cell>
              <table:table-cell office:value-type="float" office:value="3.4760854">
                <text:p>3.4760854</text:p>
              </table:table-cell>
              <table:table-cell office:value-type="float" office:value="3.4609923">
                <text:p>3.4609923</text:p>
              </table:table-cell>
              <table:table-cell office:value-type="float" office:value="3.4568698">
                <text:p>3.4568698</text:p>
              </table:table-cell>
              <table:table-cell office:value-type="float" office:value="3.4949813">
                <text:p>3.4949813</text:p>
              </table:table-cell>
              <table:table-cell office:value-type="float" office:value="3.5244107">
                <text:p>3.5244107</text:p>
              </table:table-cell>
              <table:table-cell office:value-type="float" office:value="3.5970314">
                <text:p>3.5970314</text:p>
              </table:table-cell>
              <table:table-cell office:value-type="float" office:value="3.6247623">
                <text:p>3.6247623</text:p>
              </table:table-cell>
              <table:table-cell office:value-type="float" office:value="3.7066398">
                <text:p>3.7066398</text:p>
              </table:table-cell>
              <table:table-cell office:value-type="float" office:value="3.8112333">
                <text:p>3.8112333</text:p>
              </table:table-cell>
              <table:table-cell office:value-type="float" office:value="4.04779">
                <text:p>4.04779</text:p>
              </table:table-cell>
              <table:table-cell office:value-type="float" office:value="4.041444">
                <text:p>4.041444</text:p>
              </table:table-cell>
              <table:table-cell office:value-type="float" office:value="4.5767403">
                <text:p>4.5767403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033267">
                <text:p>3.5033267</text:p>
              </table:table-cell>
              <table:table-cell office:value-type="float" office:value="3.4724565">
                <text:p>3.4724565</text:p>
              </table:table-cell>
              <table:table-cell office:value-type="float" office:value="3.4601824">
                <text:p>3.4601824</text:p>
              </table:table-cell>
              <table:table-cell office:value-type="float" office:value="3.4520733">
                <text:p>3.4520733</text:p>
              </table:table-cell>
              <table:table-cell office:value-type="float" office:value="3.493507">
                <text:p>3.493507</text:p>
              </table:table-cell>
              <table:table-cell office:value-type="float" office:value="3.5231712">
                <text:p>3.5231712</text:p>
              </table:table-cell>
              <table:table-cell office:value-type="float" office:value="3.5872905">
                <text:p>3.5872905</text:p>
              </table:table-cell>
              <table:table-cell office:value-type="float" office:value="3.62102">
                <text:p>3.62102</text:p>
              </table:table-cell>
              <table:table-cell office:value-type="float" office:value="3.659144">
                <text:p>3.659144</text:p>
              </table:table-cell>
              <table:table-cell office:value-type="float" office:value="3.765791">
                <text:p>3.765791</text:p>
              </table:table-cell>
              <table:table-cell office:value-type="float" office:value="3.9653685">
                <text:p>3.9653685</text:p>
              </table:table-cell>
              <table:table-cell office:value-type="float" office:value="4.007456">
                <text:p>4.007456</text:p>
              </table:table-cell>
              <table:table-cell office:value-type="float" office:value="4.3769054">
                <text:p>4.3769054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008488">
                <text:p>3.5008488</text:p>
              </table:table-cell>
              <table:table-cell office:value-type="float" office:value="3.471335">
                <text:p>3.471335</text:p>
              </table:table-cell>
              <table:table-cell office:value-type="float" office:value="3.4571147">
                <text:p>3.4571147</text:p>
              </table:table-cell>
              <table:table-cell office:value-type="float" office:value="3.4593627">
                <text:p>3.4593627</text:p>
              </table:table-cell>
              <table:table-cell office:value-type="float" office:value="3.494569">
                <text:p>3.494569</text:p>
              </table:table-cell>
              <table:table-cell office:value-type="float" office:value="3.5246222">
                <text:p>3.5246222</text:p>
              </table:table-cell>
              <table:table-cell office:value-type="float" office:value="3.6025465">
                <text:p>3.6025465</text:p>
              </table:table-cell>
              <table:table-cell office:value-type="float" office:value="3.6263056">
                <text:p>3.6263056</text:p>
              </table:table-cell>
              <table:table-cell office:value-type="float" office:value="3.7358816">
                <text:p>3.7358816</text:p>
              </table:table-cell>
              <table:table-cell office:value-type="float" office:value="3.9298487">
                <text:p>3.9298487</text:p>
              </table:table-cell>
              <table:table-cell office:value-type="float" office:value="3.9190238">
                <text:p>3.9190238</text:p>
              </table:table-cell>
              <table:table-cell office:value-type="float" office:value="4.0954485">
                <text:p>4.0954485</text:p>
              </table:table-cell>
              <table:table-cell office:value-type="float" office:value="4.180665">
                <text:p>4.180665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014303">
                <text:p>3.5014303</text:p>
              </table:table-cell>
              <table:table-cell office:value-type="float" office:value="3.475108">
                <text:p>3.475108</text:p>
              </table:table-cell>
              <table:table-cell office:value-type="float" office:value="3.4537416">
                <text:p>3.4537416</text:p>
              </table:table-cell>
              <table:table-cell office:value-type="float" office:value="3.449502">
                <text:p>3.449502</text:p>
              </table:table-cell>
              <table:table-cell office:value-type="float" office:value="3.4972427">
                <text:p>3.4972427</text:p>
              </table:table-cell>
              <table:table-cell office:value-type="float" office:value="3.5136006">
                <text:p>3.5136006</text:p>
              </table:table-cell>
              <table:table-cell office:value-type="float" office:value="3.5999353">
                <text:p>3.5999353</text:p>
              </table:table-cell>
              <table:table-cell office:value-type="float" office:value="3.6277225">
                <text:p>3.6277225</text:p>
              </table:table-cell>
              <table:table-cell office:value-type="float" office:value="3.7034764">
                <text:p>3.7034764</text:p>
              </table:table-cell>
              <table:table-cell office:value-type="float" office:value="3.8100233">
                <text:p>3.8100233</text:p>
              </table:table-cell>
              <table:table-cell office:value-type="float" office:value="3.9420204">
                <text:p>3.9420204</text:p>
              </table:table-cell>
              <table:table-cell office:value-type="float" office:value="4.124472">
                <text:p>4.124472</text:p>
              </table:table-cell>
              <table:table-cell office:value-type="float" office:value="4.4296894">
                <text:p>4.4296894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004497">
                <text:p>3.5004497</text:p>
              </table:table-cell>
              <table:table-cell office:value-type="float" office:value="3.4718788">
                <text:p>3.4718788</text:p>
              </table:table-cell>
              <table:table-cell office:value-type="float" office:value="3.4594898">
                <text:p>3.4594898</text:p>
              </table:table-cell>
              <table:table-cell office:value-type="float" office:value="3.4553866">
                <text:p>3.4553866</text:p>
              </table:table-cell>
              <table:table-cell office:value-type="float" office:value="3.4975057">
                <text:p>3.4975057</text:p>
              </table:table-cell>
              <table:table-cell office:value-type="float" office:value="3.510461">
                <text:p>3.510461</text:p>
              </table:table-cell>
              <table:table-cell office:value-type="float" office:value="3.5814123">
                <text:p>3.5814123</text:p>
              </table:table-cell>
              <table:table-cell office:value-type="float" office:value="3.631947">
                <text:p>3.631947</text:p>
              </table:table-cell>
              <table:table-cell office:value-type="float" office:value="3.7310379">
                <text:p>3.7310379</text:p>
              </table:table-cell>
              <table:table-cell office:value-type="float" office:value="3.7324657">
                <text:p>3.7324657</text:p>
              </table:table-cell>
              <table:table-cell office:value-type="float" office:value="4.0079527">
                <text:p>4.0079527</text:p>
              </table:table-cell>
              <table:table-cell office:value-type="float" office:value="3.9831963">
                <text:p>3.9831963</text:p>
              </table:table-cell>
              <table:table-cell office:value-type="float" office:value="4.844936">
                <text:p>4.844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3.8149152">
                <text:p>3.8149152</text:p>
              </table:table-cell>
              <table:table-cell office:value-type="float" office:value="3.5010073">
                <text:p>3.5010073</text:p>
              </table:table-cell>
              <table:table-cell office:value-type="float" office:value="3.478637">
                <text:p>3.478637</text:p>
              </table:table-cell>
              <table:table-cell office:value-type="float" office:value="3.4670293">
                <text:p>3.4670293</text:p>
              </table:table-cell>
              <table:table-cell office:value-type="float" office:value="3.459531">
                <text:p>3.459531</text:p>
              </table:table-cell>
              <table:table-cell office:value-type="float" office:value="3.5052664">
                <text:p>3.5052664</text:p>
              </table:table-cell>
              <table:table-cell office:value-type="float" office:value="3.5380907">
                <text:p>3.5380907</text:p>
              </table:table-cell>
              <table:table-cell office:value-type="float" office:value="3.602268">
                <text:p>3.602268</text:p>
              </table:table-cell>
              <table:table-cell office:value-type="float" office:value="3.6410677">
                <text:p>3.6410677</text:p>
              </table:table-cell>
              <table:table-cell office:value-type="float" office:value="3.7453299">
                <text:p>3.7453299</text:p>
              </table:table-cell>
              <table:table-cell office:value-type="float" office:value="3.9049819">
                <text:p>3.9049819</text:p>
              </table:table-cell>
              <table:table-cell office:value-type="float" office:value="3.932803">
                <text:p>3.932803</text:p>
              </table:table-cell>
              <table:table-cell office:value-type="float" office:value="4.01957">
                <text:p>4.01957</text:p>
              </table:table-cell>
              <table:table-cell office:value-type="float" office:value="4.3749466">
                <text:p>4.3749466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96207">
                <text:p>3.4996207</text:p>
              </table:table-cell>
              <table:table-cell office:value-type="float" office:value="3.4797683">
                <text:p>3.4797683</text:p>
              </table:table-cell>
              <table:table-cell office:value-type="float" office:value="3.4670107">
                <text:p>3.4670107</text:p>
              </table:table-cell>
              <table:table-cell office:value-type="float" office:value="3.4638848">
                <text:p>3.4638848</text:p>
              </table:table-cell>
              <table:table-cell office:value-type="float" office:value="3.5041304">
                <text:p>3.5041304</text:p>
              </table:table-cell>
              <table:table-cell office:value-type="float" office:value="3.5345745">
                <text:p>3.5345745</text:p>
              </table:table-cell>
              <table:table-cell office:value-type="float" office:value="3.6055856">
                <text:p>3.6055856</text:p>
              </table:table-cell>
              <table:table-cell office:value-type="float" office:value="3.6330523">
                <text:p>3.6330523</text:p>
              </table:table-cell>
              <table:table-cell office:value-type="float" office:value="3.7170987">
                <text:p>3.7170987</text:p>
              </table:table-cell>
              <table:table-cell office:value-type="float" office:value="3.8199887">
                <text:p>3.8199887</text:p>
              </table:table-cell>
              <table:table-cell office:value-type="float" office:value="4.056734">
                <text:p>4.056734</text:p>
              </table:table-cell>
              <table:table-cell office:value-type="float" office:value="4.053534">
                <text:p>4.053534</text:p>
              </table:table-cell>
              <table:table-cell office:value-type="float" office:value="4.5825753">
                <text:p>4.5825753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8963">
                <text:p>3.498963</text:p>
              </table:table-cell>
              <table:table-cell office:value-type="float" office:value="3.4763808">
                <text:p>3.4763808</text:p>
              </table:table-cell>
              <table:table-cell office:value-type="float" office:value="3.4665124">
                <text:p>3.4665124</text:p>
              </table:table-cell>
              <table:table-cell office:value-type="float" office:value="3.4593604">
                <text:p>3.4593604</text:p>
              </table:table-cell>
              <table:table-cell office:value-type="float" office:value="3.5022032">
                <text:p>3.5022032</text:p>
              </table:table-cell>
              <table:table-cell office:value-type="float" office:value="3.5327466">
                <text:p>3.5327466</text:p>
              </table:table-cell>
              <table:table-cell office:value-type="float" office:value="3.5973508">
                <text:p>3.5973508</text:p>
              </table:table-cell>
              <table:table-cell office:value-type="float" office:value="3.630844">
                <text:p>3.630844</text:p>
              </table:table-cell>
              <table:table-cell office:value-type="float" office:value="3.6689494">
                <text:p>3.6689494</text:p>
              </table:table-cell>
              <table:table-cell office:value-type="float" office:value="3.7746472">
                <text:p>3.7746472</text:p>
              </table:table-cell>
              <table:table-cell office:value-type="float" office:value="3.981105">
                <text:p>3.981105</text:p>
              </table:table-cell>
              <table:table-cell office:value-type="float" office:value="4.0238905">
                <text:p>4.0238905</text:p>
              </table:table-cell>
              <table:table-cell office:value-type="float" office:value="4.3892155">
                <text:p>4.3892155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71156">
                <text:p>3.4971156</text:p>
              </table:table-cell>
              <table:table-cell office:value-type="float" office:value="3.473687">
                <text:p>3.473687</text:p>
              </table:table-cell>
              <table:table-cell office:value-type="float" office:value="3.4626663">
                <text:p>3.4626663</text:p>
              </table:table-cell>
              <table:table-cell office:value-type="float" office:value="3.466495">
                <text:p>3.466495</text:p>
              </table:table-cell>
              <table:table-cell office:value-type="float" office:value="3.503763">
                <text:p>3.503763</text:p>
              </table:table-cell>
              <table:table-cell office:value-type="float" office:value="3.5343144">
                <text:p>3.5343144</text:p>
              </table:table-cell>
              <table:table-cell office:value-type="float" office:value="3.6123388">
                <text:p>3.6123388</text:p>
              </table:table-cell>
              <table:table-cell office:value-type="float" office:value="3.6350877">
                <text:p>3.6350877</text:p>
              </table:table-cell>
              <table:table-cell office:value-type="float" office:value="3.7466774">
                <text:p>3.7466774</text:p>
              </table:table-cell>
              <table:table-cell office:value-type="float" office:value="3.9428792">
                <text:p>3.9428792</text:p>
              </table:table-cell>
              <table:table-cell office:value-type="float" office:value="3.9342666">
                <text:p>3.9342666</text:p>
              </table:table-cell>
              <table:table-cell office:value-type="float" office:value="4.1120872">
                <text:p>4.1120872</text:p>
              </table:table-cell>
              <table:table-cell office:value-type="float" office:value="4.1905956">
                <text:p>4.1905956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72618">
                <text:p>3.4972618</text:p>
              </table:table-cell>
              <table:table-cell office:value-type="float" office:value="3.478111">
                <text:p>3.478111</text:p>
              </table:table-cell>
              <table:table-cell office:value-type="float" office:value="3.4585433">
                <text:p>3.4585433</text:p>
              </table:table-cell>
              <table:table-cell office:value-type="float" office:value="3.457121">
                <text:p>3.457121</text:p>
              </table:table-cell>
              <table:table-cell office:value-type="float" office:value="3.5062597">
                <text:p>3.5062597</text:p>
              </table:table-cell>
              <table:table-cell office:value-type="float" office:value="3.5246694">
                <text:p>3.5246694</text:p>
              </table:table-cell>
              <table:table-cell office:value-type="float" office:value="3.6091971">
                <text:p>3.6091971</text:p>
              </table:table-cell>
              <table:table-cell office:value-type="float" office:value="3.6364222">
                <text:p>3.6364222</text:p>
              </table:table-cell>
              <table:table-cell office:value-type="float" office:value="3.713874">
                <text:p>3.713874</text:p>
              </table:table-cell>
              <table:table-cell office:value-type="float" office:value="3.817555">
                <text:p>3.817555</text:p>
              </table:table-cell>
              <table:table-cell office:value-type="float" office:value="3.9537466">
                <text:p>3.9537466</text:p>
              </table:table-cell>
              <table:table-cell office:value-type="float" office:value="4.137023">
                <text:p>4.137023</text:p>
              </table:table-cell>
              <table:table-cell office:value-type="float" office:value="4.440999">
                <text:p>4.440999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59908">
                <text:p>3.4959908</text:p>
              </table:table-cell>
              <table:table-cell office:value-type="float" office:value="3.4750059">
                <text:p>3.4750059</text:p>
              </table:table-cell>
              <table:table-cell office:value-type="float" office:value="3.4652393">
                <text:p>3.4652393</text:p>
              </table:table-cell>
              <table:table-cell office:value-type="float" office:value="3.4627035">
                <text:p>3.4627035</text:p>
              </table:table-cell>
              <table:table-cell office:value-type="float" office:value="3.506687">
                <text:p>3.506687</text:p>
              </table:table-cell>
              <table:table-cell office:value-type="float" office:value="3.5192544">
                <text:p>3.5192544</text:p>
              </table:table-cell>
              <table:table-cell office:value-type="float" office:value="3.5905523">
                <text:p>3.5905523</text:p>
              </table:table-cell>
              <table:table-cell office:value-type="float" office:value="3.6427553">
                <text:p>3.6427553</text:p>
              </table:table-cell>
              <table:table-cell office:value-type="float" office:value="3.7421496">
                <text:p>3.7421496</text:p>
              </table:table-cell>
              <table:table-cell office:value-type="float" office:value="3.7427857">
                <text:p>3.7427857</text:p>
              </table:table-cell>
              <table:table-cell office:value-type="float" office:value="4.0170703">
                <text:p>4.0170703</text:p>
              </table:table-cell>
              <table:table-cell office:value-type="float" office:value="3.9951985">
                <text:p>3.9951985</text:p>
              </table:table-cell>
              <table:table-cell office:value-type="float" office:value="4.85034">
                <text:p>4.85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84608">
                <text:p>3.4984608</text:p>
              </table:table-cell>
              <table:table-cell office:value-type="float" office:value="3.4819436">
                <text:p>3.4819436</text:p>
              </table:table-cell>
              <table:table-cell office:value-type="float" office:value="3.4728835">
                <text:p>3.4728835</text:p>
              </table:table-cell>
              <table:table-cell office:value-type="float" office:value="3.4665937">
                <text:p>3.4665937</text:p>
              </table:table-cell>
              <table:table-cell office:value-type="float" office:value="3.5139875">
                <text:p>3.5139875</text:p>
              </table:table-cell>
              <table:table-cell office:value-type="float" office:value="3.5479124">
                <text:p>3.5479124</text:p>
              </table:table-cell>
              <table:table-cell office:value-type="float" office:value="3.6115198">
                <text:p>3.6115198</text:p>
              </table:table-cell>
              <table:table-cell office:value-type="float" office:value="3.650579">
                <text:p>3.650579</text:p>
              </table:table-cell>
              <table:table-cell office:value-type="float" office:value="3.7563372">
                <text:p>3.7563372</text:p>
              </table:table-cell>
              <table:table-cell office:value-type="float" office:value="3.9147289">
                <text:p>3.9147289</text:p>
              </table:table-cell>
              <table:table-cell office:value-type="float" office:value="3.9433682">
                <text:p>3.9433682</text:p>
              </table:table-cell>
              <table:table-cell office:value-type="float" office:value="4.0316286">
                <text:p>4.0316286</text:p>
              </table:table-cell>
              <table:table-cell office:value-type="float" office:value="4.385874">
                <text:p>4.385874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7543">
                <text:p>3.497543</text:p>
              </table:table-cell>
              <table:table-cell office:value-type="float" office:value="3.4836116">
                <text:p>3.4836116</text:p>
              </table:table-cell>
              <table:table-cell office:value-type="float" office:value="3.4733279">
                <text:p>3.4733279</text:p>
              </table:table-cell>
              <table:table-cell office:value-type="float" office:value="3.471296">
                <text:p>3.471296</text:p>
              </table:table-cell>
              <table:table-cell office:value-type="float" office:value="3.513205">
                <text:p>3.513205</text:p>
              </table:table-cell>
              <table:table-cell office:value-type="float" office:value="3.5440562">
                <text:p>3.5440562</text:p>
              </table:table-cell>
              <table:table-cell office:value-type="float" office:value="3.6141403">
                <text:p>3.6141403</text:p>
              </table:table-cell>
              <table:table-cell office:value-type="float" office:value="3.6417534">
                <text:p>3.6417534</text:p>
              </table:table-cell>
              <table:table-cell office:value-type="float" office:value="3.7269673">
                <text:p>3.7269673</text:p>
              </table:table-cell>
              <table:table-cell office:value-type="float" office:value="3.8287628">
                <text:p>3.8287628</text:p>
              </table:table-cell>
              <table:table-cell office:value-type="float" office:value="4.065832">
                <text:p>4.065832</text:p>
              </table:table-cell>
              <table:table-cell office:value-type="float" office:value="4.065137">
                <text:p>4.065137</text:p>
              </table:table-cell>
              <table:table-cell office:value-type="float" office:value="4.589984">
                <text:p>4.589984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66416">
                <text:p>3.4966416</text:p>
              </table:table-cell>
              <table:table-cell office:value-type="float" office:value="3.4807372">
                <text:p>3.4807372</text:p>
              </table:table-cell>
              <table:table-cell office:value-type="float" office:value="3.472145">
                <text:p>3.472145</text:p>
              </table:table-cell>
              <table:table-cell office:value-type="float" office:value="3.466381">
                <text:p>3.466381</text:p>
              </table:table-cell>
              <table:table-cell office:value-type="float" office:value="3.5107746">
                <text:p>3.5107746</text:p>
              </table:table-cell>
              <table:table-cell office:value-type="float" office:value="3.5418274">
                <text:p>3.5418274</text:p>
              </table:table-cell>
              <table:table-cell office:value-type="float" office:value="3.606608">
                <text:p>3.606608</text:p>
              </table:table-cell>
              <table:table-cell office:value-type="float" office:value="3.6405356">
                <text:p>3.6405356</text:p>
              </table:table-cell>
              <table:table-cell office:value-type="float" office:value="3.6787739">
                <text:p>3.6787739</text:p>
              </table:table-cell>
              <table:table-cell office:value-type="float" office:value="3.7835457">
                <text:p>3.7835457</text:p>
              </table:table-cell>
              <table:table-cell office:value-type="float" office:value="3.9952185">
                <text:p>3.9952185</text:p>
              </table:table-cell>
              <table:table-cell office:value-type="float" office:value="4.038657">
                <text:p>4.038657</text:p>
              </table:table-cell>
              <table:table-cell office:value-type="float" office:value="4.4006786">
                <text:p>4.4006786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47677">
                <text:p>3.4947677</text:p>
              </table:table-cell>
              <table:table-cell office:value-type="float" office:value="3.4767396">
                <text:p>3.4767396</text:p>
              </table:table-cell>
              <table:table-cell office:value-type="float" office:value="3.4688995">
                <text:p>3.4688995</text:p>
              </table:table-cell>
              <table:table-cell office:value-type="float" office:value="3.4734836">
                <text:p>3.4734836</text:p>
              </table:table-cell>
              <table:table-cell office:value-type="float" office:value="3.5119727">
                <text:p>3.5119727</text:p>
              </table:table-cell>
              <table:table-cell office:value-type="float" office:value="3.544043">
                <text:p>3.544043</text:p>
              </table:table-cell>
              <table:table-cell office:value-type="float" office:value="3.6220815">
                <text:p>3.6220815</text:p>
              </table:table-cell>
              <table:table-cell office:value-type="float" office:value="3.6439548">
                <text:p>3.6439548</text:p>
              </table:table-cell>
              <table:table-cell office:value-type="float" office:value="3.756625">
                <text:p>3.756625</text:p>
              </table:table-cell>
              <table:table-cell office:value-type="float" office:value="3.9541118">
                <text:p>3.9541118</text:p>
              </table:table-cell>
              <table:table-cell office:value-type="float" office:value="3.9477108">
                <text:p>3.9477108</text:p>
              </table:table-cell>
              <table:table-cell office:value-type="float" office:value="4.127049">
                <text:p>4.127049</text:p>
              </table:table-cell>
              <table:table-cell office:value-type="float" office:value="4.199781">
                <text:p>4.199781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4695">
                <text:p>3.494695</text:p>
              </table:table-cell>
              <table:table-cell office:value-type="float" office:value="3.4820855">
                <text:p>3.4820855</text:p>
              </table:table-cell>
              <table:table-cell office:value-type="float" office:value="3.4651585">
                <text:p>3.4651585</text:p>
              </table:table-cell>
              <table:table-cell office:value-type="float" office:value="3.4638698">
                <text:p>3.4638698</text:p>
              </table:table-cell>
              <table:table-cell office:value-type="float" office:value="3.5153403">
                <text:p>3.5153403</text:p>
              </table:table-cell>
              <table:table-cell office:value-type="float" office:value="3.5347056">
                <text:p>3.5347056</text:p>
              </table:table-cell>
              <table:table-cell office:value-type="float" office:value="3.6186638">
                <text:p>3.6186638</text:p>
              </table:table-cell>
              <table:table-cell office:value-type="float" office:value="3.645209">
                <text:p>3.645209</text:p>
              </table:table-cell>
              <table:table-cell office:value-type="float" office:value="3.7243042">
                <text:p>3.7243042</text:p>
              </table:table-cell>
              <table:table-cell office:value-type="float" office:value="3.8255181">
                <text:p>3.8255181</text:p>
              </table:table-cell>
              <table:table-cell office:value-type="float" office:value="3.9645677">
                <text:p>3.9645677</text:p>
              </table:table-cell>
              <table:table-cell office:value-type="float" office:value="4.149372">
                <text:p>4.149372</text:p>
              </table:table-cell>
              <table:table-cell office:value-type="float" office:value="4.4516215">
                <text:p>4.4516215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41094">
                <text:p>3.4941094</text:p>
              </table:table-cell>
              <table:table-cell office:value-type="float" office:value="3.4787776">
                <text:p>3.4787776</text:p>
              </table:table-cell>
              <table:table-cell office:value-type="float" office:value="3.4694338">
                <text:p>3.4694338</text:p>
              </table:table-cell>
              <table:table-cell office:value-type="float" office:value="3.4694188">
                <text:p>3.4694188</text:p>
              </table:table-cell>
              <table:table-cell office:value-type="float" office:value="3.515289">
                <text:p>3.515289</text:p>
              </table:table-cell>
              <table:table-cell office:value-type="float" office:value="3.528164">
                <text:p>3.528164</text:p>
              </table:table-cell>
              <table:table-cell office:value-type="float" office:value="3.599825">
                <text:p>3.599825</text:p>
              </table:table-cell>
              <table:table-cell office:value-type="float" office:value="3.653206">
                <text:p>3.653206</text:p>
              </table:table-cell>
              <table:table-cell office:value-type="float" office:value="3.7527192">
                <text:p>3.7527192</text:p>
              </table:table-cell>
              <table:table-cell office:value-type="float" office:value="3.752416">
                <text:p>3.752416</text:p>
              </table:table-cell>
              <table:table-cell office:value-type="float" office:value="4.025769">
                <text:p>4.025769</text:p>
              </table:table-cell>
              <table:table-cell office:value-type="float" office:value="4.0058184">
                <text:p>4.0058184</text:p>
              </table:table-cell>
              <table:table-cell office:value-type="float" office:value="4.857847">
                <text:p>4.8578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71905">
                <text:p>3.4971905</text:p>
              </table:table-cell>
              <table:table-cell office:value-type="float" office:value="3.4854946">
                <text:p>3.4854946</text:p>
              </table:table-cell>
              <table:table-cell office:value-type="float" office:value="3.4791887">
                <text:p>3.4791887</text:p>
              </table:table-cell>
              <table:table-cell office:value-type="float" office:value="3.4735692">
                <text:p>3.4735692</text:p>
              </table:table-cell>
              <table:table-cell office:value-type="float" office:value="3.5220518">
                <text:p>3.5220518</text:p>
              </table:table-cell>
              <table:table-cell office:value-type="float" office:value="3.556652">
                <text:p>3.556652</text:p>
              </table:table-cell>
              <table:table-cell office:value-type="float" office:value="3.6201847">
                <text:p>3.6201847</text:p>
              </table:table-cell>
              <table:table-cell office:value-type="float" office:value="3.6598096">
                <text:p>3.6598096</text:p>
              </table:table-cell>
              <table:table-cell office:value-type="float" office:value="3.766538">
                <text:p>3.766538</text:p>
              </table:table-cell>
              <table:table-cell office:value-type="float" office:value="3.9236152">
                <text:p>3.9236152</text:p>
              </table:table-cell>
              <table:table-cell office:value-type="float" office:value="3.9533832">
                <text:p>3.9533832</text:p>
              </table:table-cell>
              <table:table-cell office:value-type="float" office:value="4.042955">
                <text:p>4.042955</text:p>
              </table:table-cell>
              <table:table-cell office:value-type="float" office:value="4.396343">
                <text:p>4.396343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6176">
                <text:p>3.496176</text:p>
              </table:table-cell>
              <table:table-cell office:value-type="float" office:value="3.4869132">
                <text:p>3.4869132</text:p>
              </table:table-cell>
              <table:table-cell office:value-type="float" office:value="3.4793541">
                <text:p>3.4793541</text:p>
              </table:table-cell>
              <table:table-cell office:value-type="float" office:value="3.477987">
                <text:p>3.477987</text:p>
              </table:table-cell>
              <table:table-cell office:value-type="float" office:value="3.5216205">
                <text:p>3.5216205</text:p>
              </table:table-cell>
              <table:table-cell office:value-type="float" office:value="3.5534213">
                <text:p>3.5534213</text:p>
              </table:table-cell>
              <table:table-cell office:value-type="float" office:value="3.6225498">
                <text:p>3.6225498</text:p>
              </table:table-cell>
              <table:table-cell office:value-type="float" office:value="3.6504052">
                <text:p>3.6504052</text:p>
              </table:table-cell>
              <table:table-cell office:value-type="float" office:value="3.7364964">
                <text:p>3.7364964</text:p>
              </table:table-cell>
              <table:table-cell office:value-type="float" office:value="3.8371446">
                <text:p>3.8371446</text:p>
              </table:table-cell>
              <table:table-cell office:value-type="float" office:value="4.074648">
                <text:p>4.074648</text:p>
              </table:table-cell>
              <table:table-cell office:value-type="float" office:value="4.0761294">
                <text:p>4.0761294</text:p>
              </table:table-cell>
              <table:table-cell office:value-type="float" office:value="4.598206">
                <text:p>4.598206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4891">
                <text:p>3.494891</text:p>
              </table:table-cell>
              <table:table-cell office:value-type="float" office:value="3.484321">
                <text:p>3.484321</text:p>
              </table:table-cell>
              <table:table-cell office:value-type="float" office:value="3.478538">
                <text:p>3.478538</text:p>
              </table:table-cell>
              <table:table-cell office:value-type="float" office:value="3.4728215">
                <text:p>3.4728215</text:p>
              </table:table-cell>
              <table:table-cell office:value-type="float" office:value="3.5190465">
                <text:p>3.5190465</text:p>
              </table:table-cell>
              <table:table-cell office:value-type="float" office:value="3.5504484">
                <text:p>3.5504484</text:p>
              </table:table-cell>
              <table:table-cell office:value-type="float" office:value="3.6150503">
                <text:p>3.6150503</text:p>
              </table:table-cell>
              <table:table-cell office:value-type="float" office:value="3.6499627">
                <text:p>3.6499627</text:p>
              </table:table-cell>
              <table:table-cell office:value-type="float" office:value="3.6878808">
                <text:p>3.6878808</text:p>
              </table:table-cell>
              <table:table-cell office:value-type="float" office:value="3.7922788">
                <text:p>3.7922788</text:p>
              </table:table-cell>
              <table:table-cell office:value-type="float" office:value="4.008541">
                <text:p>4.008541</text:p>
              </table:table-cell>
              <table:table-cell office:value-type="float" office:value="4.0521674">
                <text:p>4.0521674</text:p>
              </table:table-cell>
              <table:table-cell office:value-type="float" office:value="4.410911">
                <text:p>4.410911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32973">
                <text:p>3.4932973</text:p>
              </table:table-cell>
              <table:table-cell office:value-type="float" office:value="3.4807456">
                <text:p>3.4807456</text:p>
              </table:table-cell>
              <table:table-cell office:value-type="float" office:value="3.4753008">
                <text:p>3.4753008</text:p>
              </table:table-cell>
              <table:table-cell office:value-type="float" office:value="3.4807732">
                <text:p>3.4807732</text:p>
              </table:table-cell>
              <table:table-cell office:value-type="float" office:value="3.5207672">
                <text:p>3.5207672</text:p>
              </table:table-cell>
              <table:table-cell office:value-type="float" office:value="3.5532773">
                <text:p>3.5532773</text:p>
              </table:table-cell>
              <table:table-cell office:value-type="float" office:value="3.6315923">
                <text:p>3.6315923</text:p>
              </table:table-cell>
              <table:table-cell office:value-type="float" office:value="3.6527808">
                <text:p>3.6527808</text:p>
              </table:table-cell>
              <table:table-cell office:value-type="float" office:value="3.7655458">
                <text:p>3.7655458</text:p>
              </table:table-cell>
              <table:table-cell office:value-type="float" office:value="3.9644175">
                <text:p>3.9644175</text:p>
              </table:table-cell>
              <table:table-cell office:value-type="float" office:value="3.9600723">
                <text:p>3.9600723</text:p>
              </table:table-cell>
              <table:table-cell office:value-type="float" office:value="4.1410437">
                <text:p>4.1410437</text:p>
              </table:table-cell>
              <table:table-cell office:value-type="float" office:value="4.2087393">
                <text:p>4.2087393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3022">
                <text:p>3.493022</text:p>
              </table:table-cell>
              <table:table-cell office:value-type="float" office:value="3.4855485">
                <text:p>3.4855485</text:p>
              </table:table-cell>
              <table:table-cell office:value-type="float" office:value="3.4712875">
                <text:p>3.4712875</text:p>
              </table:table-cell>
              <table:table-cell office:value-type="float" office:value="3.4707274">
                <text:p>3.4707274</text:p>
              </table:table-cell>
              <table:table-cell office:value-type="float" office:value="3.5240192">
                <text:p>3.5240192</text:p>
              </table:table-cell>
              <table:table-cell office:value-type="float" office:value="3.5443146">
                <text:p>3.5443146</text:p>
              </table:table-cell>
              <table:table-cell office:value-type="float" office:value="3.6272118">
                <text:p>3.6272118</text:p>
              </table:table-cell>
              <table:table-cell office:value-type="float" office:value="3.653656">
                <text:p>3.653656</text:p>
              </table:table-cell>
              <table:table-cell office:value-type="float" office:value="3.7340546">
                <text:p>3.7340546</text:p>
              </table:table-cell>
              <table:table-cell office:value-type="float" office:value="3.8325043">
                <text:p>3.8325043</text:p>
              </table:table-cell>
              <table:table-cell office:value-type="float" office:value="3.9745443">
                <text:p>3.9745443</text:p>
              </table:table-cell>
              <table:table-cell office:value-type="float" office:value="4.161032">
                <text:p>4.161032</text:p>
              </table:table-cell>
              <table:table-cell office:value-type="float" office:value="4.46158">
                <text:p>4.46158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3777">
                <text:p>3.493777</text:p>
              </table:table-cell>
              <table:table-cell office:value-type="float" office:value="3.4825919">
                <text:p>3.4825919</text:p>
              </table:table-cell>
              <table:table-cell office:value-type="float" office:value="3.4751968">
                <text:p>3.4751968</text:p>
              </table:table-cell>
              <table:table-cell office:value-type="float" office:value="3.476821">
                <text:p>3.476821</text:p>
              </table:table-cell>
              <table:table-cell office:value-type="float" office:value="3.5242584">
                <text:p>3.5242584</text:p>
              </table:table-cell>
              <table:table-cell office:value-type="float" office:value="3.5379138">
                <text:p>3.5379138</text:p>
              </table:table-cell>
              <table:table-cell office:value-type="float" office:value="3.6093795">
                <text:p>3.6093795</text:p>
              </table:table-cell>
              <table:table-cell office:value-type="float" office:value="3.6638288">
                <text:p>3.6638288</text:p>
              </table:table-cell>
              <table:table-cell office:value-type="float" office:value="3.7618024">
                <text:p>3.7618024</text:p>
              </table:table-cell>
              <table:table-cell office:value-type="float" office:value="3.7617755">
                <text:p>3.7617755</text:p>
              </table:table-cell>
              <table:table-cell office:value-type="float" office:value="4.0338902">
                <text:p>4.0338902</text:p>
              </table:table-cell>
              <table:table-cell office:value-type="float" office:value="4.015755">
                <text:p>4.015755</text:p>
              </table:table-cell>
              <table:table-cell office:value-type="float" office:value="4.865855">
                <text:p>4.8658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68438">
                <text:p>3.4968438</text:p>
              </table:table-cell>
              <table:table-cell office:value-type="float" office:value="3.489133">
                <text:p>3.489133</text:p>
              </table:table-cell>
              <table:table-cell office:value-type="float" office:value="3.485352">
                <text:p>3.485352</text:p>
              </table:table-cell>
              <table:table-cell office:value-type="float" office:value="3.4802961">
                <text:p>3.4802961</text:p>
              </table:table-cell>
              <table:table-cell office:value-type="float" office:value="3.5298922">
                <text:p>3.5298922</text:p>
              </table:table-cell>
              <table:table-cell office:value-type="float" office:value="3.5651276">
                <text:p>3.5651276</text:p>
              </table:table-cell>
              <table:table-cell office:value-type="float" office:value="3.628529">
                <text:p>3.628529</text:p>
              </table:table-cell>
              <table:table-cell office:value-type="float" office:value="3.6686277">
                <text:p>3.6686277</text:p>
              </table:table-cell>
              <table:table-cell office:value-type="float" office:value="3.776218">
                <text:p>3.776218</text:p>
              </table:table-cell>
              <table:table-cell office:value-type="float" office:value="3.9318657">
                <text:p>3.9318657</text:p>
              </table:table-cell>
              <table:table-cell office:value-type="float" office:value="3.9625225">
                <text:p>3.9625225</text:p>
              </table:table-cell>
              <table:table-cell office:value-type="float" office:value="4.0534797">
                <text:p>4.0534797</text:p>
              </table:table-cell>
              <table:table-cell office:value-type="float" office:value="4.4063144">
                <text:p>4.4063144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5867">
                <text:p>3.495867</text:p>
              </table:table-cell>
              <table:table-cell office:value-type="float" office:value="3.4911675">
                <text:p>3.4911675</text:p>
              </table:table-cell>
              <table:table-cell office:value-type="float" office:value="3.48516">
                <text:p>3.48516</text:p>
              </table:table-cell>
              <table:table-cell office:value-type="float" office:value="3.4846144">
                <text:p>3.4846144</text:p>
              </table:table-cell>
              <table:table-cell office:value-type="float" office:value="3.5296175">
                <text:p>3.5296175</text:p>
              </table:table-cell>
              <table:table-cell office:value-type="float" office:value="3.5621243">
                <text:p>3.5621243</text:p>
              </table:table-cell>
              <table:table-cell office:value-type="float" office:value="3.630834">
                <text:p>3.630834</text:p>
              </table:table-cell>
              <table:table-cell office:value-type="float" office:value="3.6588588">
                <text:p>3.6588588</text:p>
              </table:table-cell>
              <table:table-cell office:value-type="float" office:value="3.745479">
                <text:p>3.745479</text:p>
              </table:table-cell>
              <table:table-cell office:value-type="float" office:value="3.8453808">
                <text:p>3.8453808</text:p>
              </table:table-cell>
              <table:table-cell office:value-type="float" office:value="4.0830197">
                <text:p>4.0830197</text:p>
              </table:table-cell>
              <table:table-cell office:value-type="float" office:value="4.0863214">
                <text:p>4.0863214</text:p>
              </table:table-cell>
              <table:table-cell office:value-type="float" office:value="4.6064873">
                <text:p>4.6064873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44315">
                <text:p>3.4944315</text:p>
              </table:table-cell>
              <table:table-cell office:value-type="float" office:value="3.4885592">
                <text:p>3.4885592</text:p>
              </table:table-cell>
              <table:table-cell office:value-type="float" office:value="3.4838722">
                <text:p>3.4838722</text:p>
              </table:table-cell>
              <table:table-cell office:value-type="float" office:value="3.4794784">
                <text:p>3.4794784</text:p>
              </table:table-cell>
              <table:table-cell office:value-type="float" office:value="3.5270476">
                <text:p>3.5270476</text:p>
              </table:table-cell>
              <table:table-cell office:value-type="float" office:value="3.5591056">
                <text:p>3.5591056</text:p>
              </table:table-cell>
              <table:table-cell office:value-type="float" office:value="3.623471">
                <text:p>3.623471</text:p>
              </table:table-cell>
              <table:table-cell office:value-type="float" office:value="3.6589112">
                <text:p>3.6589112</text:p>
              </table:table-cell>
              <table:table-cell office:value-type="float" office:value="3.6966157">
                <text:p>3.6966157</text:p>
              </table:table-cell>
              <table:table-cell office:value-type="float" office:value="3.8009293">
                <text:p>3.8009293</text:p>
              </table:table-cell>
              <table:table-cell office:value-type="float" office:value="4.020324">
                <text:p>4.020324</text:p>
              </table:table-cell>
              <table:table-cell office:value-type="float" office:value="4.0647225">
                <text:p>4.0647225</text:p>
              </table:table-cell>
              <table:table-cell office:value-type="float" office:value="4.420996">
                <text:p>4.420996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273">
                <text:p>3.49273</text:p>
              </table:table-cell>
              <table:table-cell office:value-type="float" office:value="3.4849882">
                <text:p>3.4849882</text:p>
              </table:table-cell>
              <table:table-cell office:value-type="float" office:value="3.480515">
                <text:p>3.480515</text:p>
              </table:table-cell>
              <table:table-cell office:value-type="float" office:value="3.4871001">
                <text:p>3.4871001</text:p>
              </table:table-cell>
              <table:table-cell office:value-type="float" office:value="3.5284343">
                <text:p>3.5284343</text:p>
              </table:table-cell>
              <table:table-cell office:value-type="float" office:value="3.5617268">
                <text:p>3.5617268</text:p>
              </table:table-cell>
              <table:table-cell office:value-type="float" office:value="3.6401894">
                <text:p>3.6401894</text:p>
              </table:table-cell>
              <table:table-cell office:value-type="float" office:value="3.6613243">
                <text:p>3.6613243</text:p>
              </table:table-cell>
              <table:table-cell office:value-type="float" office:value="3.7735693">
                <text:p>3.7735693</text:p>
              </table:table-cell>
              <table:table-cell office:value-type="float" office:value="3.9744017">
                <text:p>3.9744017</text:p>
              </table:table-cell>
              <table:table-cell office:value-type="float" office:value="3.971565">
                <text:p>3.971565</text:p>
              </table:table-cell>
              <table:table-cell office:value-type="float" office:value="4.1539235">
                <text:p>4.1539235</text:p>
              </table:table-cell>
              <table:table-cell office:value-type="float" office:value="4.2173166">
                <text:p>4.2173166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24226">
                <text:p>3.4924226</text:p>
              </table:table-cell>
              <table:table-cell office:value-type="float" office:value="3.4897704">
                <text:p>3.4897704</text:p>
              </table:table-cell>
              <table:table-cell office:value-type="float" office:value="3.4775934">
                <text:p>3.4775934</text:p>
              </table:table-cell>
              <table:table-cell office:value-type="float" office:value="3.4770677">
                <text:p>3.4770677</text:p>
              </table:table-cell>
              <table:table-cell office:value-type="float" office:value="3.5315132">
                <text:p>3.5315132</text:p>
              </table:table-cell>
              <table:table-cell office:value-type="float" office:value="3.5541205">
                <text:p>3.5541205</text:p>
              </table:table-cell>
              <table:table-cell office:value-type="float" office:value="3.6355283">
                <text:p>3.6355283</text:p>
              </table:table-cell>
              <table:table-cell office:value-type="float" office:value="3.6627088">
                <text:p>3.6627088</text:p>
              </table:table-cell>
              <table:table-cell office:value-type="float" office:value="3.7430294">
                <text:p>3.7430294</text:p>
              </table:table-cell>
              <table:table-cell office:value-type="float" office:value="3.83947">
                <text:p>3.83947</text:p>
              </table:table-cell>
              <table:table-cell office:value-type="float" office:value="3.9839244">
                <text:p>3.9839244</text:p>
              </table:table-cell>
              <table:table-cell office:value-type="float" office:value="4.171686">
                <text:p>4.171686</text:p>
              </table:table-cell>
              <table:table-cell office:value-type="float" office:value="4.4709024">
                <text:p>4.4709024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2679">
                <text:p>3.492679</text:p>
              </table:table-cell>
              <table:table-cell office:value-type="float" office:value="3.4863837">
                <text:p>3.4863837</text:p>
              </table:table-cell>
              <table:table-cell office:value-type="float" office:value="3.480376">
                <text:p>3.480376</text:p>
              </table:table-cell>
              <table:table-cell office:value-type="float" office:value="3.4826772">
                <text:p>3.4826772</text:p>
              </table:table-cell>
              <table:table-cell office:value-type="float" office:value="3.5317657">
                <text:p>3.5317657</text:p>
              </table:table-cell>
              <table:table-cell office:value-type="float" office:value="3.5463333">
                <text:p>3.5463333</text:p>
              </table:table-cell>
              <table:table-cell office:value-type="float" office:value="3.618359">
                <text:p>3.618359</text:p>
              </table:table-cell>
              <table:table-cell office:value-type="float" office:value="3.6729834">
                <text:p>3.6729834</text:p>
              </table:table-cell>
              <table:table-cell office:value-type="float" office:value="3.7711277">
                <text:p>3.7711277</text:p>
              </table:table-cell>
              <table:table-cell office:value-type="float" office:value="3.77028">
                <text:p>3.77028</text:p>
              </table:table-cell>
              <table:table-cell office:value-type="float" office:value="4.042204">
                <text:p>4.042204</text:p>
              </table:table-cell>
              <table:table-cell office:value-type="float" office:value="4.0251436">
                <text:p>4.0251436</text:p>
              </table:table-cell>
              <table:table-cell office:value-type="float" office:value="4.8735423">
                <text:p>4.8735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67246">
                <text:p>3.4967246</text:p>
              </table:table-cell>
              <table:table-cell office:value-type="float" office:value="3.4937444">
                <text:p>3.4937444</text:p>
              </table:table-cell>
              <table:table-cell office:value-type="float" office:value="3.490953">
                <text:p>3.490953</text:p>
              </table:table-cell>
              <table:table-cell office:value-type="float" office:value="3.4870183">
                <text:p>3.4870183</text:p>
              </table:table-cell>
              <table:table-cell office:value-type="float" office:value="3.537619">
                <text:p>3.537619</text:p>
              </table:table-cell>
              <table:table-cell office:value-type="float" office:value="3.5732908">
                <text:p>3.5732908</text:p>
              </table:table-cell>
              <table:table-cell office:value-type="float" office:value="3.636392">
                <text:p>3.636392</text:p>
              </table:table-cell>
              <table:table-cell office:value-type="float" office:value="3.677254">
                <text:p>3.677254</text:p>
              </table:table-cell>
              <table:table-cell office:value-type="float" office:value="3.7855616">
                <text:p>3.7855616</text:p>
              </table:table-cell>
              <table:table-cell office:value-type="float" office:value="3.9395733">
                <text:p>3.9395733</text:p>
              </table:table-cell>
              <table:table-cell office:value-type="float" office:value="3.9710777">
                <text:p>3.9710777</text:p>
              </table:table-cell>
              <table:table-cell office:value-type="float" office:value="4.0629883">
                <text:p>4.0629883</text:p>
              </table:table-cell>
              <table:table-cell office:value-type="float" office:value="4.416013">
                <text:p>4.416013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6109">
                <text:p>3.496109</text:p>
              </table:table-cell>
              <table:table-cell office:value-type="float" office:value="3.4954515">
                <text:p>3.4954515</text:p>
              </table:table-cell>
              <table:table-cell office:value-type="float" office:value="3.4908845">
                <text:p>3.4908845</text:p>
              </table:table-cell>
              <table:table-cell office:value-type="float" office:value="3.4914095">
                <text:p>3.4914095</text:p>
              </table:table-cell>
              <table:table-cell office:value-type="float" office:value="3.5374858">
                <text:p>3.5374858</text:p>
              </table:table-cell>
              <table:table-cell office:value-type="float" office:value="3.5707512">
                <text:p>3.5707512</text:p>
              </table:table-cell>
              <table:table-cell office:value-type="float" office:value="3.6388469">
                <text:p>3.6388469</text:p>
              </table:table-cell>
              <table:table-cell office:value-type="float" office:value="3.6668916">
                <text:p>3.6668916</text:p>
              </table:table-cell>
              <table:table-cell office:value-type="float" office:value="3.754136">
                <text:p>3.754136</text:p>
              </table:table-cell>
              <table:table-cell office:value-type="float" office:value="3.8532274">
                <text:p>3.8532274</text:p>
              </table:table-cell>
              <table:table-cell office:value-type="float" office:value="4.0912075">
                <text:p>4.0912075</text:p>
              </table:table-cell>
              <table:table-cell office:value-type="float" office:value="4.0962634">
                <text:p>4.0962634</text:p>
              </table:table-cell>
              <table:table-cell office:value-type="float" office:value="4.6144943">
                <text:p>4.6144943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40004">
                <text:p>3.4940004</text:p>
              </table:table-cell>
              <table:table-cell office:value-type="float" office:value="3.492496">
                <text:p>3.492496</text:p>
              </table:table-cell>
              <table:table-cell office:value-type="float" office:value="3.490268">
                <text:p>3.490268</text:p>
              </table:table-cell>
              <table:table-cell office:value-type="float" office:value="3.4859781">
                <text:p>3.4859781</text:p>
              </table:table-cell>
              <table:table-cell office:value-type="float" office:value="3.5343602">
                <text:p>3.5343602</text:p>
              </table:table-cell>
              <table:table-cell office:value-type="float" office:value="3.5668495">
                <text:p>3.5668495</text:p>
              </table:table-cell>
              <table:table-cell office:value-type="float" office:value="3.631827">
                <text:p>3.631827</text:p>
              </table:table-cell>
              <table:table-cell office:value-type="float" office:value="3.6679335">
                <text:p>3.6679335</text:p>
              </table:table-cell>
              <table:table-cell office:value-type="float" office:value="3.7047281">
                <text:p>3.7047281</text:p>
              </table:table-cell>
              <table:table-cell office:value-type="float" office:value="3.809282">
                <text:p>3.809282</text:p>
              </table:table-cell>
              <table:table-cell office:value-type="float" office:value="4.0314054">
                <text:p>4.0314054</text:p>
              </table:table-cell>
              <table:table-cell office:value-type="float" office:value="4.0765414">
                <text:p>4.0765414</text:p>
              </table:table-cell>
              <table:table-cell office:value-type="float" office:value="4.430301">
                <text:p>4.430301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22028">
                <text:p>3.4922028</text:p>
              </table:table-cell>
              <table:table-cell office:value-type="float" office:value="3.4893503">
                <text:p>3.4893503</text:p>
              </table:table-cell>
              <table:table-cell office:value-type="float" office:value="3.486221">
                <text:p>3.486221</text:p>
              </table:table-cell>
              <table:table-cell office:value-type="float" office:value="3.4932535">
                <text:p>3.4932535</text:p>
              </table:table-cell>
              <table:table-cell office:value-type="float" office:value="3.536571">
                <text:p>3.536571</text:p>
              </table:table-cell>
              <table:table-cell office:value-type="float" office:value="3.56963">
                <text:p>3.56963</text:p>
              </table:table-cell>
              <table:table-cell office:value-type="float" office:value="3.6482778">
                <text:p>3.6482778</text:p>
              </table:table-cell>
              <table:table-cell office:value-type="float" office:value="3.6692905">
                <text:p>3.6692905</text:p>
              </table:table-cell>
              <table:table-cell office:value-type="float" office:value="3.781238">
                <text:p>3.781238</text:p>
              </table:table-cell>
              <table:table-cell office:value-type="float" office:value="3.9833267">
                <text:p>3.9833267</text:p>
              </table:table-cell>
              <table:table-cell office:value-type="float" office:value="3.9819508">
                <text:p>3.9819508</text:p>
              </table:table-cell>
              <table:table-cell office:value-type="float" office:value="4.1657033">
                <text:p>4.1657033</text:p>
              </table:table-cell>
              <table:table-cell office:value-type="float" office:value="4.2256765">
                <text:p>4.2256765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2557">
                <text:p>3.492557</text:p>
              </table:table-cell>
              <table:table-cell office:value-type="float" office:value="3.4931715">
                <text:p>3.4931715</text:p>
              </table:table-cell>
              <table:table-cell office:value-type="float" office:value="3.4831734">
                <text:p>3.4831734</text:p>
              </table:table-cell>
              <table:table-cell office:value-type="float" office:value="3.4833815">
                <text:p>3.4833815</text:p>
              </table:table-cell>
              <table:table-cell office:value-type="float" office:value="3.539159">
                <text:p>3.539159</text:p>
              </table:table-cell>
              <table:table-cell office:value-type="float" office:value="3.562507">
                <text:p>3.562507</text:p>
              </table:table-cell>
              <table:table-cell office:value-type="float" office:value="3.643797">
                <text:p>3.643797</text:p>
              </table:table-cell>
              <table:table-cell office:value-type="float" office:value="3.6701427">
                <text:p>3.6701427</text:p>
              </table:table-cell>
              <table:table-cell office:value-type="float" office:value="3.7514305">
                <text:p>3.7514305</text:p>
              </table:table-cell>
              <table:table-cell office:value-type="float" office:value="3.8460174">
                <text:p>3.8460174</text:p>
              </table:table-cell>
              <table:table-cell office:value-type="float" office:value="3.9929621">
                <text:p>3.9929621</text:p>
              </table:table-cell>
              <table:table-cell office:value-type="float" office:value="4.1822186">
                <text:p>4.1822186</text:p>
              </table:table-cell>
              <table:table-cell office:value-type="float" office:value="4.479605">
                <text:p>4.479605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20504">
                <text:p>3.4920504</text:p>
              </table:table-cell>
              <table:table-cell office:value-type="float" office:value="3.4901211">
                <text:p>3.4901211</text:p>
              </table:table-cell>
              <table:table-cell office:value-type="float" office:value="3.4859686">
                <text:p>3.4859686</text:p>
              </table:table-cell>
              <table:table-cell office:value-type="float" office:value="3.4892104">
                <text:p>3.4892104</text:p>
              </table:table-cell>
              <table:table-cell office:value-type="float" office:value="3.5400937">
                <text:p>3.5400937</text:p>
              </table:table-cell>
              <table:table-cell office:value-type="float" office:value="3.5542529">
                <text:p>3.5542529</text:p>
              </table:table-cell>
              <table:table-cell office:value-type="float" office:value="3.6268222">
                <text:p>3.6268222</text:p>
              </table:table-cell>
              <table:table-cell office:value-type="float" office:value="3.6820924">
                <text:p>3.6820924</text:p>
              </table:table-cell>
              <table:table-cell office:value-type="float" office:value="3.7795122">
                <text:p>3.7795122</text:p>
              </table:table-cell>
              <table:table-cell office:value-type="float" office:value="3.779246">
                <text:p>3.779246</text:p>
              </table:table-cell>
              <table:table-cell office:value-type="float" office:value="4.0495496">
                <text:p>4.0495496</text:p>
              </table:table-cell>
              <table:table-cell office:value-type="float" office:value="4.0341215">
                <text:p>4.0341215</text:p>
              </table:table-cell>
              <table:table-cell office:value-type="float" office:value="4.8816085">
                <text:p>4.88160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68946">
                <text:p>3.4968946</text:p>
              </table:table-cell>
              <table:table-cell office:value-type="float" office:value="3.497794">
                <text:p>3.497794</text:p>
              </table:table-cell>
              <table:table-cell office:value-type="float" office:value="3.4967372">
                <text:p>3.4967372</text:p>
              </table:table-cell>
              <table:table-cell office:value-type="float" office:value="3.4933946">
                <text:p>3.4933946</text:p>
              </table:table-cell>
              <table:table-cell office:value-type="float" office:value="3.544978">
                <text:p>3.544978</text:p>
              </table:table-cell>
              <table:table-cell office:value-type="float" office:value="3.58134">
                <text:p>3.58134</text:p>
              </table:table-cell>
              <table:table-cell office:value-type="float" office:value="3.64386">
                <text:p>3.64386</text:p>
              </table:table-cell>
              <table:table-cell office:value-type="float" office:value="3.6853428">
                <text:p>3.6853428</text:p>
              </table:table-cell>
              <table:table-cell office:value-type="float" office:value="3.7941556">
                <text:p>3.7941556</text:p>
              </table:table-cell>
              <table:table-cell office:value-type="float" office:value="3.9470222">
                <text:p>3.9470222</text:p>
              </table:table-cell>
              <table:table-cell office:value-type="float" office:value="3.9792283">
                <text:p>3.9792283</text:p>
              </table:table-cell>
              <table:table-cell office:value-type="float" office:value="4.0721316">
                <text:p>4.0721316</text:p>
              </table:table-cell>
              <table:table-cell office:value-type="float" office:value="4.4252787">
                <text:p>4.4252787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64716">
                <text:p>3.4964716</text:p>
              </table:table-cell>
              <table:table-cell office:value-type="float" office:value="3.4999325">
                <text:p>3.4999325</text:p>
              </table:table-cell>
              <table:table-cell office:value-type="float" office:value="3.496394">
                <text:p>3.496394</text:p>
              </table:table-cell>
              <table:table-cell office:value-type="float" office:value="3.4979289">
                <text:p>3.4979289</text:p>
              </table:table-cell>
              <table:table-cell office:value-type="float" office:value="3.5446243">
                <text:p>3.5446243</text:p>
              </table:table-cell>
              <table:table-cell office:value-type="float" office:value="3.578856">
                <text:p>3.578856</text:p>
              </table:table-cell>
              <table:table-cell office:value-type="float" office:value="3.646822">
                <text:p>3.646822</text:p>
              </table:table-cell>
              <table:table-cell office:value-type="float" office:value="3.6747499">
                <text:p>3.6747499</text:p>
              </table:table-cell>
              <table:table-cell office:value-type="float" office:value="3.7623155">
                <text:p>3.7623155</text:p>
              </table:table-cell>
              <table:table-cell office:value-type="float" office:value="3.8608823">
                <text:p>3.8608823</text:p>
              </table:table-cell>
              <table:table-cell office:value-type="float" office:value="4.098914">
                <text:p>4.098914</text:p>
              </table:table-cell>
              <table:table-cell office:value-type="float" office:value="4.1058784">
                <text:p>4.1058784</text:p>
              </table:table-cell>
              <table:table-cell office:value-type="float" office:value="4.622341">
                <text:p>4.622341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45202">
                <text:p>3.4945202</text:p>
              </table:table-cell>
              <table:table-cell office:value-type="float" office:value="3.496521">
                <text:p>3.496521</text:p>
              </table:table-cell>
              <table:table-cell office:value-type="float" office:value="3.496608">
                <text:p>3.496608</text:p>
              </table:table-cell>
              <table:table-cell office:value-type="float" office:value="3.4916677">
                <text:p>3.4916677</text:p>
              </table:table-cell>
              <table:table-cell office:value-type="float" office:value="3.5409598">
                <text:p>3.5409598</text:p>
              </table:table-cell>
              <table:table-cell office:value-type="float" office:value="3.5749633">
                <text:p>3.5749633</text:p>
              </table:table-cell>
              <table:table-cell office:value-type="float" office:value="3.6393588">
                <text:p>3.6393588</text:p>
              </table:table-cell>
              <table:table-cell office:value-type="float" office:value="3.676516">
                <text:p>3.676516</text:p>
              </table:table-cell>
              <table:table-cell office:value-type="float" office:value="3.7127287">
                <text:p>3.7127287</text:p>
              </table:table-cell>
              <table:table-cell office:value-type="float" office:value="3.817311">
                <text:p>3.817311</text:p>
              </table:table-cell>
              <table:table-cell office:value-type="float" office:value="4.04166">
                <text:p>4.04166</text:p>
              </table:table-cell>
              <table:table-cell office:value-type="float" office:value="4.0878763">
                <text:p>4.0878763</text:p>
              </table:table-cell>
              <table:table-cell office:value-type="float" office:value="4.4394207">
                <text:p>4.4394207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2362">
                <text:p>3.492362</text:p>
              </table:table-cell>
              <table:table-cell office:value-type="float" office:value="3.4929998">
                <text:p>3.4929998</text:p>
              </table:table-cell>
              <table:table-cell office:value-type="float" office:value="3.4913654">
                <text:p>3.4913654</text:p>
              </table:table-cell>
              <table:table-cell office:value-type="float" office:value="3.4992516">
                <text:p>3.4992516</text:p>
              </table:table-cell>
              <table:table-cell office:value-type="float" office:value="3.5442364">
                <text:p>3.5442364</text:p>
              </table:table-cell>
              <table:table-cell office:value-type="float" office:value="3.5774257">
                <text:p>3.5774257</text:p>
              </table:table-cell>
              <table:table-cell office:value-type="float" office:value="3.656226">
                <text:p>3.656226</text:p>
              </table:table-cell>
              <table:table-cell office:value-type="float" office:value="3.6773922">
                <text:p>3.6773922</text:p>
              </table:table-cell>
              <table:table-cell office:value-type="float" office:value="3.788158">
                <text:p>3.788158</text:p>
              </table:table-cell>
              <table:table-cell office:value-type="float" office:value="3.9917946">
                <text:p>3.9917946</text:p>
              </table:table-cell>
              <table:table-cell office:value-type="float" office:value="3.9917386">
                <text:p>3.9917386</text:p>
              </table:table-cell>
              <table:table-cell office:value-type="float" office:value="4.176839">
                <text:p>4.176839</text:p>
              </table:table-cell>
              <table:table-cell office:value-type="float" office:value="4.233876">
                <text:p>4.233876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26748">
                <text:p>3.4926748</text:p>
              </table:table-cell>
              <table:table-cell office:value-type="float" office:value="3.4973035">
                <text:p>3.4973035</text:p>
              </table:table-cell>
              <table:table-cell office:value-type="float" office:value="3.4885843">
                <text:p>3.4885843</text:p>
              </table:table-cell>
              <table:table-cell office:value-type="float" office:value="3.4894872">
                <text:p>3.4894872</text:p>
              </table:table-cell>
              <table:table-cell office:value-type="float" office:value="3.546469">
                <text:p>3.546469</text:p>
              </table:table-cell>
              <table:table-cell office:value-type="float" office:value="3.5708647">
                <text:p>3.5708647</text:p>
              </table:table-cell>
              <table:table-cell office:value-type="float" office:value="3.6520748">
                <text:p>3.6520748</text:p>
              </table:table-cell>
              <table:table-cell office:value-type="float" office:value="3.6778996">
                <text:p>3.6778996</text:p>
              </table:table-cell>
              <table:table-cell office:value-type="float" office:value="3.7595336">
                <text:p>3.7595336</text:p>
              </table:table-cell>
              <table:table-cell office:value-type="float" office:value="3.8527858">
                <text:p>3.8527858</text:p>
              </table:table-cell>
              <table:table-cell office:value-type="float" office:value="4.001467">
                <text:p>4.001467</text:p>
              </table:table-cell>
              <table:table-cell office:value-type="float" office:value="4.191755">
                <text:p>4.191755</text:p>
              </table:table-cell>
              <table:table-cell office:value-type="float" office:value="4.487648">
                <text:p>4.487648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2373">
                <text:p>3.492373</text:p>
              </table:table-cell>
              <table:table-cell office:value-type="float" office:value="3.494207">
                <text:p>3.494207</text:p>
              </table:table-cell>
              <table:table-cell office:value-type="float" office:value="3.4913528">
                <text:p>3.4913528</text:p>
              </table:table-cell>
              <table:table-cell office:value-type="float" office:value="3.4958558">
                <text:p>3.4958558</text:p>
              </table:table-cell>
              <table:table-cell office:value-type="float" office:value="3.5475867">
                <text:p>3.5475867</text:p>
              </table:table-cell>
              <table:table-cell office:value-type="float" office:value="3.5619156">
                <text:p>3.5619156</text:p>
              </table:table-cell>
              <table:table-cell office:value-type="float" office:value="3.6348193">
                <text:p>3.6348193</text:p>
              </table:table-cell>
              <table:table-cell office:value-type="float" office:value="3.6907172">
                <text:p>3.6907172</text:p>
              </table:table-cell>
              <table:table-cell office:value-type="float" office:value="3.7879524">
                <text:p>3.7879524</text:p>
              </table:table-cell>
              <table:table-cell office:value-type="float" office:value="3.7869942">
                <text:p>3.7869942</text:p>
              </table:table-cell>
              <table:table-cell office:value-type="float" office:value="4.056697">
                <text:p>4.056697</text:p>
              </table:table-cell>
              <table:table-cell office:value-type="float" office:value="4.0424967">
                <text:p>4.0424967</text:p>
              </table:table-cell>
              <table:table-cell office:value-type="float" office:value="4.8894715">
                <text:p>4.88947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71416">
                <text:p>3.4971416</text:p>
              </table:table-cell>
              <table:table-cell office:value-type="float" office:value="3.5021353">
                <text:p>3.5021353</text:p>
              </table:table-cell>
              <table:table-cell office:value-type="float" office:value="3.5020607">
                <text:p>3.5020607</text:p>
              </table:table-cell>
              <table:table-cell office:value-type="float" office:value="3.4996076">
                <text:p>3.4996076</text:p>
              </table:table-cell>
              <table:table-cell office:value-type="float" office:value="3.5520074">
                <text:p>3.5520074</text:p>
              </table:table-cell>
              <table:table-cell office:value-type="float" office:value="3.5891426">
                <text:p>3.5891426</text:p>
              </table:table-cell>
              <table:table-cell office:value-type="float" office:value="3.6511922">
                <text:p>3.6511922</text:p>
              </table:table-cell>
              <table:table-cell office:value-type="float" office:value="3.693147">
                <text:p>3.693147</text:p>
              </table:table-cell>
              <table:table-cell office:value-type="float" office:value="3.8026283">
                <text:p>3.8026283</text:p>
              </table:table-cell>
              <table:table-cell office:value-type="float" office:value="3.9540236">
                <text:p>3.9540236</text:p>
              </table:table-cell>
              <table:table-cell office:value-type="float" office:value="3.9871633">
                <text:p>3.9871633</text:p>
              </table:table-cell>
              <table:table-cell office:value-type="float" office:value="4.081222">
                <text:p>4.081222</text:p>
              </table:table-cell>
              <table:table-cell office:value-type="float" office:value="4.4341774">
                <text:p>4.4341774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69482">
                <text:p>3.4969482</text:p>
              </table:table-cell>
              <table:table-cell office:value-type="float" office:value="3.50407">
                <text:p>3.50407</text:p>
              </table:table-cell>
              <table:table-cell office:value-type="float" office:value="3.5019526">
                <text:p>3.5019526</text:p>
              </table:table-cell>
              <table:table-cell office:value-type="float" office:value="3.5044944">
                <text:p>3.5044944</text:p>
              </table:table-cell>
              <table:table-cell office:value-type="float" office:value="3.551564">
                <text:p>3.551564</text:p>
              </table:table-cell>
              <table:table-cell office:value-type="float" office:value="3.5867667">
                <text:p>3.5867667</text:p>
              </table:table-cell>
              <table:table-cell office:value-type="float" office:value="3.6544147">
                <text:p>3.6544147</text:p>
              </table:table-cell>
              <table:table-cell office:value-type="float" office:value="3.6823618">
                <text:p>3.6823618</text:p>
              </table:table-cell>
              <table:table-cell office:value-type="float" office:value="3.7699656">
                <text:p>3.7699656</text:p>
              </table:table-cell>
              <table:table-cell office:value-type="float" office:value="3.8682032">
                <text:p>3.8682032</text:p>
              </table:table-cell>
              <table:table-cell office:value-type="float" office:value="4.106142">
                <text:p>4.106142</text:p>
              </table:table-cell>
              <table:table-cell office:value-type="float" office:value="4.114976">
                <text:p>4.114976</text:p>
              </table:table-cell>
              <table:table-cell office:value-type="float" office:value="4.629851">
                <text:p>4.629851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48487">
                <text:p>3.4948487</text:p>
              </table:table-cell>
              <table:table-cell office:value-type="float" office:value="3.5006244">
                <text:p>3.5006244</text:p>
              </table:table-cell>
              <table:table-cell office:value-type="float" office:value="3.5024798">
                <text:p>3.5024798</text:p>
              </table:table-cell>
              <table:table-cell office:value-type="float" office:value="3.4979615">
                <text:p>3.4979615</text:p>
              </table:table-cell>
              <table:table-cell office:value-type="float" office:value="3.547601">
                <text:p>3.547601</text:p>
              </table:table-cell>
              <table:table-cell office:value-type="float" office:value="3.5823858">
                <text:p>3.5823858</text:p>
              </table:table-cell>
              <table:table-cell office:value-type="float" office:value="3.646747">
                <text:p>3.646747</text:p>
              </table:table-cell>
              <table:table-cell office:value-type="float" office:value="3.6847224">
                <text:p>3.6847224</text:p>
              </table:table-cell>
              <table:table-cell office:value-type="float" office:value="3.7203279">
                <text:p>3.7203279</text:p>
              </table:table-cell>
              <table:table-cell office:value-type="float" office:value="3.8251574">
                <text:p>3.8251574</text:p>
              </table:table-cell>
              <table:table-cell office:value-type="float" office:value="4.050818">
                <text:p>4.050818</text:p>
              </table:table-cell>
              <table:table-cell office:value-type="float" office:value="4.098595">
                <text:p>4.098595</text:p>
              </table:table-cell>
              <table:table-cell office:value-type="float" office:value="4.44788">
                <text:p>4.44788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24996">
                <text:p>3.4924996</text:p>
              </table:table-cell>
              <table:table-cell office:value-type="float" office:value="3.497906">
                <text:p>3.497906</text:p>
              </table:table-cell>
              <table:table-cell office:value-type="float" office:value="3.496848">
                <text:p>3.496848</text:p>
              </table:table-cell>
              <table:table-cell office:value-type="float" office:value="3.5051913">
                <text:p>3.5051913</text:p>
              </table:table-cell>
              <table:table-cell office:value-type="float" office:value="3.5513928">
                <text:p>3.5513928</text:p>
              </table:table-cell>
              <table:table-cell office:value-type="float" office:value="3.58519">
                <text:p>3.58519</text:p>
              </table:table-cell>
              <table:table-cell office:value-type="float" office:value="3.6635516">
                <text:p>3.6635516</text:p>
              </table:table-cell>
              <table:table-cell office:value-type="float" office:value="3.685082">
                <text:p>3.685082</text:p>
              </table:table-cell>
              <table:table-cell office:value-type="float" office:value="3.7948442">
                <text:p>3.7948442</text:p>
              </table:table-cell>
              <table:table-cell office:value-type="float" office:value="4.000013">
                <text:p>4.000013</text:p>
              </table:table-cell>
              <table:table-cell office:value-type="float" office:value="4.0011387">
                <text:p>4.0011387</text:p>
              </table:table-cell>
              <table:table-cell office:value-type="float" office:value="4.1873775">
                <text:p>4.1873775</text:p>
              </table:table-cell>
              <table:table-cell office:value-type="float" office:value="4.241738">
                <text:p>4.241738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32039">
                <text:p>3.4932039</text:p>
              </table:table-cell>
              <table:table-cell office:value-type="float" office:value="3.5010405">
                <text:p>3.5010405</text:p>
              </table:table-cell>
              <table:table-cell office:value-type="float" office:value="3.4936078">
                <text:p>3.4936078</text:p>
              </table:table-cell>
              <table:table-cell office:value-type="float" office:value="3.4955025">
                <text:p>3.4955025</text:p>
              </table:table-cell>
              <table:table-cell office:value-type="float" office:value="3.55336">
                <text:p>3.55336</text:p>
              </table:table-cell>
              <table:table-cell office:value-type="float" office:value="3.5786731">
                <text:p>3.5786731</text:p>
              </table:table-cell>
              <table:table-cell office:value-type="float" office:value="3.6594138">
                <text:p>3.6594138</text:p>
              </table:table-cell>
              <table:table-cell office:value-type="float" office:value="3.6855893">
                <text:p>3.6855893</text:p>
              </table:table-cell>
              <table:table-cell office:value-type="float" office:value="3.7676716">
                <text:p>3.7676716</text:p>
              </table:table-cell>
              <table:table-cell office:value-type="float" office:value="3.8593674">
                <text:p>3.8593674</text:p>
              </table:table-cell>
              <table:table-cell office:value-type="float" office:value="4.009759">
                <text:p>4.009759</text:p>
              </table:table-cell>
              <table:table-cell office:value-type="float" office:value="4.200753">
                <text:p>4.200753</text:p>
              </table:table-cell>
              <table:table-cell office:value-type="float" office:value="4.4950023">
                <text:p>4.4950023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24304">
                <text:p>3.4924304</text:p>
              </table:table-cell>
              <table:table-cell office:value-type="float" office:value="3.4983275">
                <text:p>3.4983275</text:p>
              </table:table-cell>
              <table:table-cell office:value-type="float" office:value="3.49742">
                <text:p>3.49742</text:p>
              </table:table-cell>
              <table:table-cell office:value-type="float" office:value="3.5022125">
                <text:p>3.5022125</text:p>
              </table:table-cell>
              <table:table-cell office:value-type="float" office:value="3.5547886">
                <text:p>3.5547886</text:p>
              </table:table-cell>
              <table:table-cell office:value-type="float" office:value="3.5692775">
                <text:p>3.5692775</text:p>
              </table:table-cell>
              <table:table-cell office:value-type="float" office:value="3.642772">
                <text:p>3.642772</text:p>
              </table:table-cell>
              <table:table-cell office:value-type="float" office:value="3.6987627">
                <text:p>3.6987627</text:p>
              </table:table-cell>
              <table:table-cell office:value-type="float" office:value="3.7960691">
                <text:p>3.7960691</text:p>
              </table:table-cell>
              <table:table-cell office:value-type="float" office:value="3.7943153">
                <text:p>3.7943153</text:p>
              </table:table-cell>
              <table:table-cell office:value-type="float" office:value="4.0634904">
                <text:p>4.0634904</text:p>
              </table:table-cell>
              <table:table-cell office:value-type="float" office:value="4.0505557">
                <text:p>4.0505557</text:p>
              </table:table-cell>
              <table:table-cell office:value-type="float" office:value="4.896671">
                <text:p>4.8966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78943">
                <text:p>3.4978943</text:p>
              </table:table-cell>
              <table:table-cell office:value-type="float" office:value="3.5060833">
                <text:p>3.5060833</text:p>
              </table:table-cell>
              <table:table-cell office:value-type="float" office:value="3.5072255">
                <text:p>3.5072255</text:p>
              </table:table-cell>
              <table:table-cell office:value-type="float" office:value="3.5056002">
                <text:p>3.5056002</text:p>
              </table:table-cell>
              <table:table-cell office:value-type="float" office:value="3.5591218">
                <text:p>3.5591218</text:p>
              </table:table-cell>
              <table:table-cell office:value-type="float" office:value="3.596616">
                <text:p>3.596616</text:p>
              </table:table-cell>
              <table:table-cell office:value-type="float" office:value="3.6581736">
                <text:p>3.6581736</text:p>
              </table:table-cell>
              <table:table-cell office:value-type="float" office:value="3.7007146">
                <text:p>3.7007146</text:p>
              </table:table-cell>
              <table:table-cell office:value-type="float" office:value="3.8107176">
                <text:p>3.8107176</text:p>
              </table:table-cell>
              <table:table-cell office:value-type="float" office:value="3.9606545">
                <text:p>3.9606545</text:p>
              </table:table-cell>
              <table:table-cell office:value-type="float" office:value="3.9946425">
                <text:p>3.9946425</text:p>
              </table:table-cell>
              <table:table-cell office:value-type="float" office:value="4.0895762">
                <text:p>4.0895762</text:p>
              </table:table-cell>
              <table:table-cell office:value-type="float" office:value="4.442747">
                <text:p>4.442747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77703">
                <text:p>3.4977703</text:p>
              </table:table-cell>
              <table:table-cell office:value-type="float" office:value="3.5083246">
                <text:p>3.5083246</text:p>
              </table:table-cell>
              <table:table-cell office:value-type="float" office:value="3.5072873">
                <text:p>3.5072873</text:p>
              </table:table-cell>
              <table:table-cell office:value-type="float" office:value="3.5108309">
                <text:p>3.5108309</text:p>
              </table:table-cell>
              <table:table-cell office:value-type="float" office:value="3.5585551">
                <text:p>3.5585551</text:p>
              </table:table-cell>
              <table:table-cell office:value-type="float" office:value="3.5943818">
                <text:p>3.5943818</text:p>
              </table:table-cell>
              <table:table-cell office:value-type="float" office:value="3.661828">
                <text:p>3.661828</text:p>
              </table:table-cell>
              <table:table-cell office:value-type="float" office:value="3.689555">
                <text:p>3.689555</text:p>
              </table:table-cell>
              <table:table-cell office:value-type="float" office:value="3.777524">
                <text:p>3.777524</text:p>
              </table:table-cell>
              <table:table-cell office:value-type="float" office:value="3.8751905">
                <text:p>3.8751905</text:p>
              </table:table-cell>
              <table:table-cell office:value-type="float" office:value="4.113084">
                <text:p>4.113084</text:p>
              </table:table-cell>
              <table:table-cell office:value-type="float" office:value="4.1238923">
                <text:p>4.1238923</text:p>
              </table:table-cell>
              <table:table-cell office:value-type="float" office:value="4.637031">
                <text:p>4.637031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57068">
                <text:p>3.4957068</text:p>
              </table:table-cell>
              <table:table-cell office:value-type="float" office:value="3.5050132">
                <text:p>3.5050132</text:p>
              </table:table-cell>
              <table:table-cell office:value-type="float" office:value="3.5078666">
                <text:p>3.5078666</text:p>
              </table:table-cell>
              <table:table-cell office:value-type="float" office:value="3.5040407">
                <text:p>3.5040407</text:p>
              </table:table-cell>
              <table:table-cell office:value-type="float" office:value="3.5545573">
                <text:p>3.5545573</text:p>
              </table:table-cell>
              <table:table-cell office:value-type="float" office:value="3.5896292">
                <text:p>3.5896292</text:p>
              </table:table-cell>
              <table:table-cell office:value-type="float" office:value="3.6538858">
                <text:p>3.6538858</text:p>
              </table:table-cell>
              <table:table-cell office:value-type="float" office:value="3.6923964">
                <text:p>3.6923964</text:p>
              </table:table-cell>
              <table:table-cell office:value-type="float" office:value="3.7276413">
                <text:p>3.7276413</text:p>
              </table:table-cell>
              <table:table-cell office:value-type="float" office:value="3.8325799">
                <text:p>3.8325799</text:p>
              </table:table-cell>
              <table:table-cell office:value-type="float" office:value="4.059788">
                <text:p>4.059788</text:p>
              </table:table-cell>
              <table:table-cell office:value-type="float" office:value="4.108534">
                <text:p>4.108534</text:p>
              </table:table-cell>
              <table:table-cell office:value-type="float" office:value="4.4558983">
                <text:p>4.4558983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3115">
                <text:p>3.493115</text:p>
              </table:table-cell>
              <table:table-cell office:value-type="float" office:value="3.5013878">
                <text:p>3.5013878</text:p>
              </table:table-cell>
              <table:table-cell office:value-type="float" office:value="3.501744">
                <text:p>3.501744</text:p>
              </table:table-cell>
              <table:table-cell office:value-type="float" office:value="3.5115469">
                <text:p>3.5115469</text:p>
              </table:table-cell>
              <table:table-cell office:value-type="float" office:value="3.5579808">
                <text:p>3.5579808</text:p>
              </table:table-cell>
              <table:table-cell office:value-type="float" office:value="3.5926058">
                <text:p>3.5926058</text:p>
              </table:table-cell>
              <table:table-cell office:value-type="float" office:value="3.6710851">
                <text:p>3.6710851</text:p>
              </table:table-cell>
              <table:table-cell office:value-type="float" office:value="3.6923976">
                <text:p>3.6923976</text:p>
              </table:table-cell>
              <table:table-cell office:value-type="float" office:value="3.8013325">
                <text:p>3.8013325</text:p>
              </table:table-cell>
              <table:table-cell office:value-type="float" office:value="4.0081115">
                <text:p>4.0081115</text:p>
              </table:table-cell>
              <table:table-cell office:value-type="float" office:value="4.0099235">
                <text:p>4.0099235</text:p>
              </table:table-cell>
              <table:table-cell office:value-type="float" office:value="4.197337">
                <text:p>4.197337</text:p>
              </table:table-cell>
              <table:table-cell office:value-type="float" office:value="4.249261">
                <text:p>4.249261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41995">
                <text:p>3.4941995</text:p>
              </table:table-cell>
              <table:table-cell office:value-type="float" office:value="3.5049453">
                <text:p>3.5049453</text:p>
              </table:table-cell>
              <table:table-cell office:value-type="float" office:value="3.4984138">
                <text:p>3.4984138</text:p>
              </table:table-cell>
              <table:table-cell office:value-type="float" office:value="3.5015354">
                <text:p>3.5015354</text:p>
              </table:table-cell>
              <table:table-cell office:value-type="float" office:value="3.559804">
                <text:p>3.559804</text:p>
              </table:table-cell>
              <table:table-cell office:value-type="float" office:value="3.5862467">
                <text:p>3.5862467</text:p>
              </table:table-cell>
              <table:table-cell office:value-type="float" office:value="3.6667917">
                <text:p>3.6667917</text:p>
              </table:table-cell>
              <table:table-cell office:value-type="float" office:value="3.6928873">
                <text:p>3.6928873</text:p>
              </table:table-cell>
              <table:table-cell office:value-type="float" office:value="3.7753708">
                <text:p>3.7753708</text:p>
              </table:table-cell>
              <table:table-cell office:value-type="float" office:value="3.865593">
                <text:p>3.865593</text:p>
              </table:table-cell>
              <table:table-cell office:value-type="float" office:value="4.0171704">
                <text:p>4.0171704</text:p>
              </table:table-cell>
              <table:table-cell office:value-type="float" office:value="4.2094903">
                <text:p>4.2094903</text:p>
              </table:table-cell>
              <table:table-cell office:value-type="float" office:value="4.5022736">
                <text:p>4.5022736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2632">
                <text:p>3.492632</text:p>
              </table:table-cell>
              <table:table-cell office:value-type="float" office:value="3.5029268">
                <text:p>3.5029268</text:p>
              </table:table-cell>
              <table:table-cell office:value-type="float" office:value="3.5021193">
                <text:p>3.5021193</text:p>
              </table:table-cell>
              <table:table-cell office:value-type="float" office:value="3.5080566">
                <text:p>3.5080566</text:p>
              </table:table-cell>
              <table:table-cell office:value-type="float" office:value="3.5614407">
                <text:p>3.5614407</text:p>
              </table:table-cell>
              <table:table-cell office:value-type="float" office:value="3.57648">
                <text:p>3.57648</text:p>
              </table:table-cell>
              <table:table-cell office:value-type="float" office:value="3.6503043">
                <text:p>3.6503043</text:p>
              </table:table-cell>
              <table:table-cell office:value-type="float" office:value="3.7068152">
                <text:p>3.7068152</text:p>
              </table:table-cell>
              <table:table-cell office:value-type="float" office:value="3.8036907">
                <text:p>3.8036907</text:p>
              </table:table-cell>
              <table:table-cell office:value-type="float" office:value="3.8015103">
                <text:p>3.8015103</text:p>
              </table:table-cell>
              <table:table-cell office:value-type="float" office:value="4.069992">
                <text:p>4.069992</text:p>
              </table:table-cell>
              <table:table-cell office:value-type="float" office:value="4.0579796">
                <text:p>4.0579796</text:p>
              </table:table-cell>
              <table:table-cell office:value-type="float" office:value="4.903341">
                <text:p>4.9033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88067">
                <text:p>3.4988067</text:p>
              </table:table-cell>
              <table:table-cell office:value-type="float" office:value="3.510508">
                <text:p>3.510508</text:p>
              </table:table-cell>
              <table:table-cell office:value-type="float" office:value="3.5121357">
                <text:p>3.5121357</text:p>
              </table:table-cell>
              <table:table-cell office:value-type="float" office:value="3.5114143">
                <text:p>3.5114143</text:p>
              </table:table-cell>
              <table:table-cell office:value-type="float" office:value="3.5659754">
                <text:p>3.5659754</text:p>
              </table:table-cell>
              <table:table-cell office:value-type="float" office:value="3.6037943">
                <text:p>3.6037943</text:p>
              </table:table-cell>
              <table:table-cell office:value-type="float" office:value="3.665026">
                <text:p>3.665026</text:p>
              </table:table-cell>
              <table:table-cell office:value-type="float" office:value="3.708027">
                <text:p>3.708027</text:p>
              </table:table-cell>
              <table:table-cell office:value-type="float" office:value="3.8184052">
                <text:p>3.8184052</text:p>
              </table:table-cell>
              <table:table-cell office:value-type="float" office:value="3.9671428">
                <text:p>3.9671428</text:p>
              </table:table-cell>
              <table:table-cell office:value-type="float" office:value="4.001867">
                <text:p>4.001867</text:p>
              </table:table-cell>
              <table:table-cell office:value-type="float" office:value="4.0975356">
                <text:p>4.0975356</text:p>
              </table:table-cell>
              <table:table-cell office:value-type="float" office:value="4.4508796">
                <text:p>4.4508796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9114">
                <text:p>3.499114</text:p>
              </table:table-cell>
              <table:table-cell office:value-type="float" office:value="3.5126154">
                <text:p>3.5126154</text:p>
              </table:table-cell>
              <table:table-cell office:value-type="float" office:value="3.5125816">
                <text:p>3.5125816</text:p>
              </table:table-cell>
              <table:table-cell office:value-type="float" office:value="3.5169404">
                <text:p>3.5169404</text:p>
              </table:table-cell>
              <table:table-cell office:value-type="float" office:value="3.565062">
                <text:p>3.565062</text:p>
              </table:table-cell>
              <table:table-cell office:value-type="float" office:value="3.6017654">
                <text:p>3.6017654</text:p>
              </table:table-cell>
              <table:table-cell office:value-type="float" office:value="3.668867">
                <text:p>3.668867</text:p>
              </table:table-cell>
              <table:table-cell office:value-type="float" office:value="3.6963868">
                <text:p>3.6963868</text:p>
              </table:table-cell>
              <table:table-cell office:value-type="float" office:value="3.7846198">
                <text:p>3.7846198</text:p>
              </table:table-cell>
              <table:table-cell office:value-type="float" office:value="3.8818016">
                <text:p>3.8818016</text:p>
              </table:table-cell>
              <table:table-cell office:value-type="float" office:value="4.119554">
                <text:p>4.119554</text:p>
              </table:table-cell>
              <table:table-cell office:value-type="float" office:value="4.1323647">
                <text:p>4.1323647</text:p>
              </table:table-cell>
              <table:table-cell office:value-type="float" office:value="4.6440015">
                <text:p>4.6440015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6778">
                <text:p>3.496778</text:p>
              </table:table-cell>
              <table:table-cell office:value-type="float" office:value="3.5088344">
                <text:p>3.5088344</text:p>
              </table:table-cell>
              <table:table-cell office:value-type="float" office:value="3.5131288">
                <text:p>3.5131288</text:p>
              </table:table-cell>
              <table:table-cell office:value-type="float" office:value="3.509714">
                <text:p>3.509714</text:p>
              </table:table-cell>
              <table:table-cell office:value-type="float" office:value="3.561283">
                <text:p>3.561283</text:p>
              </table:table-cell>
              <table:table-cell office:value-type="float" office:value="3.5967488">
                <text:p>3.5967488</text:p>
              </table:table-cell>
              <table:table-cell office:value-type="float" office:value="3.6607993">
                <text:p>3.6607993</text:p>
              </table:table-cell>
              <table:table-cell office:value-type="float" office:value="3.6995428">
                <text:p>3.6995428</text:p>
              </table:table-cell>
              <table:table-cell office:value-type="float" office:value="3.7348092">
                <text:p>3.7348092</text:p>
              </table:table-cell>
              <table:table-cell office:value-type="float" office:value="3.8395457">
                <text:p>3.8395457</text:p>
              </table:table-cell>
              <table:table-cell office:value-type="float" office:value="4.068202">
                <text:p>4.068202</text:p>
              </table:table-cell>
              <table:table-cell office:value-type="float" office:value="4.1179986">
                <text:p>4.1179986</text:p>
              </table:table-cell>
              <table:table-cell office:value-type="float" office:value="4.46374">
                <text:p>4.46374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38796">
                <text:p>3.4938796</text:p>
              </table:table-cell>
              <table:table-cell office:value-type="float" office:value="3.505487">
                <text:p>3.505487</text:p>
              </table:table-cell>
              <table:table-cell office:value-type="float" office:value="3.5069141">
                <text:p>3.5069141</text:p>
              </table:table-cell>
              <table:table-cell office:value-type="float" office:value="3.5173576">
                <text:p>3.5173576</text:p>
              </table:table-cell>
              <table:table-cell office:value-type="float" office:value="3.5645669">
                <text:p>3.5645669</text:p>
              </table:table-cell>
              <table:table-cell office:value-type="float" office:value="3.5998197">
                <text:p>3.5998197</text:p>
              </table:table-cell>
              <table:table-cell office:value-type="float" office:value="3.67811">
                <text:p>3.67811</text:p>
              </table:table-cell>
              <table:table-cell office:value-type="float" office:value="3.6996405">
                <text:p>3.6996405</text:p>
              </table:table-cell>
              <table:table-cell office:value-type="float" office:value="3.807524">
                <text:p>3.807524</text:p>
              </table:table-cell>
              <table:table-cell office:value-type="float" office:value="4.0153723">
                <text:p>4.0153723</text:p>
              </table:table-cell>
              <table:table-cell office:value-type="float" office:value="4.0182624">
                <text:p>4.0182624</text:p>
              </table:table-cell>
              <table:table-cell office:value-type="float" office:value="4.2067676">
                <text:p>4.2067676</text:p>
              </table:table-cell>
              <table:table-cell office:value-type="float" office:value="4.256591">
                <text:p>4.256591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47627">
                <text:p>3.4947627</text:p>
              </table:table-cell>
              <table:table-cell office:value-type="float" office:value="3.5096436">
                <text:p>3.5096436</text:p>
              </table:table-cell>
              <table:table-cell office:value-type="float" office:value="3.503139">
                <text:p>3.503139</text:p>
              </table:table-cell>
              <table:table-cell office:value-type="float" office:value="3.507556">
                <text:p>3.507556</text:p>
              </table:table-cell>
              <table:table-cell office:value-type="float" office:value="3.5662677">
                <text:p>3.5662677</text:p>
              </table:table-cell>
              <table:table-cell office:value-type="float" office:value="3.5936558">
                <text:p>3.5936558</text:p>
              </table:table-cell>
              <table:table-cell office:value-type="float" office:value="3.673813">
                <text:p>3.673813</text:p>
              </table:table-cell>
              <table:table-cell office:value-type="float" office:value="3.7000325">
                <text:p>3.7000325</text:p>
              </table:table-cell>
              <table:table-cell office:value-type="float" office:value="3.782464">
                <text:p>3.782464</text:p>
              </table:table-cell>
              <table:table-cell office:value-type="float" office:value="3.8716156">
                <text:p>3.8716156</text:p>
              </table:table-cell>
              <table:table-cell office:value-type="float" office:value="4.024459">
                <text:p>4.024459</text:p>
              </table:table-cell>
              <table:table-cell office:value-type="float" office:value="4.217653">
                <text:p>4.217653</text:p>
              </table:table-cell>
              <table:table-cell office:value-type="float" office:value="4.509249">
                <text:p>4.509249</text:p>
              </table:table-cell>
              <table:table-cell office:value-type="float" office:value="3.8149152">
                <text:p>3.8149152</text:p>
              </table:table-cell>
              <table:table-cell office:value-type="float" office:value="3.4942977">
                <text:p>3.4942977</text:p>
              </table:table-cell>
              <table:table-cell office:value-type="float" office:value="3.50704">
                <text:p>3.50704</text:p>
              </table:table-cell>
              <table:table-cell office:value-type="float" office:value="3.5071642">
                <text:p>3.5071642</text:p>
              </table:table-cell>
              <table:table-cell office:value-type="float" office:value="3.5137362">
                <text:p>3.5137362</text:p>
              </table:table-cell>
              <table:table-cell office:value-type="float" office:value="3.5677373">
                <text:p>3.5677373</text:p>
              </table:table-cell>
              <table:table-cell office:value-type="float" office:value="3.5835078">
                <text:p>3.5835078</text:p>
              </table:table-cell>
              <table:table-cell office:value-type="float" office:value="3.6575212">
                <text:p>3.6575212</text:p>
              </table:table-cell>
              <table:table-cell office:value-type="float" office:value="3.7140138">
                <text:p>3.7140138</text:p>
              </table:table-cell>
              <table:table-cell office:value-type="float" office:value="3.8109052">
                <text:p>3.8109052</text:p>
              </table:table-cell>
              <table:table-cell office:value-type="float" office:value="3.808551">
                <text:p>3.808551</text:p>
              </table:table-cell>
              <table:table-cell office:value-type="float" office:value="4.0762787">
                <text:p>4.0762787</text:p>
              </table:table-cell>
              <table:table-cell office:value-type="float" office:value="4.0651665">
                <text:p>4.0651665</text:p>
              </table:table-cell>
              <table:table-cell office:value-type="float" office:value="4.9100227">
                <text:p>4.91002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