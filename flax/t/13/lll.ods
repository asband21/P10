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shapes>
          <draw:frame draw:z-index="0" draw:style-name="gr1" draw:text-style-name="P1" svg:width="29.29cm" svg:height="16.475cm" svg:x="15.85cm" svg:y="0.499cm">
            <draw:object draw:notify-on-update-of-ranges="Ark1.A2:Ark1.A2 Ark1.A3:Ark1.A90 Ark1.B2:Ark1.B2 Ark1.B3:Ark1.B90 Ark1.A2:Ark1.A2 Ark1.A3:Ark1.A90 Ark1.C2:Ark1.C2 Ark1.C3:Ark1.C90 Ark1.A2:Ark1.A2 Ark1.A3:Ark1.A90 Ark1.D2:Ark1.D2 Ark1.D3:Ark1.D90 Ark1.A2:Ark1.A2 Ark1.A3:Ark1.A90 Ark1.E2:Ark1.E2 Ark1.E3:Ark1.E90 Ark1.A2:Ark1.A2 Ark1.A3:Ark1.A90 Ark1.F2:Ark1.F2 Ark1.F3:Ark1.F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elu</text:p>
          </table:table-cell>
          <table:table-cell office:value-type="string" calcext:value-type="string">
            <text:p>gelu</text:p>
          </table:table-cell>
          <table:table-cell office:value-type="string" calcext:value-type="string">
            <text:p>relu6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elu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34003" calcext:value-type="float">
            <text:p>3,3134003</text:p>
          </table:table-cell>
          <table:table-cell office:value-type="float" office:value="3.2556162" calcext:value-type="float">
            <text:p>3,2556162</text:p>
          </table:table-cell>
          <table:table-cell office:value-type="float" office:value="3.2574527" calcext:value-type="float">
            <text:p>3,2574527</text:p>
          </table:table-cell>
          <table:table-cell office:value-type="float" office:value="3.2575097" calcext:value-type="float">
            <text:p>3,2575097</text:p>
          </table:table-cell>
          <table:table-cell office:value-type="float" office:value="3.7193716" calcext:value-type="float">
            <text:p>3,71937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800229" calcext:value-type="float">
            <text:p>3,2800229</text:p>
          </table:table-cell>
          <table:table-cell office:value-type="float" office:value="3.2542243" calcext:value-type="float">
            <text:p>3,2542243</text:p>
          </table:table-cell>
          <table:table-cell office:value-type="float" office:value="3.2535915" calcext:value-type="float">
            <text:p>3,2535915</text:p>
          </table:table-cell>
          <table:table-cell office:value-type="float" office:value="3.2540333" calcext:value-type="float">
            <text:p>3,2540333</text:p>
          </table:table-cell>
          <table:table-cell office:value-type="float" office:value="3.594124" calcext:value-type="float">
            <text:p>3,5941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577052" calcext:value-type="float">
            <text:p>3,2577052</text:p>
          </table:table-cell>
          <table:table-cell office:value-type="float" office:value="3.2527509" calcext:value-type="float">
            <text:p>3,2527509</text:p>
          </table:table-cell>
          <table:table-cell office:value-type="float" office:value="3.251541" calcext:value-type="float">
            <text:p>3,251541</text:p>
          </table:table-cell>
          <table:table-cell office:value-type="float" office:value="3.2524693" calcext:value-type="float">
            <text:p>3,2524693</text:p>
          </table:table-cell>
          <table:table-cell office:value-type="float" office:value="3.5601525" calcext:value-type="float">
            <text:p>3,56015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240949" calcext:value-type="float">
            <text:p>3,240949</text:p>
          </table:table-cell>
          <table:table-cell office:value-type="float" office:value="3.2510657" calcext:value-type="float">
            <text:p>3,2510657</text:p>
          </table:table-cell>
          <table:table-cell office:value-type="float" office:value="3.2498553" calcext:value-type="float">
            <text:p>3,2498553</text:p>
          </table:table-cell>
          <table:table-cell office:value-type="float" office:value="3.2509387" calcext:value-type="float">
            <text:p>3,2509387</text:p>
          </table:table-cell>
          <table:table-cell office:value-type="float" office:value="3.509789" calcext:value-type="float">
            <text:p>3,5097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2273295" calcext:value-type="float">
            <text:p>3,2273295</text:p>
          </table:table-cell>
          <table:table-cell office:value-type="float" office:value="3.2490458" calcext:value-type="float">
            <text:p>3,2490458</text:p>
          </table:table-cell>
          <table:table-cell office:value-type="float" office:value="3.2493317" calcext:value-type="float">
            <text:p>3,2493317</text:p>
          </table:table-cell>
          <table:table-cell office:value-type="float" office:value="3.2493875" calcext:value-type="float">
            <text:p>3,2493875</text:p>
          </table:table-cell>
          <table:table-cell office:value-type="float" office:value="3.4956112" calcext:value-type="float">
            <text:p>3,49561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2155187" calcext:value-type="float">
            <text:p>3,2155187</text:p>
          </table:table-cell>
          <table:table-cell office:value-type="float" office:value="3.2465816" calcext:value-type="float">
            <text:p>3,2465816</text:p>
          </table:table-cell>
          <table:table-cell office:value-type="float" office:value="3.2483027" calcext:value-type="float">
            <text:p>3,2483027</text:p>
          </table:table-cell>
          <table:table-cell office:value-type="float" office:value="3.2484298" calcext:value-type="float">
            <text:p>3,2484298</text:p>
          </table:table-cell>
          <table:table-cell office:value-type="float" office:value="3.491181" calcext:value-type="float">
            <text:p>3,4911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2049952" calcext:value-type="float">
            <text:p>3,2049952</text:p>
          </table:table-cell>
          <table:table-cell office:value-type="float" office:value="3.2436223" calcext:value-type="float">
            <text:p>3,2436223</text:p>
          </table:table-cell>
          <table:table-cell office:value-type="float" office:value="3.2474127" calcext:value-type="float">
            <text:p>3,2474127</text:p>
          </table:table-cell>
          <table:table-cell office:value-type="float" office:value="3.2470648" calcext:value-type="float">
            <text:p>3,2470648</text:p>
          </table:table-cell>
          <table:table-cell office:value-type="float" office:value="3.4917197" calcext:value-type="float">
            <text:p>3,49171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1955805" calcext:value-type="float">
            <text:p>3,1955805</text:p>
          </table:table-cell>
          <table:table-cell office:value-type="float" office:value="3.2402475" calcext:value-type="float">
            <text:p>3,2402475</text:p>
          </table:table-cell>
          <table:table-cell office:value-type="float" office:value="3.246613" calcext:value-type="float">
            <text:p>3,246613</text:p>
          </table:table-cell>
          <table:table-cell office:value-type="float" office:value="3.2449996" calcext:value-type="float">
            <text:p>3,2449996</text:p>
          </table:table-cell>
          <table:table-cell office:value-type="float" office:value="3.4947605" calcext:value-type="float">
            <text:p>3,49476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1872091" calcext:value-type="float">
            <text:p>3,1872091</text:p>
          </table:table-cell>
          <table:table-cell office:value-type="float" office:value="3.2366352" calcext:value-type="float">
            <text:p>3,2366352</text:p>
          </table:table-cell>
          <table:table-cell office:value-type="float" office:value="3.2452004" calcext:value-type="float">
            <text:p>3,2452004</text:p>
          </table:table-cell>
          <table:table-cell office:value-type="float" office:value="3.2441032" calcext:value-type="float">
            <text:p>3,2441032</text:p>
          </table:table-cell>
          <table:table-cell office:value-type="float" office:value="3.4981704" calcext:value-type="float">
            <text:p>3,49817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179743" calcext:value-type="float">
            <text:p>3,179743</text:p>
          </table:table-cell>
          <table:table-cell office:value-type="float" office:value="3.2329674" calcext:value-type="float">
            <text:p>3,2329674</text:p>
          </table:table-cell>
          <table:table-cell office:value-type="float" office:value="3.2426734" calcext:value-type="float">
            <text:p>3,2426734</text:p>
          </table:table-cell>
          <table:table-cell office:value-type="float" office:value="3.2431014" calcext:value-type="float">
            <text:p>3,2431014</text:p>
          </table:table-cell>
          <table:table-cell office:value-type="float" office:value="3.501876" calcext:value-type="float">
            <text:p>3,5018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1733234" calcext:value-type="float">
            <text:p>3,1733234</text:p>
          </table:table-cell>
          <table:table-cell office:value-type="float" office:value="3.2293866" calcext:value-type="float">
            <text:p>3,2293866</text:p>
          </table:table-cell>
          <table:table-cell office:value-type="float" office:value="3.2415218" calcext:value-type="float">
            <text:p>3,2415218</text:p>
          </table:table-cell>
          <table:table-cell office:value-type="float" office:value="3.2428226" calcext:value-type="float">
            <text:p>3,2428226</text:p>
          </table:table-cell>
          <table:table-cell office:value-type="float" office:value="3.5058498" calcext:value-type="float">
            <text:p>3,50584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16822" calcext:value-type="float">
            <text:p>3,16822</text:p>
          </table:table-cell>
          <table:table-cell office:value-type="float" office:value="3.2259474" calcext:value-type="float">
            <text:p>3,2259474</text:p>
          </table:table-cell>
          <table:table-cell office:value-type="float" office:value="3.2404757" calcext:value-type="float">
            <text:p>3,2404757</text:p>
          </table:table-cell>
          <table:table-cell office:value-type="float" office:value="3.2433193" calcext:value-type="float">
            <text:p>3,2433193</text:p>
          </table:table-cell>
          <table:table-cell office:value-type="float" office:value="3.5103948" calcext:value-type="float">
            <text:p>3,51039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1644778" calcext:value-type="float">
            <text:p>3,1644778</text:p>
          </table:table-cell>
          <table:table-cell office:value-type="float" office:value="3.2228115" calcext:value-type="float">
            <text:p>3,2228115</text:p>
          </table:table-cell>
          <table:table-cell office:value-type="float" office:value="3.2396953" calcext:value-type="float">
            <text:p>3,2396953</text:p>
          </table:table-cell>
          <table:table-cell office:value-type="float" office:value="3.2420561" calcext:value-type="float">
            <text:p>3,2420561</text:p>
          </table:table-cell>
          <table:table-cell office:value-type="float" office:value="3.5154426" calcext:value-type="float">
            <text:p>3,51544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162221" calcext:value-type="float">
            <text:p>3,162221</text:p>
          </table:table-cell>
          <table:table-cell office:value-type="float" office:value="3.2201326" calcext:value-type="float">
            <text:p>3,2201326</text:p>
          </table:table-cell>
          <table:table-cell office:value-type="float" office:value="3.2397208" calcext:value-type="float">
            <text:p>3,2397208</text:p>
          </table:table-cell>
          <table:table-cell office:value-type="float" office:value="3.2404182" calcext:value-type="float">
            <text:p>3,2404182</text:p>
          </table:table-cell>
          <table:table-cell office:value-type="float" office:value="3.520772" calcext:value-type="float">
            <text:p>3,5207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1615157" calcext:value-type="float">
            <text:p>3,1615157</text:p>
          </table:table-cell>
          <table:table-cell office:value-type="float" office:value="3.2181377" calcext:value-type="float">
            <text:p>3,2181377</text:p>
          </table:table-cell>
          <table:table-cell office:value-type="float" office:value="3.2404304" calcext:value-type="float">
            <text:p>3,2404304</text:p>
          </table:table-cell>
          <table:table-cell office:value-type="float" office:value="3.2396047" calcext:value-type="float">
            <text:p>3,2396047</text:p>
          </table:table-cell>
          <table:table-cell office:value-type="float" office:value="3.5262597" calcext:value-type="float">
            <text:p>3,52625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1623647" calcext:value-type="float">
            <text:p>3,1623647</text:p>
          </table:table-cell>
          <table:table-cell office:value-type="float" office:value="3.216919" calcext:value-type="float">
            <text:p>3,216919</text:p>
          </table:table-cell>
          <table:table-cell office:value-type="float" office:value="3.2413034" calcext:value-type="float">
            <text:p>3,2413034</text:p>
          </table:table-cell>
          <table:table-cell office:value-type="float" office:value="3.2396376" calcext:value-type="float">
            <text:p>3,2396376</text:p>
          </table:table-cell>
          <table:table-cell office:value-type="float" office:value="3.5317314" calcext:value-type="float">
            <text:p>3,53173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64809" calcext:value-type="float">
            <text:p>3,164809</text:p>
          </table:table-cell>
          <table:table-cell office:value-type="float" office:value="3.216454" calcext:value-type="float">
            <text:p>3,216454</text:p>
          </table:table-cell>
          <table:table-cell office:value-type="float" office:value="3.2405393" calcext:value-type="float">
            <text:p>3,2405393</text:p>
          </table:table-cell>
          <table:table-cell office:value-type="float" office:value="3.240417" calcext:value-type="float">
            <text:p>3,240417</text:p>
          </table:table-cell>
          <table:table-cell office:value-type="float" office:value="3.53709" calcext:value-type="float">
            <text:p>3,537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1687965" calcext:value-type="float">
            <text:p>3,1687965</text:p>
          </table:table-cell>
          <table:table-cell office:value-type="float" office:value="3.2166646" calcext:value-type="float">
            <text:p>3,2166646</text:p>
          </table:table-cell>
          <table:table-cell office:value-type="float" office:value="3.238804" calcext:value-type="float">
            <text:p>3,238804</text:p>
          </table:table-cell>
          <table:table-cell office:value-type="float" office:value="3.2391415" calcext:value-type="float">
            <text:p>3,2391415</text:p>
          </table:table-cell>
          <table:table-cell office:value-type="float" office:value="3.5426147" calcext:value-type="float">
            <text:p>3,54261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1743536" calcext:value-type="float">
            <text:p>3,1743536</text:p>
          </table:table-cell>
          <table:table-cell office:value-type="float" office:value="3.217538" calcext:value-type="float">
            <text:p>3,217538</text:p>
          </table:table-cell>
          <table:table-cell office:value-type="float" office:value="3.2374055" calcext:value-type="float">
            <text:p>3,2374055</text:p>
          </table:table-cell>
          <table:table-cell office:value-type="float" office:value="3.2382777" calcext:value-type="float">
            <text:p>3,2382777</text:p>
          </table:table-cell>
          <table:table-cell office:value-type="float" office:value="3.5479174" calcext:value-type="float">
            <text:p>3,54791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1814036" calcext:value-type="float">
            <text:p>3,1814036</text:p>
          </table:table-cell>
          <table:table-cell office:value-type="float" office:value="3.2190855" calcext:value-type="float">
            <text:p>3,2190855</text:p>
          </table:table-cell>
          <table:table-cell office:value-type="float" office:value="3.23741" calcext:value-type="float">
            <text:p>3,23741</text:p>
          </table:table-cell>
          <table:table-cell office:value-type="float" office:value="3.2365012" calcext:value-type="float">
            <text:p>3,2365012</text:p>
          </table:table-cell>
          <table:table-cell office:value-type="float" office:value="3.553358" calcext:value-type="float">
            <text:p>3,5533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18989" calcext:value-type="float">
            <text:p>3,18989</text:p>
          </table:table-cell>
          <table:table-cell office:value-type="float" office:value="3.2215269" calcext:value-type="float">
            <text:p>3,2215269</text:p>
          </table:table-cell>
          <table:table-cell office:value-type="float" office:value="3.2373793" calcext:value-type="float">
            <text:p>3,2373793</text:p>
          </table:table-cell>
          <table:table-cell office:value-type="float" office:value="3.2371054" calcext:value-type="float">
            <text:p>3,2371054</text:p>
          </table:table-cell>
          <table:table-cell office:value-type="float" office:value="3.5586624" calcext:value-type="float">
            <text:p>3,558662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1996772" calcext:value-type="float">
            <text:p>3,1996772</text:p>
          </table:table-cell>
          <table:table-cell office:value-type="float" office:value="3.2277305" calcext:value-type="float">
            <text:p>3,2277305</text:p>
          </table:table-cell>
          <table:table-cell office:value-type="float" office:value="3.238435" calcext:value-type="float">
            <text:p>3,238435</text:p>
          </table:table-cell>
          <table:table-cell office:value-type="float" office:value="3.2378483" calcext:value-type="float">
            <text:p>3,2378483</text:p>
          </table:table-cell>
          <table:table-cell office:value-type="float" office:value="3.5639217" calcext:value-type="float">
            <text:p>3,56392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2104096" calcext:value-type="float">
            <text:p>3,2104096</text:p>
          </table:table-cell>
          <table:table-cell office:value-type="float" office:value="3.7063773" calcext:value-type="float">
            <text:p>3,7063773</text:p>
          </table:table-cell>
          <table:table-cell office:value-type="float" office:value="3.2406504" calcext:value-type="float">
            <text:p>3,2406504</text:p>
          </table:table-cell>
          <table:table-cell office:value-type="float" office:value="3.2386146" calcext:value-type="float">
            <text:p>3,2386146</text:p>
          </table:table-cell>
          <table:table-cell office:value-type="float" office:value="3.5688326" calcext:value-type="float">
            <text:p>3,56883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2221487" calcext:value-type="float">
            <text:p>3,2221487</text:p>
          </table:table-cell>
          <table:table-cell office:value-type="float" office:value="3.3715718" calcext:value-type="float">
            <text:p>3,3715718</text:p>
          </table:table-cell>
          <table:table-cell office:value-type="float" office:value="3.2423222" calcext:value-type="float">
            <text:p>3,2423222</text:p>
          </table:table-cell>
          <table:table-cell office:value-type="float" office:value="3.237032" calcext:value-type="float">
            <text:p>3,237032</text:p>
          </table:table-cell>
          <table:table-cell office:value-type="float" office:value="3.5736766" calcext:value-type="float">
            <text:p>3,57367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2345605" calcext:value-type="float">
            <text:p>3,2345605</text:p>
          </table:table-cell>
          <table:table-cell office:value-type="float" office:value="3.3659306" calcext:value-type="float">
            <text:p>3,3659306</text:p>
          </table:table-cell>
          <table:table-cell office:value-type="float" office:value="3.2479877" calcext:value-type="float">
            <text:p>3,2479877</text:p>
          </table:table-cell>
          <table:table-cell office:value-type="float" office:value="3.2365096" calcext:value-type="float">
            <text:p>3,2365096</text:p>
          </table:table-cell>
          <table:table-cell office:value-type="float" office:value="3.578197" calcext:value-type="float">
            <text:p>3,5781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2475383" calcext:value-type="float">
            <text:p>3,2475383</text:p>
          </table:table-cell>
          <table:table-cell office:value-type="float" office:value="3.4430094" calcext:value-type="float">
            <text:p>3,4430094</text:p>
          </table:table-cell>
          <table:table-cell office:value-type="float" office:value="3.2494626" calcext:value-type="float">
            <text:p>3,2494626</text:p>
          </table:table-cell>
          <table:table-cell office:value-type="float" office:value="3.238265" calcext:value-type="float">
            <text:p>3,238265</text:p>
          </table:table-cell>
          <table:table-cell office:value-type="float" office:value="3.5824163" calcext:value-type="float">
            <text:p>3,582416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260848" calcext:value-type="float">
            <text:p>3,260848</text:p>
          </table:table-cell>
          <table:table-cell office:value-type="float" office:value="3.585141" calcext:value-type="float">
            <text:p>3,585141</text:p>
          </table:table-cell>
          <table:table-cell office:value-type="float" office:value="3.2486403" calcext:value-type="float">
            <text:p>3,2486403</text:p>
          </table:table-cell>
          <table:table-cell office:value-type="float" office:value="3.2484953" calcext:value-type="float">
            <text:p>3,2484953</text:p>
          </table:table-cell>
          <table:table-cell office:value-type="float" office:value="3.5866058" calcext:value-type="float">
            <text:p>3,586605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2744799" calcext:value-type="float">
            <text:p>3,2744799</text:p>
          </table:table-cell>
          <table:table-cell office:value-type="float" office:value="3.4733586" calcext:value-type="float">
            <text:p>3,4733586</text:p>
          </table:table-cell>
          <table:table-cell office:value-type="float" office:value="3.2527995" calcext:value-type="float">
            <text:p>3,2527995</text:p>
          </table:table-cell>
          <table:table-cell office:value-type="float" office:value="3.2782698" calcext:value-type="float">
            <text:p>3,2782698</text:p>
          </table:table-cell>
          <table:table-cell office:value-type="float" office:value="3.590656" calcext:value-type="float">
            <text:p>3,5906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2882829" calcext:value-type="float">
            <text:p>3,2882829</text:p>
          </table:table-cell>
          <table:table-cell office:value-type="float" office:value="3.4248247" calcext:value-type="float">
            <text:p>3,4248247</text:p>
          </table:table-cell>
          <table:table-cell office:value-type="float" office:value="3.2654955" calcext:value-type="float">
            <text:p>3,2654955</text:p>
          </table:table-cell>
          <table:table-cell office:value-type="float" office:value="3.278894" calcext:value-type="float">
            <text:p>3,278894</text:p>
          </table:table-cell>
          <table:table-cell office:value-type="float" office:value="3.594696" calcext:value-type="float">
            <text:p>3,59469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3020906" calcext:value-type="float">
            <text:p>3,3020906</text:p>
          </table:table-cell>
          <table:table-cell office:value-type="float" office:value="3.5934923" calcext:value-type="float">
            <text:p>3,5934923</text:p>
          </table:table-cell>
          <table:table-cell office:value-type="float" office:value="3.2969036" calcext:value-type="float">
            <text:p>3,2969036</text:p>
          </table:table-cell>
          <table:table-cell office:value-type="float" office:value="3.285721" calcext:value-type="float">
            <text:p>3,285721</text:p>
          </table:table-cell>
          <table:table-cell office:value-type="float" office:value="3.5985074" calcext:value-type="float">
            <text:p>3,59850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3158543" calcext:value-type="float">
            <text:p>3,3158543</text:p>
          </table:table-cell>
          <table:table-cell office:value-type="float" office:value="3.642734" calcext:value-type="float">
            <text:p>3,642734</text:p>
          </table:table-cell>
          <table:table-cell office:value-type="float" office:value="3.4303784" calcext:value-type="float">
            <text:p>3,4303784</text:p>
          </table:table-cell>
          <table:table-cell office:value-type="float" office:value="3.3689137" calcext:value-type="float">
            <text:p>3,3689137</text:p>
          </table:table-cell>
          <table:table-cell office:value-type="float" office:value="3.6023629" calcext:value-type="float">
            <text:p>3,60236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3295248" calcext:value-type="float">
            <text:p>3,3295248</text:p>
          </table:table-cell>
          <table:table-cell office:value-type="float" office:value="3.5564122" calcext:value-type="float">
            <text:p>3,5564122</text:p>
          </table:table-cell>
          <table:table-cell office:value-type="float" office:value="3.3274906" calcext:value-type="float">
            <text:p>3,3274906</text:p>
          </table:table-cell>
          <table:table-cell office:value-type="float" office:value="3.4987535" calcext:value-type="float">
            <text:p>3,4987535</text:p>
          </table:table-cell>
          <table:table-cell office:value-type="float" office:value="3.6062198" calcext:value-type="float">
            <text:p>3,60621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3430076" calcext:value-type="float">
            <text:p>3,3430076</text:p>
          </table:table-cell>
          <table:table-cell office:value-type="float" office:value="3.7632577" calcext:value-type="float">
            <text:p>3,7632577</text:p>
          </table:table-cell>
          <table:table-cell office:value-type="float" office:value="3.3203278" calcext:value-type="float">
            <text:p>3,3203278</text:p>
          </table:table-cell>
          <table:table-cell office:value-type="float" office:value="3.4045758" calcext:value-type="float">
            <text:p>3,4045758</text:p>
          </table:table-cell>
          <table:table-cell office:value-type="float" office:value="3.6098723" calcext:value-type="float">
            <text:p>3,609872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356252" calcext:value-type="float">
            <text:p>3,356252</text:p>
          </table:table-cell>
          <table:table-cell office:value-type="float" office:value="3.6773708" calcext:value-type="float">
            <text:p>3,6773708</text:p>
          </table:table-cell>
          <table:table-cell office:value-type="float" office:value="3.3581297" calcext:value-type="float">
            <text:p>3,3581297</text:p>
          </table:table-cell>
          <table:table-cell office:value-type="float" office:value="3.3765836" calcext:value-type="float">
            <text:p>3,3765836</text:p>
          </table:table-cell>
          <table:table-cell office:value-type="float" office:value="3.6135905" calcext:value-type="float">
            <text:p>3,61359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3693051" calcext:value-type="float">
            <text:p>3,3693051</text:p>
          </table:table-cell>
          <table:table-cell office:value-type="float" office:value="3.7918508" calcext:value-type="float">
            <text:p>3,7918508</text:p>
          </table:table-cell>
          <table:table-cell office:value-type="float" office:value="3.3621843" calcext:value-type="float">
            <text:p>3,3621843</text:p>
          </table:table-cell>
          <table:table-cell office:value-type="float" office:value="3.4277081" calcext:value-type="float">
            <text:p>3,4277081</text:p>
          </table:table-cell>
          <table:table-cell office:value-type="float" office:value="3.6171987" calcext:value-type="float">
            <text:p>3,61719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3822024" calcext:value-type="float">
            <text:p>3,3822024</text:p>
          </table:table-cell>
          <table:table-cell office:value-type="float" office:value="3.708234" calcext:value-type="float">
            <text:p>3,708234</text:p>
          </table:table-cell>
          <table:table-cell office:value-type="float" office:value="3.3170273" calcext:value-type="float">
            <text:p>3,3170273</text:p>
          </table:table-cell>
          <table:table-cell office:value-type="float" office:value="3.35886" calcext:value-type="float">
            <text:p>3,35886</text:p>
          </table:table-cell>
          <table:table-cell office:value-type="float" office:value="3.620682" calcext:value-type="float">
            <text:p>3,62068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3947356" calcext:value-type="float">
            <text:p>3,3947356</text:p>
          </table:table-cell>
          <table:table-cell office:value-type="float" office:value="3.7598946" calcext:value-type="float">
            <text:p>3,7598946</text:p>
          </table:table-cell>
          <table:table-cell office:value-type="float" office:value="3.338385" calcext:value-type="float">
            <text:p>3,338385</text:p>
          </table:table-cell>
          <table:table-cell office:value-type="float" office:value="3.781569" calcext:value-type="float">
            <text:p>3,781569</text:p>
          </table:table-cell>
          <table:table-cell office:value-type="float" office:value="3.6240995" calcext:value-type="float">
            <text:p>3,62409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4070823" calcext:value-type="float">
            <text:p>3,4070823</text:p>
          </table:table-cell>
          <table:table-cell office:value-type="float" office:value="3.8387263" calcext:value-type="float">
            <text:p>3,8387263</text:p>
          </table:table-cell>
          <table:table-cell office:value-type="float" office:value="3.5647697" calcext:value-type="float">
            <text:p>3,5647697</text:p>
          </table:table-cell>
          <table:table-cell office:value-type="float" office:value="3.4456868" calcext:value-type="float">
            <text:p>3,4456868</text:p>
          </table:table-cell>
          <table:table-cell office:value-type="float" office:value="3.627399" calcext:value-type="float">
            <text:p>3,62739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4191823" calcext:value-type="float">
            <text:p>3,4191823</text:p>
          </table:table-cell>
          <table:table-cell office:value-type="float" office:value="3.6369278" calcext:value-type="float">
            <text:p>3,6369278</text:p>
          </table:table-cell>
          <table:table-cell office:value-type="float" office:value="3.5433066" calcext:value-type="float">
            <text:p>3,5433066</text:p>
          </table:table-cell>
          <table:table-cell office:value-type="float" office:value="3.538975" calcext:value-type="float">
            <text:p>3,538975</text:p>
          </table:table-cell>
          <table:table-cell office:value-type="float" office:value="3.630644" calcext:value-type="float">
            <text:p>3,63064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4310143" calcext:value-type="float">
            <text:p>3,4310143</text:p>
          </table:table-cell>
          <table:table-cell office:value-type="float" office:value="3.9318886" calcext:value-type="float">
            <text:p>3,9318886</text:p>
          </table:table-cell>
          <table:table-cell office:value-type="float" office:value="3.3700585" calcext:value-type="float">
            <text:p>3,3700585</text:p>
          </table:table-cell>
          <table:table-cell office:value-type="float" office:value="3.5579362" calcext:value-type="float">
            <text:p>3,5579362</text:p>
          </table:table-cell>
          <table:table-cell office:value-type="float" office:value="3.6338923" calcext:value-type="float">
            <text:p>3,63389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4424665" calcext:value-type="float">
            <text:p>3,4424665</text:p>
          </table:table-cell>
          <table:table-cell office:value-type="float" office:value="3.6726394" calcext:value-type="float">
            <text:p>3,6726394</text:p>
          </table:table-cell>
          <table:table-cell office:value-type="float" office:value="3.7111123" calcext:value-type="float">
            <text:p>3,7111123</text:p>
          </table:table-cell>
          <table:table-cell office:value-type="float" office:value="3.4593275" calcext:value-type="float">
            <text:p>3,4593275</text:p>
          </table:table-cell>
          <table:table-cell office:value-type="float" office:value="3.6370237" calcext:value-type="float">
            <text:p>3,637023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4537404" calcext:value-type="float">
            <text:p>3,4537404</text:p>
          </table:table-cell>
          <table:table-cell office:value-type="float" office:value="3.92663" calcext:value-type="float">
            <text:p>3,92663</text:p>
          </table:table-cell>
          <table:table-cell office:value-type="float" office:value="3.7089584" calcext:value-type="float">
            <text:p>3,7089584</text:p>
          </table:table-cell>
          <table:table-cell office:value-type="float" office:value="3.8791125" calcext:value-type="float">
            <text:p>3,8791125</text:p>
          </table:table-cell>
          <table:table-cell office:value-type="float" office:value="3.6401641" calcext:value-type="float">
            <text:p>3,640164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46478" calcext:value-type="float">
            <text:p>3,46478</text:p>
          </table:table-cell>
          <table:table-cell office:value-type="float" office:value="3.6291597" calcext:value-type="float">
            <text:p>3,6291597</text:p>
          </table:table-cell>
          <table:table-cell office:value-type="float" office:value="3.6035056" calcext:value-type="float">
            <text:p>3,6035056</text:p>
          </table:table-cell>
          <table:table-cell office:value-type="float" office:value="3.5806675" calcext:value-type="float">
            <text:p>3,5806675</text:p>
          </table:table-cell>
          <table:table-cell office:value-type="float" office:value="3.643295" calcext:value-type="float">
            <text:p>3,64329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4755352" calcext:value-type="float">
            <text:p>3,4755352</text:p>
          </table:table-cell>
          <table:table-cell office:value-type="float" office:value="3.521961" calcext:value-type="float">
            <text:p>3,521961</text:p>
          </table:table-cell>
          <table:table-cell office:value-type="float" office:value="3.5467312" calcext:value-type="float">
            <text:p>3,5467312</text:p>
          </table:table-cell>
          <table:table-cell office:value-type="float" office:value="3.534694" calcext:value-type="float">
            <text:p>3,534694</text:p>
          </table:table-cell>
          <table:table-cell office:value-type="float" office:value="3.6464057" calcext:value-type="float">
            <text:p>3,646405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486158" calcext:value-type="float">
            <text:p>3,486158</text:p>
          </table:table-cell>
          <table:table-cell office:value-type="float" office:value="3.546345" calcext:value-type="float">
            <text:p>3,546345</text:p>
          </table:table-cell>
          <table:table-cell office:value-type="float" office:value="3.6700764" calcext:value-type="float">
            <text:p>3,6700764</text:p>
          </table:table-cell>
          <table:table-cell office:value-type="float" office:value="3.4502418" calcext:value-type="float">
            <text:p>3,4502418</text:p>
          </table:table-cell>
          <table:table-cell office:value-type="float" office:value="3.6494462" calcext:value-type="float">
            <text:p>3,64944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4964187" calcext:value-type="float">
            <text:p>3,4964187</text:p>
          </table:table-cell>
          <table:table-cell office:value-type="float" office:value="3.5735486" calcext:value-type="float">
            <text:p>3,5735486</text:p>
          </table:table-cell>
          <table:table-cell office:value-type="float" office:value="3.6864989" calcext:value-type="float">
            <text:p>3,6864989</text:p>
          </table:table-cell>
          <table:table-cell office:value-type="float" office:value="3.866729" calcext:value-type="float">
            <text:p>3,866729</text:p>
          </table:table-cell>
          <table:table-cell office:value-type="float" office:value="3.6524699" calcext:value-type="float">
            <text:p>3,652469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5065026" calcext:value-type="float">
            <text:p>3,5065026</text:p>
          </table:table-cell>
          <table:table-cell office:value-type="float" office:value="3.597072" calcext:value-type="float">
            <text:p>3,597072</text:p>
          </table:table-cell>
          <table:table-cell office:value-type="float" office:value="3.5956278" calcext:value-type="float">
            <text:p>3,5956278</text:p>
          </table:table-cell>
          <table:table-cell office:value-type="float" office:value="3.831674" calcext:value-type="float">
            <text:p>3,831674</text:p>
          </table:table-cell>
          <table:table-cell office:value-type="float" office:value="3.6553636" calcext:value-type="float">
            <text:p>3,655363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5163972" calcext:value-type="float">
            <text:p>3,5163972</text:p>
          </table:table-cell>
          <table:table-cell office:value-type="float" office:value="3.6179018" calcext:value-type="float">
            <text:p>3,6179018</text:p>
          </table:table-cell>
          <table:table-cell office:value-type="float" office:value="3.5955846" calcext:value-type="float">
            <text:p>3,5955846</text:p>
          </table:table-cell>
          <table:table-cell office:value-type="float" office:value="4.1639977" calcext:value-type="float">
            <text:p>4,1639977</text:p>
          </table:table-cell>
          <table:table-cell office:value-type="float" office:value="3.658364" calcext:value-type="float">
            <text:p>3,65836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5261617" calcext:value-type="float">
            <text:p>3,5261617</text:p>
          </table:table-cell>
          <table:table-cell office:value-type="float" office:value="3.6360052" calcext:value-type="float">
            <text:p>3,6360052</text:p>
          </table:table-cell>
          <table:table-cell office:value-type="float" office:value="3.6429343" calcext:value-type="float">
            <text:p>3,6429343</text:p>
          </table:table-cell>
          <table:table-cell office:value-type="float" office:value="4.0565076" calcext:value-type="float">
            <text:p>4,0565076</text:p>
          </table:table-cell>
          <table:table-cell office:value-type="float" office:value="3.661258" calcext:value-type="float">
            <text:p>3,66125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5355692" calcext:value-type="float">
            <text:p>3,5355692</text:p>
          </table:table-cell>
          <table:table-cell office:value-type="float" office:value="3.6521976" calcext:value-type="float">
            <text:p>3,6521976</text:p>
          </table:table-cell>
          <table:table-cell office:value-type="float" office:value="3.748003" calcext:value-type="float">
            <text:p>3,748003</text:p>
          </table:table-cell>
          <table:table-cell office:value-type="float" office:value="3.5144644" calcext:value-type="float">
            <text:p>3,5144644</text:p>
          </table:table-cell>
          <table:table-cell office:value-type="float" office:value="3.664209" calcext:value-type="float">
            <text:p>3,6642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5448363" calcext:value-type="float">
            <text:p>3,5448363</text:p>
          </table:table-cell>
          <table:table-cell office:value-type="float" office:value="3.6671348" calcext:value-type="float">
            <text:p>3,6671348</text:p>
          </table:table-cell>
          <table:table-cell office:value-type="float" office:value="3.5301564" calcext:value-type="float">
            <text:p>3,5301564</text:p>
          </table:table-cell>
          <table:table-cell office:value-type="float" office:value="4.1761384" calcext:value-type="float">
            <text:p>4,1761384</text:p>
          </table:table-cell>
          <table:table-cell office:value-type="float" office:value="3.667007" calcext:value-type="float">
            <text:p>3,6670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55408" calcext:value-type="float">
            <text:p>3,55408</text:p>
          </table:table-cell>
          <table:table-cell office:value-type="float" office:value="3.6808228" calcext:value-type="float">
            <text:p>3,6808228</text:p>
          </table:table-cell>
          <table:table-cell office:value-type="float" office:value="3.752909" calcext:value-type="float">
            <text:p>3,752909</text:p>
          </table:table-cell>
          <table:table-cell office:value-type="float" office:value="3.921657" calcext:value-type="float">
            <text:p>3,921657</text:p>
          </table:table-cell>
          <table:table-cell office:value-type="float" office:value="3.6698024" calcext:value-type="float">
            <text:p>3,66980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5629306" calcext:value-type="float">
            <text:p>3,5629306</text:p>
          </table:table-cell>
          <table:table-cell office:value-type="float" office:value="3.693179" calcext:value-type="float">
            <text:p>3,693179</text:p>
          </table:table-cell>
          <table:table-cell office:value-type="float" office:value="3.6907094" calcext:value-type="float">
            <text:p>3,6907094</text:p>
          </table:table-cell>
          <table:table-cell office:value-type="float" office:value="4.225206" calcext:value-type="float">
            <text:p>4,225206</text:p>
          </table:table-cell>
          <table:table-cell office:value-type="float" office:value="3.6724474" calcext:value-type="float">
            <text:p>3,672447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5717647" calcext:value-type="float">
            <text:p>3,5717647</text:p>
          </table:table-cell>
          <table:table-cell office:value-type="float" office:value="3.7048652" calcext:value-type="float">
            <text:p>3,7048652</text:p>
          </table:table-cell>
          <table:table-cell office:value-type="float" office:value="3.7854428" calcext:value-type="float">
            <text:p>3,7854428</text:p>
          </table:table-cell>
          <table:table-cell office:value-type="float" office:value="3.4642107" calcext:value-type="float">
            <text:p>3,4642107</text:p>
          </table:table-cell>
          <table:table-cell office:value-type="float" office:value="3.6752064" calcext:value-type="float">
            <text:p>3,675206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.5803292" calcext:value-type="float">
            <text:p>3,5803292</text:p>
          </table:table-cell>
          <table:table-cell office:value-type="float" office:value="3.7158945" calcext:value-type="float">
            <text:p>3,7158945</text:p>
          </table:table-cell>
          <table:table-cell office:value-type="float" office:value="3.7041745" calcext:value-type="float">
            <text:p>3,7041745</text:p>
          </table:table-cell>
          <table:table-cell office:value-type="float" office:value="3.5326478" calcext:value-type="float">
            <text:p>3,5326478</text:p>
          </table:table-cell>
          <table:table-cell office:value-type="float" office:value="3.6778638" calcext:value-type="float">
            <text:p>3,677863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5887704" calcext:value-type="float">
            <text:p>3,5887704</text:p>
          </table:table-cell>
          <table:table-cell office:value-type="float" office:value="3.7261124" calcext:value-type="float">
            <text:p>3,7261124</text:p>
          </table:table-cell>
          <table:table-cell office:value-type="float" office:value="3.4764931" calcext:value-type="float">
            <text:p>3,4764931</text:p>
          </table:table-cell>
          <table:table-cell office:value-type="float" office:value="3.5737865" calcext:value-type="float">
            <text:p>3,5737865</text:p>
          </table:table-cell>
          <table:table-cell office:value-type="float" office:value="3.680547" calcext:value-type="float">
            <text:p>3,68054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.597034" calcext:value-type="float">
            <text:p>3,597034</text:p>
          </table:table-cell>
          <table:table-cell office:value-type="float" office:value="3.7358925" calcext:value-type="float">
            <text:p>3,7358925</text:p>
          </table:table-cell>
          <table:table-cell office:value-type="float" office:value="3.4685442" calcext:value-type="float">
            <text:p>3,4685442</text:p>
          </table:table-cell>
          <table:table-cell office:value-type="float" office:value="3.6039312" calcext:value-type="float">
            <text:p>3,6039312</text:p>
          </table:table-cell>
          <table:table-cell office:value-type="float" office:value="3.6831334" calcext:value-type="float">
            <text:p>3,683133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.6051867" calcext:value-type="float">
            <text:p>3,6051867</text:p>
          </table:table-cell>
          <table:table-cell office:value-type="float" office:value="3.7452302" calcext:value-type="float">
            <text:p>3,7452302</text:p>
          </table:table-cell>
          <table:table-cell office:value-type="float" office:value="3.4813056" calcext:value-type="float">
            <text:p>3,4813056</text:p>
          </table:table-cell>
          <table:table-cell office:value-type="float" office:value="3.6273048" calcext:value-type="float">
            <text:p>3,6273048</text:p>
          </table:table-cell>
          <table:table-cell office:value-type="float" office:value="3.6857328" calcext:value-type="float">
            <text:p>3,685732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613187" calcext:value-type="float">
            <text:p>3,613187</text:p>
          </table:table-cell>
          <table:table-cell office:value-type="float" office:value="3.7539074" calcext:value-type="float">
            <text:p>3,7539074</text:p>
          </table:table-cell>
          <table:table-cell office:value-type="float" office:value="3.4917748" calcext:value-type="float">
            <text:p>3,4917748</text:p>
          </table:table-cell>
          <table:table-cell office:value-type="float" office:value="3.6476703" calcext:value-type="float">
            <text:p>3,6476703</text:p>
          </table:table-cell>
          <table:table-cell office:value-type="float" office:value="3.6883783" calcext:value-type="float">
            <text:p>3,688378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.6209931" calcext:value-type="float">
            <text:p>3,6209931</text:p>
          </table:table-cell>
          <table:table-cell office:value-type="float" office:value="3.7625003" calcext:value-type="float">
            <text:p>3,7625003</text:p>
          </table:table-cell>
          <table:table-cell office:value-type="float" office:value="3.50084" calcext:value-type="float">
            <text:p>3,50084</text:p>
          </table:table-cell>
          <table:table-cell office:value-type="float" office:value="3.6643026" calcext:value-type="float">
            <text:p>3,6643026</text:p>
          </table:table-cell>
          <table:table-cell office:value-type="float" office:value="3.6908364" calcext:value-type="float">
            <text:p>3,690836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6287262" calcext:value-type="float">
            <text:p>3,6287262</text:p>
          </table:table-cell>
          <table:table-cell office:value-type="float" office:value="3.770634" calcext:value-type="float">
            <text:p>3,770634</text:p>
          </table:table-cell>
          <table:table-cell office:value-type="float" office:value="3.509679" calcext:value-type="float">
            <text:p>3,509679</text:p>
          </table:table-cell>
          <table:table-cell office:value-type="float" office:value="3.6795523" calcext:value-type="float">
            <text:p>3,6795523</text:p>
          </table:table-cell>
          <table:table-cell office:value-type="float" office:value="3.6932535" calcext:value-type="float">
            <text:p>3,693253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636262" calcext:value-type="float">
            <text:p>3,636262</text:p>
          </table:table-cell>
          <table:table-cell office:value-type="float" office:value="3.7786422" calcext:value-type="float">
            <text:p>3,7786422</text:p>
          </table:table-cell>
          <table:table-cell office:value-type="float" office:value="3.5183449" calcext:value-type="float">
            <text:p>3,5183449</text:p>
          </table:table-cell>
          <table:table-cell office:value-type="float" office:value="3.6946528" calcext:value-type="float">
            <text:p>3,6946528</text:p>
          </table:table-cell>
          <table:table-cell office:value-type="float" office:value="3.69572" calcext:value-type="float">
            <text:p>3,6957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6437342" calcext:value-type="float">
            <text:p>3,6437342</text:p>
          </table:table-cell>
          <table:table-cell office:value-type="float" office:value="3.786238" calcext:value-type="float">
            <text:p>3,786238</text:p>
          </table:table-cell>
          <table:table-cell office:value-type="float" office:value="3.5264027" calcext:value-type="float">
            <text:p>3,5264027</text:p>
          </table:table-cell>
          <table:table-cell office:value-type="float" office:value="3.7091327" calcext:value-type="float">
            <text:p>3,7091327</text:p>
          </table:table-cell>
          <table:table-cell office:value-type="float" office:value="3.6979702" calcext:value-type="float">
            <text:p>3,697970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.6510491" calcext:value-type="float">
            <text:p>3,6510491</text:p>
          </table:table-cell>
          <table:table-cell office:value-type="float" office:value="3.7934282" calcext:value-type="float">
            <text:p>3,7934282</text:p>
          </table:table-cell>
          <table:table-cell office:value-type="float" office:value="3.5337603" calcext:value-type="float">
            <text:p>3,5337603</text:p>
          </table:table-cell>
          <table:table-cell office:value-type="float" office:value="3.7225175" calcext:value-type="float">
            <text:p>3,7225175</text:p>
          </table:table-cell>
          <table:table-cell office:value-type="float" office:value="3.7002985" calcext:value-type="float">
            <text:p>3,70029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6582808" calcext:value-type="float">
            <text:p>3,6582808</text:p>
          </table:table-cell>
          <table:table-cell office:value-type="float" office:value="3.8005323" calcext:value-type="float">
            <text:p>3,8005323</text:p>
          </table:table-cell>
          <table:table-cell office:value-type="float" office:value="3.5414262" calcext:value-type="float">
            <text:p>3,5414262</text:p>
          </table:table-cell>
          <table:table-cell office:value-type="float" office:value="3.7360291" calcext:value-type="float">
            <text:p>3,7360291</text:p>
          </table:table-cell>
          <table:table-cell office:value-type="float" office:value="3.7025592" calcext:value-type="float">
            <text:p>3,702559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6653163" calcext:value-type="float">
            <text:p>3,6653163</text:p>
          </table:table-cell>
          <table:table-cell office:value-type="float" office:value="3.807514" calcext:value-type="float">
            <text:p>3,807514</text:p>
          </table:table-cell>
          <table:table-cell office:value-type="float" office:value="3.5489063" calcext:value-type="float">
            <text:p>3,5489063</text:p>
          </table:table-cell>
          <table:table-cell office:value-type="float" office:value="3.7488916" calcext:value-type="float">
            <text:p>3,7488916</text:p>
          </table:table-cell>
          <table:table-cell office:value-type="float" office:value="3.7048109" calcext:value-type="float">
            <text:p>3,704810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.672285" calcext:value-type="float">
            <text:p>3,672285</text:p>
          </table:table-cell>
          <table:table-cell office:value-type="float" office:value="3.8141022" calcext:value-type="float">
            <text:p>3,8141022</text:p>
          </table:table-cell>
          <table:table-cell office:value-type="float" office:value="3.5556016" calcext:value-type="float">
            <text:p>3,5556016</text:p>
          </table:table-cell>
          <table:table-cell office:value-type="float" office:value="3.761657" calcext:value-type="float">
            <text:p>3,761657</text:p>
          </table:table-cell>
          <table:table-cell office:value-type="float" office:value="3.7070916" calcext:value-type="float">
            <text:p>3,707091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6790767" calcext:value-type="float">
            <text:p>3,6790767</text:p>
          </table:table-cell>
          <table:table-cell office:value-type="float" office:value="3.8203082" calcext:value-type="float">
            <text:p>3,8203082</text:p>
          </table:table-cell>
          <table:table-cell office:value-type="float" office:value="3.5631866" calcext:value-type="float">
            <text:p>3,5631866</text:p>
          </table:table-cell>
          <table:table-cell office:value-type="float" office:value="3.7740529" calcext:value-type="float">
            <text:p>3,7740529</text:p>
          </table:table-cell>
          <table:table-cell office:value-type="float" office:value="3.7092912" calcext:value-type="float">
            <text:p>3,709291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.6858876" calcext:value-type="float">
            <text:p>3,6858876</text:p>
          </table:table-cell>
          <table:table-cell office:value-type="float" office:value="3.8265533" calcext:value-type="float">
            <text:p>3,8265533</text:p>
          </table:table-cell>
          <table:table-cell office:value-type="float" office:value="3.570567" calcext:value-type="float">
            <text:p>3,570567</text:p>
          </table:table-cell>
          <table:table-cell office:value-type="float" office:value="3.7863085" calcext:value-type="float">
            <text:p>3,7863085</text:p>
          </table:table-cell>
          <table:table-cell office:value-type="float" office:value="3.7113779" calcext:value-type="float">
            <text:p>3,711377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692514" calcext:value-type="float">
            <text:p>3,692514</text:p>
          </table:table-cell>
          <table:table-cell office:value-type="float" office:value="3.8324273" calcext:value-type="float">
            <text:p>3,8324273</text:p>
          </table:table-cell>
          <table:table-cell office:value-type="float" office:value="3.5777326" calcext:value-type="float">
            <text:p>3,5777326</text:p>
          </table:table-cell>
          <table:table-cell office:value-type="float" office:value="3.7980623" calcext:value-type="float">
            <text:p>3,7980623</text:p>
          </table:table-cell>
          <table:table-cell office:value-type="float" office:value="3.7134798" calcext:value-type="float">
            <text:p>3,713479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6990492" calcext:value-type="float">
            <text:p>3,6990492</text:p>
          </table:table-cell>
          <table:table-cell office:value-type="float" office:value="3.8382885" calcext:value-type="float">
            <text:p>3,8382885</text:p>
          </table:table-cell>
          <table:table-cell office:value-type="float" office:value="3.5843165" calcext:value-type="float">
            <text:p>3,5843165</text:p>
          </table:table-cell>
          <table:table-cell office:value-type="float" office:value="3.8096614" calcext:value-type="float">
            <text:p>3,8096614</text:p>
          </table:table-cell>
          <table:table-cell office:value-type="float" office:value="3.7155788" calcext:value-type="float">
            <text:p>3,715578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.7054362" calcext:value-type="float">
            <text:p>3,7054362</text:p>
          </table:table-cell>
          <table:table-cell office:value-type="float" office:value="3.8440332" calcext:value-type="float">
            <text:p>3,8440332</text:p>
          </table:table-cell>
          <table:table-cell office:value-type="float" office:value="3.5906503" calcext:value-type="float">
            <text:p>3,5906503</text:p>
          </table:table-cell>
          <table:table-cell office:value-type="float" office:value="3.8210382" calcext:value-type="float">
            <text:p>3,8210382</text:p>
          </table:table-cell>
          <table:table-cell office:value-type="float" office:value="3.7176514" calcext:value-type="float">
            <text:p>3,71765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7118514" calcext:value-type="float">
            <text:p>3,7118514</text:p>
          </table:table-cell>
          <table:table-cell office:value-type="float" office:value="3.8498003" calcext:value-type="float">
            <text:p>3,8498003</text:p>
          </table:table-cell>
          <table:table-cell office:value-type="float" office:value="3.596371" calcext:value-type="float">
            <text:p>3,596371</text:p>
          </table:table-cell>
          <table:table-cell office:value-type="float" office:value="3.8319983" calcext:value-type="float">
            <text:p>3,8319983</text:p>
          </table:table-cell>
          <table:table-cell office:value-type="float" office:value="3.7197287" calcext:value-type="float">
            <text:p>3,719728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7180836" calcext:value-type="float">
            <text:p>3,7180836</text:p>
          </table:table-cell>
          <table:table-cell office:value-type="float" office:value="3.8551586" calcext:value-type="float">
            <text:p>3,8551586</text:p>
          </table:table-cell>
          <table:table-cell office:value-type="float" office:value="3.6021821" calcext:value-type="float">
            <text:p>3,6021821</text:p>
          </table:table-cell>
          <table:table-cell office:value-type="float" office:value="3.842574" calcext:value-type="float">
            <text:p>3,842574</text:p>
          </table:table-cell>
          <table:table-cell office:value-type="float" office:value="3.7217035" calcext:value-type="float">
            <text:p>3,721703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.7242053" calcext:value-type="float">
            <text:p>3,7242053</text:p>
          </table:table-cell>
          <table:table-cell office:value-type="float" office:value="3.8602564" calcext:value-type="float">
            <text:p>3,8602564</text:p>
          </table:table-cell>
          <table:table-cell office:value-type="float" office:value="3.6078172" calcext:value-type="float">
            <text:p>3,6078172</text:p>
          </table:table-cell>
          <table:table-cell office:value-type="float" office:value="3.8531237" calcext:value-type="float">
            <text:p>3,8531237</text:p>
          </table:table-cell>
          <table:table-cell office:value-type="float" office:value="3.723685" calcext:value-type="float">
            <text:p>3,7236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7302718" calcext:value-type="float">
            <text:p>3,7302718</text:p>
          </table:table-cell>
          <table:table-cell office:value-type="float" office:value="3.865495" calcext:value-type="float">
            <text:p>3,865495</text:p>
          </table:table-cell>
          <table:table-cell office:value-type="float" office:value="3.613255" calcext:value-type="float">
            <text:p>3,613255</text:p>
          </table:table-cell>
          <table:table-cell office:value-type="float" office:value="3.863255" calcext:value-type="float">
            <text:p>3,863255</text:p>
          </table:table-cell>
          <table:table-cell office:value-type="float" office:value="3.7257266" calcext:value-type="float">
            <text:p>3,725726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.7362113" calcext:value-type="float">
            <text:p>3,7362113</text:p>
          </table:table-cell>
          <table:table-cell office:value-type="float" office:value="3.8705134" calcext:value-type="float">
            <text:p>3,8705134</text:p>
          </table:table-cell>
          <table:table-cell office:value-type="float" office:value="3.6191936" calcext:value-type="float">
            <text:p>3,6191936</text:p>
          </table:table-cell>
          <table:table-cell office:value-type="float" office:value="3.873399" calcext:value-type="float">
            <text:p>3,873399</text:p>
          </table:table-cell>
          <table:table-cell office:value-type="float" office:value="3.7277176" calcext:value-type="float">
            <text:p>3,727717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.7421498" calcext:value-type="float">
            <text:p>3,7421498</text:p>
          </table:table-cell>
          <table:table-cell office:value-type="float" office:value="3.8756404" calcext:value-type="float">
            <text:p>3,8756404</text:p>
          </table:table-cell>
          <table:table-cell office:value-type="float" office:value="3.6251526" calcext:value-type="float">
            <text:p>3,6251526</text:p>
          </table:table-cell>
          <table:table-cell office:value-type="float" office:value="3.883219" calcext:value-type="float">
            <text:p>3,883219</text:p>
          </table:table-cell>
          <table:table-cell office:value-type="float" office:value="3.7297194" calcext:value-type="float">
            <text:p>3,729719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.7479448" calcext:value-type="float">
            <text:p>3,7479448</text:p>
          </table:table-cell>
          <table:table-cell office:value-type="float" office:value="3.8804603" calcext:value-type="float">
            <text:p>3,8804603</text:p>
          </table:table-cell>
          <table:table-cell office:value-type="float" office:value="3.6308272" calcext:value-type="float">
            <text:p>3,6308272</text:p>
          </table:table-cell>
          <table:table-cell office:value-type="float" office:value="3.893151" calcext:value-type="float">
            <text:p>3,893151</text:p>
          </table:table-cell>
          <table:table-cell office:value-type="float" office:value="3.7315798" calcext:value-type="float">
            <text:p>3,731579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.753685" calcext:value-type="float">
            <text:p>3,753685</text:p>
          </table:table-cell>
          <table:table-cell office:value-type="float" office:value="3.8854885" calcext:value-type="float">
            <text:p>3,8854885</text:p>
          </table:table-cell>
          <table:table-cell office:value-type="float" office:value="3.6363103" calcext:value-type="float">
            <text:p>3,6363103</text:p>
          </table:table-cell>
          <table:table-cell office:value-type="float" office:value="3.9021864" calcext:value-type="float">
            <text:p>3,9021864</text:p>
          </table:table-cell>
          <table:table-cell office:value-type="float" office:value="3.7335496" calcext:value-type="float">
            <text:p>3,733549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.759309" calcext:value-type="float">
            <text:p>3,759309</text:p>
          </table:table-cell>
          <table:table-cell office:value-type="float" office:value="3.8899608" calcext:value-type="float">
            <text:p>3,8899608</text:p>
          </table:table-cell>
          <table:table-cell office:value-type="float" office:value="3.6418662" calcext:value-type="float">
            <text:p>3,6418662</text:p>
          </table:table-cell>
          <table:table-cell office:value-type="float" office:value="3.9115064" calcext:value-type="float">
            <text:p>3,9115064</text:p>
          </table:table-cell>
          <table:table-cell office:value-type="float" office:value="3.735357" calcext:value-type="float">
            <text:p>3,73535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.764841" calcext:value-type="float">
            <text:p>3,764841</text:p>
          </table:table-cell>
          <table:table-cell office:value-type="float" office:value="3.8945236" calcext:value-type="float">
            <text:p>3,8945236</text:p>
          </table:table-cell>
          <table:table-cell office:value-type="float" office:value="3.6465595" calcext:value-type="float">
            <text:p>3,6465595</text:p>
          </table:table-cell>
          <table:table-cell office:value-type="float" office:value="3.920686" calcext:value-type="float">
            <text:p>3,920686</text:p>
          </table:table-cell>
          <table:table-cell office:value-type="float" office:value="3.7373302" calcext:value-type="float">
            <text:p>3,737330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.7704115" calcext:value-type="float">
            <text:p>3,7704115</text:p>
          </table:table-cell>
          <table:table-cell office:value-type="float" office:value="3.8989668" calcext:value-type="float">
            <text:p>3,8989668</text:p>
          </table:table-cell>
          <table:table-cell office:value-type="float" office:value="3.651668" calcext:value-type="float">
            <text:p>3,651668</text:p>
          </table:table-cell>
          <table:table-cell office:value-type="float" office:value="3.9293938" calcext:value-type="float">
            <text:p>3,9293938</text:p>
          </table:table-cell>
          <table:table-cell office:value-type="float" office:value="3.7392128" calcext:value-type="float">
            <text:p>3,739212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.775817" calcext:value-type="float">
            <text:p>3,775817</text:p>
          </table:table-cell>
          <table:table-cell office:value-type="float" office:value="3.903471" calcext:value-type="float">
            <text:p>3,903471</text:p>
          </table:table-cell>
          <table:table-cell office:value-type="float" office:value="3.656964" calcext:value-type="float">
            <text:p>3,656964</text:p>
          </table:table-cell>
          <table:table-cell office:value-type="float" office:value="3.9384859" calcext:value-type="float">
            <text:p>3,9384859</text:p>
          </table:table-cell>
          <table:table-cell office:value-type="float" office:value="3.7410579" calcext:value-type="float">
            <text:p>3,741057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.7812397" calcext:value-type="float">
            <text:p>3,7812397</text:p>
          </table:table-cell>
          <table:table-cell office:value-type="float" office:value="3.9076226" calcext:value-type="float">
            <text:p>3,9076226</text:p>
          </table:table-cell>
          <table:table-cell office:value-type="float" office:value="3.662013" calcext:value-type="float">
            <text:p>3,662013</text:p>
          </table:table-cell>
          <table:table-cell office:value-type="float" office:value="3.946947" calcext:value-type="float">
            <text:p>3,946947</text:p>
          </table:table-cell>
          <table:table-cell office:value-type="float" office:value="3.7428064" calcext:value-type="float">
            <text:p>3,742806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.7864895" calcext:value-type="float">
            <text:p>3,7864895</text:p>
          </table:table-cell>
          <table:table-cell office:value-type="float" office:value="3.911889" calcext:value-type="float">
            <text:p>3,911889</text:p>
          </table:table-cell>
          <table:table-cell office:value-type="float" office:value="3.6674714" calcext:value-type="float">
            <text:p>3,6674714</text:p>
          </table:table-cell>
          <table:table-cell office:value-type="float" office:value="3.9557333" calcext:value-type="float">
            <text:p>3,9557333</text:p>
          </table:table-cell>
          <table:table-cell office:value-type="float" office:value="3.744676" calcext:value-type="float">
            <text:p>3,74467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.7917018" calcext:value-type="float">
            <text:p>3,7917018</text:p>
          </table:table-cell>
          <table:table-cell office:value-type="float" office:value="3.9159024" calcext:value-type="float">
            <text:p>3,9159024</text:p>
          </table:table-cell>
          <table:table-cell office:value-type="float" office:value="3.6725852" calcext:value-type="float">
            <text:p>3,6725852</text:p>
          </table:table-cell>
          <table:table-cell office:value-type="float" office:value="3.964072" calcext:value-type="float">
            <text:p>3,964072</text:p>
          </table:table-cell>
          <table:table-cell office:value-type="float" office:value="3.746537" calcext:value-type="float">
            <text:p>3,74653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.796948" calcext:value-type="float">
            <text:p>3,796948</text:p>
          </table:table-cell>
          <table:table-cell office:value-type="float" office:value="3.920101" calcext:value-type="float">
            <text:p>3,920101</text:p>
          </table:table-cell>
          <table:table-cell office:value-type="float" office:value="3.677586" calcext:value-type="float">
            <text:p>3,677586</text:p>
          </table:table-cell>
          <table:table-cell office:value-type="float" office:value="3.9730828" calcext:value-type="float">
            <text:p>3,9730828</text:p>
          </table:table-cell>
          <table:table-cell office:value-type="float" office:value="3.7483025" calcext:value-type="float">
            <text:p>3,7483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a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lespidser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lespidser_20_1" draw:display-name="Pilespidser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-00-0000</text:date>, <text:time>00:00:00</text:time></text:p>
        </style:region-right>
      </style:header>
      <style:header-left style:display="false"/>
      <style:header-first style:display="false"/>
      <style:footer>
        <text:p>Sid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7T12:16:29.972735256</meta:creation-date>
    <dc:date>2026-05-07T12:21:20.503556048</dc:date>
    <meta:editing-duration>PT4M52S</meta:editing-duration>
    <meta:editing-cycles>1</meta:editing-cycles>
    <meta:document-statistic meta:table-count="1" meta:cell-count="533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291cm" svg:height="16.476cm" xlink:href=".." xlink:type="simple" chart:class="chart:scatter" chart:style-name="ch1">
        <chart:legend chart:legend-position="end" svg:x="27.206cm" svg:y="6.943cm" style:legend-expansion="high" chart:style-name="ch2"/>
        <chart:plot-area chart:style-name="ch3" table:cell-range-address="Ark1.A2:Ark1.F90" chart:data-source-has-labels="row" svg:x="0.585cm" svg:y="0.329cm" svg:width="26.036cm" svg:height="15.818cm">
          <chart:coordinate-region svg:x="1.312cm" svg:y="0.529cm" svg:width="25.029cm" svg:height="14.9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1.B3:Ark1.B90" chart:label-cell-address="Ark1.B2:Ark1.B2" chart:class="chart:scatter">
            <chart:domain table:cell-range-address="Ark1.A3:Ark1.A90"/>
            <chart:data-point chart:repeated="88"/>
          </chart:series>
          <chart:series chart:style-name="ch8" chart:values-cell-range-address="Ark1.C3:Ark1.C90" chart:label-cell-address="Ark1.C2:Ark1.C2" chart:class="chart:scatter">
            <chart:data-point chart:repeated="88"/>
          </chart:series>
          <chart:series chart:style-name="ch9" chart:values-cell-range-address="Ark1.D3:Ark1.D90" chart:label-cell-address="Ark1.D2:Ark1.D2" chart:class="chart:scatter">
            <chart:data-point chart:repeated="88"/>
          </chart:series>
          <chart:series chart:style-name="ch10" chart:values-cell-range-address="Ark1.E3:Ark1.E90" chart:label-cell-address="Ark1.E2:Ark1.E2" chart:class="chart:scatter">
            <chart:data-point chart:repeated="88"/>
          </chart:series>
          <chart:series chart:style-name="ch11" chart:values-cell-range-address="Ark1.F3:Ark1.F90" chart:label-cell-address="Ark1.F2:Ark1.F2" chart:class="chart:scatter">
            <chart:data-point chart:repeated="8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A</text:p>
              </table:table-cell>
              <table:table-cell office:value-type="string">
                <text:p>celu</text:p>
                <draw:g>
                  <svg:desc>Ark1.B2:Ark1.B2</svg:desc>
                </draw:g>
              </table:table-cell>
              <table:table-cell office:value-type="string">
                <text:p>gelu</text:p>
                <draw:g>
                  <svg:desc>Ark1.C2:Ark1.C2</svg:desc>
                </draw:g>
              </table:table-cell>
              <table:table-cell office:value-type="string">
                <text:p>relu6</text:p>
                <draw:g>
                  <svg:desc>Ark1.D2:Ark1.D2</svg:desc>
                </draw:g>
              </table:table-cell>
              <table:table-cell office:value-type="string">
                <text:p>relu</text:p>
                <draw:g>
                  <svg:desc>Ark1.E2:Ark1.E2</svg:desc>
                </draw:g>
              </table:table-cell>
              <table:table-cell office:value-type="string">
                <text:p>selu</text:p>
                <draw:g>
                  <svg:desc>Ark1.F2:Ark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1.A3:Ark1.A90</svg:desc>
                </draw:g>
              </table:table-cell>
              <table:table-cell office:value-type="float" office:value="3.3134003">
                <text:p>3.3134003</text:p>
                <draw:g>
                  <svg:desc>Ark1.B3:Ark1.B90</svg:desc>
                </draw:g>
              </table:table-cell>
              <table:table-cell office:value-type="float" office:value="3.2556162">
                <text:p>3.2556162</text:p>
                <draw:g>
                  <svg:desc>Ark1.C3:Ark1.C90</svg:desc>
                </draw:g>
              </table:table-cell>
              <table:table-cell office:value-type="float" office:value="3.2574527">
                <text:p>3.2574527</text:p>
                <draw:g>
                  <svg:desc>Ark1.D3:Ark1.D90</svg:desc>
                </draw:g>
              </table:table-cell>
              <table:table-cell office:value-type="float" office:value="3.2575097">
                <text:p>3.2575097</text:p>
                <draw:g>
                  <svg:desc>Ark1.E3:Ark1.E90</svg:desc>
                </draw:g>
              </table:table-cell>
              <table:table-cell office:value-type="float" office:value="3.7193716">
                <text:p>3.7193716</text:p>
                <draw:g>
                  <svg:desc>Ark1.F3:Ark1.F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2800229">
                <text:p>3.2800229</text:p>
              </table:table-cell>
              <table:table-cell office:value-type="float" office:value="3.2542243">
                <text:p>3.2542243</text:p>
              </table:table-cell>
              <table:table-cell office:value-type="float" office:value="3.2535915">
                <text:p>3.2535915</text:p>
              </table:table-cell>
              <table:table-cell office:value-type="float" office:value="3.2540333">
                <text:p>3.2540333</text:p>
              </table:table-cell>
              <table:table-cell office:value-type="float" office:value="3.594124">
                <text:p>3.594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2577052">
                <text:p>3.2577052</text:p>
              </table:table-cell>
              <table:table-cell office:value-type="float" office:value="3.2527509">
                <text:p>3.2527509</text:p>
              </table:table-cell>
              <table:table-cell office:value-type="float" office:value="3.251541">
                <text:p>3.251541</text:p>
              </table:table-cell>
              <table:table-cell office:value-type="float" office:value="3.2524693">
                <text:p>3.2524693</text:p>
              </table:table-cell>
              <table:table-cell office:value-type="float" office:value="3.5601525">
                <text:p>3.5601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.240949">
                <text:p>3.240949</text:p>
              </table:table-cell>
              <table:table-cell office:value-type="float" office:value="3.2510657">
                <text:p>3.2510657</text:p>
              </table:table-cell>
              <table:table-cell office:value-type="float" office:value="3.2498553">
                <text:p>3.2498553</text:p>
              </table:table-cell>
              <table:table-cell office:value-type="float" office:value="3.2509387">
                <text:p>3.2509387</text:p>
              </table:table-cell>
              <table:table-cell office:value-type="float" office:value="3.509789">
                <text:p>3.509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2273295">
                <text:p>3.2273295</text:p>
              </table:table-cell>
              <table:table-cell office:value-type="float" office:value="3.2490458">
                <text:p>3.2490458</text:p>
              </table:table-cell>
              <table:table-cell office:value-type="float" office:value="3.2493317">
                <text:p>3.2493317</text:p>
              </table:table-cell>
              <table:table-cell office:value-type="float" office:value="3.2493875">
                <text:p>3.2493875</text:p>
              </table:table-cell>
              <table:table-cell office:value-type="float" office:value="3.4956112">
                <text:p>3.4956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3.2155187">
                <text:p>3.2155187</text:p>
              </table:table-cell>
              <table:table-cell office:value-type="float" office:value="3.2465816">
                <text:p>3.2465816</text:p>
              </table:table-cell>
              <table:table-cell office:value-type="float" office:value="3.2483027">
                <text:p>3.2483027</text:p>
              </table:table-cell>
              <table:table-cell office:value-type="float" office:value="3.2484298">
                <text:p>3.2484298</text:p>
              </table:table-cell>
              <table:table-cell office:value-type="float" office:value="3.491181">
                <text:p>3.491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3.2049952">
                <text:p>3.2049952</text:p>
              </table:table-cell>
              <table:table-cell office:value-type="float" office:value="3.2436223">
                <text:p>3.2436223</text:p>
              </table:table-cell>
              <table:table-cell office:value-type="float" office:value="3.2474127">
                <text:p>3.2474127</text:p>
              </table:table-cell>
              <table:table-cell office:value-type="float" office:value="3.2470648">
                <text:p>3.2470648</text:p>
              </table:table-cell>
              <table:table-cell office:value-type="float" office:value="3.4917197">
                <text:p>3.4917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3.1955805">
                <text:p>3.1955805</text:p>
              </table:table-cell>
              <table:table-cell office:value-type="float" office:value="3.2402475">
                <text:p>3.2402475</text:p>
              </table:table-cell>
              <table:table-cell office:value-type="float" office:value="3.246613">
                <text:p>3.246613</text:p>
              </table:table-cell>
              <table:table-cell office:value-type="float" office:value="3.2449996">
                <text:p>3.2449996</text:p>
              </table:table-cell>
              <table:table-cell office:value-type="float" office:value="3.4947605">
                <text:p>3.4947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3.1872091">
                <text:p>3.1872091</text:p>
              </table:table-cell>
              <table:table-cell office:value-type="float" office:value="3.2366352">
                <text:p>3.2366352</text:p>
              </table:table-cell>
              <table:table-cell office:value-type="float" office:value="3.2452004">
                <text:p>3.2452004</text:p>
              </table:table-cell>
              <table:table-cell office:value-type="float" office:value="3.2441032">
                <text:p>3.2441032</text:p>
              </table:table-cell>
              <table:table-cell office:value-type="float" office:value="3.4981704">
                <text:p>3.49817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3.179743">
                <text:p>3.179743</text:p>
              </table:table-cell>
              <table:table-cell office:value-type="float" office:value="3.2329674">
                <text:p>3.2329674</text:p>
              </table:table-cell>
              <table:table-cell office:value-type="float" office:value="3.2426734">
                <text:p>3.2426734</text:p>
              </table:table-cell>
              <table:table-cell office:value-type="float" office:value="3.2431014">
                <text:p>3.2431014</text:p>
              </table:table-cell>
              <table:table-cell office:value-type="float" office:value="3.501876">
                <text:p>3.501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3.1733234">
                <text:p>3.1733234</text:p>
              </table:table-cell>
              <table:table-cell office:value-type="float" office:value="3.2293866">
                <text:p>3.2293866</text:p>
              </table:table-cell>
              <table:table-cell office:value-type="float" office:value="3.2415218">
                <text:p>3.2415218</text:p>
              </table:table-cell>
              <table:table-cell office:value-type="float" office:value="3.2428226">
                <text:p>3.2428226</text:p>
              </table:table-cell>
              <table:table-cell office:value-type="float" office:value="3.5058498">
                <text:p>3.50584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3.16822">
                <text:p>3.16822</text:p>
              </table:table-cell>
              <table:table-cell office:value-type="float" office:value="3.2259474">
                <text:p>3.2259474</text:p>
              </table:table-cell>
              <table:table-cell office:value-type="float" office:value="3.2404757">
                <text:p>3.2404757</text:p>
              </table:table-cell>
              <table:table-cell office:value-type="float" office:value="3.2433193">
                <text:p>3.2433193</text:p>
              </table:table-cell>
              <table:table-cell office:value-type="float" office:value="3.5103948">
                <text:p>3.5103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3.1644778">
                <text:p>3.1644778</text:p>
              </table:table-cell>
              <table:table-cell office:value-type="float" office:value="3.2228115">
                <text:p>3.2228115</text:p>
              </table:table-cell>
              <table:table-cell office:value-type="float" office:value="3.2396953">
                <text:p>3.2396953</text:p>
              </table:table-cell>
              <table:table-cell office:value-type="float" office:value="3.2420561">
                <text:p>3.2420561</text:p>
              </table:table-cell>
              <table:table-cell office:value-type="float" office:value="3.5154426">
                <text:p>3.5154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3.162221">
                <text:p>3.162221</text:p>
              </table:table-cell>
              <table:table-cell office:value-type="float" office:value="3.2201326">
                <text:p>3.2201326</text:p>
              </table:table-cell>
              <table:table-cell office:value-type="float" office:value="3.2397208">
                <text:p>3.2397208</text:p>
              </table:table-cell>
              <table:table-cell office:value-type="float" office:value="3.2404182">
                <text:p>3.2404182</text:p>
              </table:table-cell>
              <table:table-cell office:value-type="float" office:value="3.520772">
                <text:p>3.520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3.1615157">
                <text:p>3.1615157</text:p>
              </table:table-cell>
              <table:table-cell office:value-type="float" office:value="3.2181377">
                <text:p>3.2181377</text:p>
              </table:table-cell>
              <table:table-cell office:value-type="float" office:value="3.2404304">
                <text:p>3.2404304</text:p>
              </table:table-cell>
              <table:table-cell office:value-type="float" office:value="3.2396047">
                <text:p>3.2396047</text:p>
              </table:table-cell>
              <table:table-cell office:value-type="float" office:value="3.5262597">
                <text:p>3.5262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3.1623647">
                <text:p>3.1623647</text:p>
              </table:table-cell>
              <table:table-cell office:value-type="float" office:value="3.216919">
                <text:p>3.216919</text:p>
              </table:table-cell>
              <table:table-cell office:value-type="float" office:value="3.2413034">
                <text:p>3.2413034</text:p>
              </table:table-cell>
              <table:table-cell office:value-type="float" office:value="3.2396376">
                <text:p>3.2396376</text:p>
              </table:table-cell>
              <table:table-cell office:value-type="float" office:value="3.5317314">
                <text:p>3.5317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3.164809">
                <text:p>3.164809</text:p>
              </table:table-cell>
              <table:table-cell office:value-type="float" office:value="3.216454">
                <text:p>3.216454</text:p>
              </table:table-cell>
              <table:table-cell office:value-type="float" office:value="3.2405393">
                <text:p>3.2405393</text:p>
              </table:table-cell>
              <table:table-cell office:value-type="float" office:value="3.240417">
                <text:p>3.240417</text:p>
              </table:table-cell>
              <table:table-cell office:value-type="float" office:value="3.53709">
                <text:p>3.537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3.1687965">
                <text:p>3.1687965</text:p>
              </table:table-cell>
              <table:table-cell office:value-type="float" office:value="3.2166646">
                <text:p>3.2166646</text:p>
              </table:table-cell>
              <table:table-cell office:value-type="float" office:value="3.238804">
                <text:p>3.238804</text:p>
              </table:table-cell>
              <table:table-cell office:value-type="float" office:value="3.2391415">
                <text:p>3.2391415</text:p>
              </table:table-cell>
              <table:table-cell office:value-type="float" office:value="3.5426147">
                <text:p>3.54261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3.1743536">
                <text:p>3.1743536</text:p>
              </table:table-cell>
              <table:table-cell office:value-type="float" office:value="3.217538">
                <text:p>3.217538</text:p>
              </table:table-cell>
              <table:table-cell office:value-type="float" office:value="3.2374055">
                <text:p>3.2374055</text:p>
              </table:table-cell>
              <table:table-cell office:value-type="float" office:value="3.2382777">
                <text:p>3.2382777</text:p>
              </table:table-cell>
              <table:table-cell office:value-type="float" office:value="3.5479174">
                <text:p>3.5479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3.1814036">
                <text:p>3.1814036</text:p>
              </table:table-cell>
              <table:table-cell office:value-type="float" office:value="3.2190855">
                <text:p>3.2190855</text:p>
              </table:table-cell>
              <table:table-cell office:value-type="float" office:value="3.23741">
                <text:p>3.23741</text:p>
              </table:table-cell>
              <table:table-cell office:value-type="float" office:value="3.2365012">
                <text:p>3.2365012</text:p>
              </table:table-cell>
              <table:table-cell office:value-type="float" office:value="3.553358">
                <text:p>3.5533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3.18989">
                <text:p>3.18989</text:p>
              </table:table-cell>
              <table:table-cell office:value-type="float" office:value="3.2215269">
                <text:p>3.2215269</text:p>
              </table:table-cell>
              <table:table-cell office:value-type="float" office:value="3.2373793">
                <text:p>3.2373793</text:p>
              </table:table-cell>
              <table:table-cell office:value-type="float" office:value="3.2371054">
                <text:p>3.2371054</text:p>
              </table:table-cell>
              <table:table-cell office:value-type="float" office:value="3.5586624">
                <text:p>3.55866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3.1996772">
                <text:p>3.1996772</text:p>
              </table:table-cell>
              <table:table-cell office:value-type="float" office:value="3.2277305">
                <text:p>3.2277305</text:p>
              </table:table-cell>
              <table:table-cell office:value-type="float" office:value="3.238435">
                <text:p>3.238435</text:p>
              </table:table-cell>
              <table:table-cell office:value-type="float" office:value="3.2378483">
                <text:p>3.2378483</text:p>
              </table:table-cell>
              <table:table-cell office:value-type="float" office:value="3.5639217">
                <text:p>3.56392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3.2104096">
                <text:p>3.2104096</text:p>
              </table:table-cell>
              <table:table-cell office:value-type="float" office:value="3.7063773">
                <text:p>3.7063773</text:p>
              </table:table-cell>
              <table:table-cell office:value-type="float" office:value="3.2406504">
                <text:p>3.2406504</text:p>
              </table:table-cell>
              <table:table-cell office:value-type="float" office:value="3.2386146">
                <text:p>3.2386146</text:p>
              </table:table-cell>
              <table:table-cell office:value-type="float" office:value="3.5688326">
                <text:p>3.56883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3.2221487">
                <text:p>3.2221487</text:p>
              </table:table-cell>
              <table:table-cell office:value-type="float" office:value="3.3715718">
                <text:p>3.3715718</text:p>
              </table:table-cell>
              <table:table-cell office:value-type="float" office:value="3.2423222">
                <text:p>3.2423222</text:p>
              </table:table-cell>
              <table:table-cell office:value-type="float" office:value="3.237032">
                <text:p>3.237032</text:p>
              </table:table-cell>
              <table:table-cell office:value-type="float" office:value="3.5736766">
                <text:p>3.57367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3.2345605">
                <text:p>3.2345605</text:p>
              </table:table-cell>
              <table:table-cell office:value-type="float" office:value="3.3659306">
                <text:p>3.3659306</text:p>
              </table:table-cell>
              <table:table-cell office:value-type="float" office:value="3.2479877">
                <text:p>3.2479877</text:p>
              </table:table-cell>
              <table:table-cell office:value-type="float" office:value="3.2365096">
                <text:p>3.2365096</text:p>
              </table:table-cell>
              <table:table-cell office:value-type="float" office:value="3.578197">
                <text:p>3.5781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3.2475383">
                <text:p>3.2475383</text:p>
              </table:table-cell>
              <table:table-cell office:value-type="float" office:value="3.4430094">
                <text:p>3.4430094</text:p>
              </table:table-cell>
              <table:table-cell office:value-type="float" office:value="3.2494626">
                <text:p>3.2494626</text:p>
              </table:table-cell>
              <table:table-cell office:value-type="float" office:value="3.238265">
                <text:p>3.238265</text:p>
              </table:table-cell>
              <table:table-cell office:value-type="float" office:value="3.5824163">
                <text:p>3.58241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">
                <text:p>104</text:p>
              </table:table-cell>
              <table:table-cell office:value-type="float" office:value="3.260848">
                <text:p>3.260848</text:p>
              </table:table-cell>
              <table:table-cell office:value-type="float" office:value="3.585141">
                <text:p>3.585141</text:p>
              </table:table-cell>
              <table:table-cell office:value-type="float" office:value="3.2486403">
                <text:p>3.2486403</text:p>
              </table:table-cell>
              <table:table-cell office:value-type="float" office:value="3.2484953">
                <text:p>3.2484953</text:p>
              </table:table-cell>
              <table:table-cell office:value-type="float" office:value="3.5866058">
                <text:p>3.58660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  <table:table-cell office:value-type="float" office:value="3.2744799">
                <text:p>3.2744799</text:p>
              </table:table-cell>
              <table:table-cell office:value-type="float" office:value="3.4733586">
                <text:p>3.4733586</text:p>
              </table:table-cell>
              <table:table-cell office:value-type="float" office:value="3.2527995">
                <text:p>3.2527995</text:p>
              </table:table-cell>
              <table:table-cell office:value-type="float" office:value="3.2782698">
                <text:p>3.2782698</text:p>
              </table:table-cell>
              <table:table-cell office:value-type="float" office:value="3.590656">
                <text:p>3.590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">
                <text:p>112</text:p>
              </table:table-cell>
              <table:table-cell office:value-type="float" office:value="3.2882829">
                <text:p>3.2882829</text:p>
              </table:table-cell>
              <table:table-cell office:value-type="float" office:value="3.4248247">
                <text:p>3.4248247</text:p>
              </table:table-cell>
              <table:table-cell office:value-type="float" office:value="3.2654955">
                <text:p>3.2654955</text:p>
              </table:table-cell>
              <table:table-cell office:value-type="float" office:value="3.278894">
                <text:p>3.278894</text:p>
              </table:table-cell>
              <table:table-cell office:value-type="float" office:value="3.594696">
                <text:p>3.5946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">
                <text:p>116</text:p>
              </table:table-cell>
              <table:table-cell office:value-type="float" office:value="3.3020906">
                <text:p>3.3020906</text:p>
              </table:table-cell>
              <table:table-cell office:value-type="float" office:value="3.5934923">
                <text:p>3.5934923</text:p>
              </table:table-cell>
              <table:table-cell office:value-type="float" office:value="3.2969036">
                <text:p>3.2969036</text:p>
              </table:table-cell>
              <table:table-cell office:value-type="float" office:value="3.285721">
                <text:p>3.285721</text:p>
              </table:table-cell>
              <table:table-cell office:value-type="float" office:value="3.5985074">
                <text:p>3.59850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3.3158543">
                <text:p>3.3158543</text:p>
              </table:table-cell>
              <table:table-cell office:value-type="float" office:value="3.642734">
                <text:p>3.642734</text:p>
              </table:table-cell>
              <table:table-cell office:value-type="float" office:value="3.4303784">
                <text:p>3.4303784</text:p>
              </table:table-cell>
              <table:table-cell office:value-type="float" office:value="3.3689137">
                <text:p>3.3689137</text:p>
              </table:table-cell>
              <table:table-cell office:value-type="float" office:value="3.6023629">
                <text:p>3.60236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">
                <text:p>124</text:p>
              </table:table-cell>
              <table:table-cell office:value-type="float" office:value="3.3295248">
                <text:p>3.3295248</text:p>
              </table:table-cell>
              <table:table-cell office:value-type="float" office:value="3.5564122">
                <text:p>3.5564122</text:p>
              </table:table-cell>
              <table:table-cell office:value-type="float" office:value="3.3274906">
                <text:p>3.3274906</text:p>
              </table:table-cell>
              <table:table-cell office:value-type="float" office:value="3.4987535">
                <text:p>3.4987535</text:p>
              </table:table-cell>
              <table:table-cell office:value-type="float" office:value="3.6062198">
                <text:p>3.60621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">
                <text:p>128</text:p>
              </table:table-cell>
              <table:table-cell office:value-type="float" office:value="3.3430076">
                <text:p>3.3430076</text:p>
              </table:table-cell>
              <table:table-cell office:value-type="float" office:value="3.7632577">
                <text:p>3.7632577</text:p>
              </table:table-cell>
              <table:table-cell office:value-type="float" office:value="3.3203278">
                <text:p>3.3203278</text:p>
              </table:table-cell>
              <table:table-cell office:value-type="float" office:value="3.4045758">
                <text:p>3.4045758</text:p>
              </table:table-cell>
              <table:table-cell office:value-type="float" office:value="3.6098723">
                <text:p>3.60987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">
                <text:p>132</text:p>
              </table:table-cell>
              <table:table-cell office:value-type="float" office:value="3.356252">
                <text:p>3.356252</text:p>
              </table:table-cell>
              <table:table-cell office:value-type="float" office:value="3.6773708">
                <text:p>3.6773708</text:p>
              </table:table-cell>
              <table:table-cell office:value-type="float" office:value="3.3581297">
                <text:p>3.3581297</text:p>
              </table:table-cell>
              <table:table-cell office:value-type="float" office:value="3.3765836">
                <text:p>3.3765836</text:p>
              </table:table-cell>
              <table:table-cell office:value-type="float" office:value="3.6135905">
                <text:p>3.61359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">
                <text:p>136</text:p>
              </table:table-cell>
              <table:table-cell office:value-type="float" office:value="3.3693051">
                <text:p>3.3693051</text:p>
              </table:table-cell>
              <table:table-cell office:value-type="float" office:value="3.7918508">
                <text:p>3.7918508</text:p>
              </table:table-cell>
              <table:table-cell office:value-type="float" office:value="3.3621843">
                <text:p>3.3621843</text:p>
              </table:table-cell>
              <table:table-cell office:value-type="float" office:value="3.4277081">
                <text:p>3.4277081</text:p>
              </table:table-cell>
              <table:table-cell office:value-type="float" office:value="3.6171987">
                <text:p>3.61719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3.3822024">
                <text:p>3.3822024</text:p>
              </table:table-cell>
              <table:table-cell office:value-type="float" office:value="3.708234">
                <text:p>3.708234</text:p>
              </table:table-cell>
              <table:table-cell office:value-type="float" office:value="3.3170273">
                <text:p>3.3170273</text:p>
              </table:table-cell>
              <table:table-cell office:value-type="float" office:value="3.35886">
                <text:p>3.35886</text:p>
              </table:table-cell>
              <table:table-cell office:value-type="float" office:value="3.620682">
                <text:p>3.6206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3.3947356">
                <text:p>3.3947356</text:p>
              </table:table-cell>
              <table:table-cell office:value-type="float" office:value="3.7598946">
                <text:p>3.7598946</text:p>
              </table:table-cell>
              <table:table-cell office:value-type="float" office:value="3.338385">
                <text:p>3.338385</text:p>
              </table:table-cell>
              <table:table-cell office:value-type="float" office:value="3.781569">
                <text:p>3.781569</text:p>
              </table:table-cell>
              <table:table-cell office:value-type="float" office:value="3.6240995">
                <text:p>3.62409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">
                <text:p>148</text:p>
              </table:table-cell>
              <table:table-cell office:value-type="float" office:value="3.4070823">
                <text:p>3.4070823</text:p>
              </table:table-cell>
              <table:table-cell office:value-type="float" office:value="3.8387263">
                <text:p>3.8387263</text:p>
              </table:table-cell>
              <table:table-cell office:value-type="float" office:value="3.5647697">
                <text:p>3.5647697</text:p>
              </table:table-cell>
              <table:table-cell office:value-type="float" office:value="3.4456868">
                <text:p>3.4456868</text:p>
              </table:table-cell>
              <table:table-cell office:value-type="float" office:value="3.627399">
                <text:p>3.627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">
                <text:p>152</text:p>
              </table:table-cell>
              <table:table-cell office:value-type="float" office:value="3.4191823">
                <text:p>3.4191823</text:p>
              </table:table-cell>
              <table:table-cell office:value-type="float" office:value="3.6369278">
                <text:p>3.6369278</text:p>
              </table:table-cell>
              <table:table-cell office:value-type="float" office:value="3.5433066">
                <text:p>3.5433066</text:p>
              </table:table-cell>
              <table:table-cell office:value-type="float" office:value="3.538975">
                <text:p>3.538975</text:p>
              </table:table-cell>
              <table:table-cell office:value-type="float" office:value="3.630644">
                <text:p>3.6306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3.4310143">
                <text:p>3.4310143</text:p>
              </table:table-cell>
              <table:table-cell office:value-type="float" office:value="3.9318886">
                <text:p>3.9318886</text:p>
              </table:table-cell>
              <table:table-cell office:value-type="float" office:value="3.3700585">
                <text:p>3.3700585</text:p>
              </table:table-cell>
              <table:table-cell office:value-type="float" office:value="3.5579362">
                <text:p>3.5579362</text:p>
              </table:table-cell>
              <table:table-cell office:value-type="float" office:value="3.6338923">
                <text:p>3.63389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3.4424665">
                <text:p>3.4424665</text:p>
              </table:table-cell>
              <table:table-cell office:value-type="float" office:value="3.6726394">
                <text:p>3.6726394</text:p>
              </table:table-cell>
              <table:table-cell office:value-type="float" office:value="3.7111123">
                <text:p>3.7111123</text:p>
              </table:table-cell>
              <table:table-cell office:value-type="float" office:value="3.4593275">
                <text:p>3.4593275</text:p>
              </table:table-cell>
              <table:table-cell office:value-type="float" office:value="3.6370237">
                <text:p>3.63702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">
                <text:p>164</text:p>
              </table:table-cell>
              <table:table-cell office:value-type="float" office:value="3.4537404">
                <text:p>3.4537404</text:p>
              </table:table-cell>
              <table:table-cell office:value-type="float" office:value="3.92663">
                <text:p>3.92663</text:p>
              </table:table-cell>
              <table:table-cell office:value-type="float" office:value="3.7089584">
                <text:p>3.7089584</text:p>
              </table:table-cell>
              <table:table-cell office:value-type="float" office:value="3.8791125">
                <text:p>3.8791125</text:p>
              </table:table-cell>
              <table:table-cell office:value-type="float" office:value="3.6401641">
                <text:p>3.64016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">
                <text:p>168</text:p>
              </table:table-cell>
              <table:table-cell office:value-type="float" office:value="3.46478">
                <text:p>3.46478</text:p>
              </table:table-cell>
              <table:table-cell office:value-type="float" office:value="3.6291597">
                <text:p>3.6291597</text:p>
              </table:table-cell>
              <table:table-cell office:value-type="float" office:value="3.6035056">
                <text:p>3.6035056</text:p>
              </table:table-cell>
              <table:table-cell office:value-type="float" office:value="3.5806675">
                <text:p>3.5806675</text:p>
              </table:table-cell>
              <table:table-cell office:value-type="float" office:value="3.643295">
                <text:p>3.6432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">
                <text:p>172</text:p>
              </table:table-cell>
              <table:table-cell office:value-type="float" office:value="3.4755352">
                <text:p>3.4755352</text:p>
              </table:table-cell>
              <table:table-cell office:value-type="float" office:value="3.521961">
                <text:p>3.521961</text:p>
              </table:table-cell>
              <table:table-cell office:value-type="float" office:value="3.5467312">
                <text:p>3.5467312</text:p>
              </table:table-cell>
              <table:table-cell office:value-type="float" office:value="3.534694">
                <text:p>3.534694</text:p>
              </table:table-cell>
              <table:table-cell office:value-type="float" office:value="3.6464057">
                <text:p>3.64640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3.486158">
                <text:p>3.486158</text:p>
              </table:table-cell>
              <table:table-cell office:value-type="float" office:value="3.546345">
                <text:p>3.546345</text:p>
              </table:table-cell>
              <table:table-cell office:value-type="float" office:value="3.6700764">
                <text:p>3.6700764</text:p>
              </table:table-cell>
              <table:table-cell office:value-type="float" office:value="3.4502418">
                <text:p>3.4502418</text:p>
              </table:table-cell>
              <table:table-cell office:value-type="float" office:value="3.6494462">
                <text:p>3.64944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">
                <text:p>180</text:p>
              </table:table-cell>
              <table:table-cell office:value-type="float" office:value="3.4964187">
                <text:p>3.4964187</text:p>
              </table:table-cell>
              <table:table-cell office:value-type="float" office:value="3.5735486">
                <text:p>3.5735486</text:p>
              </table:table-cell>
              <table:table-cell office:value-type="float" office:value="3.6864989">
                <text:p>3.6864989</text:p>
              </table:table-cell>
              <table:table-cell office:value-type="float" office:value="3.866729">
                <text:p>3.866729</text:p>
              </table:table-cell>
              <table:table-cell office:value-type="float" office:value="3.6524699">
                <text:p>3.65246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">
                <text:p>184</text:p>
              </table:table-cell>
              <table:table-cell office:value-type="float" office:value="3.5065026">
                <text:p>3.5065026</text:p>
              </table:table-cell>
              <table:table-cell office:value-type="float" office:value="3.597072">
                <text:p>3.597072</text:p>
              </table:table-cell>
              <table:table-cell office:value-type="float" office:value="3.5956278">
                <text:p>3.5956278</text:p>
              </table:table-cell>
              <table:table-cell office:value-type="float" office:value="3.831674">
                <text:p>3.831674</text:p>
              </table:table-cell>
              <table:table-cell office:value-type="float" office:value="3.6553636">
                <text:p>3.65536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8">
                <text:p>188</text:p>
              </table:table-cell>
              <table:table-cell office:value-type="float" office:value="3.5163972">
                <text:p>3.5163972</text:p>
              </table:table-cell>
              <table:table-cell office:value-type="float" office:value="3.6179018">
                <text:p>3.6179018</text:p>
              </table:table-cell>
              <table:table-cell office:value-type="float" office:value="3.5955846">
                <text:p>3.5955846</text:p>
              </table:table-cell>
              <table:table-cell office:value-type="float" office:value="4.1639977">
                <text:p>4.1639977</text:p>
              </table:table-cell>
              <table:table-cell office:value-type="float" office:value="3.658364">
                <text:p>3.6583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">
                <text:p>192</text:p>
              </table:table-cell>
              <table:table-cell office:value-type="float" office:value="3.5261617">
                <text:p>3.5261617</text:p>
              </table:table-cell>
              <table:table-cell office:value-type="float" office:value="3.6360052">
                <text:p>3.6360052</text:p>
              </table:table-cell>
              <table:table-cell office:value-type="float" office:value="3.6429343">
                <text:p>3.6429343</text:p>
              </table:table-cell>
              <table:table-cell office:value-type="float" office:value="4.0565076">
                <text:p>4.0565076</text:p>
              </table:table-cell>
              <table:table-cell office:value-type="float" office:value="3.661258">
                <text:p>3.6612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6">
                <text:p>196</text:p>
              </table:table-cell>
              <table:table-cell office:value-type="float" office:value="3.5355692">
                <text:p>3.5355692</text:p>
              </table:table-cell>
              <table:table-cell office:value-type="float" office:value="3.6521976">
                <text:p>3.6521976</text:p>
              </table:table-cell>
              <table:table-cell office:value-type="float" office:value="3.748003">
                <text:p>3.748003</text:p>
              </table:table-cell>
              <table:table-cell office:value-type="float" office:value="3.5144644">
                <text:p>3.5144644</text:p>
              </table:table-cell>
              <table:table-cell office:value-type="float" office:value="3.664209">
                <text:p>3.6642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">
                <text:p>200</text:p>
              </table:table-cell>
              <table:table-cell office:value-type="float" office:value="3.5448363">
                <text:p>3.5448363</text:p>
              </table:table-cell>
              <table:table-cell office:value-type="float" office:value="3.6671348">
                <text:p>3.6671348</text:p>
              </table:table-cell>
              <table:table-cell office:value-type="float" office:value="3.5301564">
                <text:p>3.5301564</text:p>
              </table:table-cell>
              <table:table-cell office:value-type="float" office:value="4.1761384">
                <text:p>4.1761384</text:p>
              </table:table-cell>
              <table:table-cell office:value-type="float" office:value="3.667007">
                <text:p>3.6670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">
                <text:p>204</text:p>
              </table:table-cell>
              <table:table-cell office:value-type="float" office:value="3.55408">
                <text:p>3.55408</text:p>
              </table:table-cell>
              <table:table-cell office:value-type="float" office:value="3.6808228">
                <text:p>3.6808228</text:p>
              </table:table-cell>
              <table:table-cell office:value-type="float" office:value="3.752909">
                <text:p>3.752909</text:p>
              </table:table-cell>
              <table:table-cell office:value-type="float" office:value="3.921657">
                <text:p>3.921657</text:p>
              </table:table-cell>
              <table:table-cell office:value-type="float" office:value="3.6698024">
                <text:p>3.66980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8">
                <text:p>208</text:p>
              </table:table-cell>
              <table:table-cell office:value-type="float" office:value="3.5629306">
                <text:p>3.5629306</text:p>
              </table:table-cell>
              <table:table-cell office:value-type="float" office:value="3.693179">
                <text:p>3.693179</text:p>
              </table:table-cell>
              <table:table-cell office:value-type="float" office:value="3.6907094">
                <text:p>3.6907094</text:p>
              </table:table-cell>
              <table:table-cell office:value-type="float" office:value="4.225206">
                <text:p>4.225206</text:p>
              </table:table-cell>
              <table:table-cell office:value-type="float" office:value="3.6724474">
                <text:p>3.67244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2">
                <text:p>212</text:p>
              </table:table-cell>
              <table:table-cell office:value-type="float" office:value="3.5717647">
                <text:p>3.5717647</text:p>
              </table:table-cell>
              <table:table-cell office:value-type="float" office:value="3.7048652">
                <text:p>3.7048652</text:p>
              </table:table-cell>
              <table:table-cell office:value-type="float" office:value="3.7854428">
                <text:p>3.7854428</text:p>
              </table:table-cell>
              <table:table-cell office:value-type="float" office:value="3.4642107">
                <text:p>3.4642107</text:p>
              </table:table-cell>
              <table:table-cell office:value-type="float" office:value="3.6752064">
                <text:p>3.67520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6">
                <text:p>216</text:p>
              </table:table-cell>
              <table:table-cell office:value-type="float" office:value="3.5803292">
                <text:p>3.5803292</text:p>
              </table:table-cell>
              <table:table-cell office:value-type="float" office:value="3.7158945">
                <text:p>3.7158945</text:p>
              </table:table-cell>
              <table:table-cell office:value-type="float" office:value="3.7041745">
                <text:p>3.7041745</text:p>
              </table:table-cell>
              <table:table-cell office:value-type="float" office:value="3.5326478">
                <text:p>3.5326478</text:p>
              </table:table-cell>
              <table:table-cell office:value-type="float" office:value="3.6778638">
                <text:p>3.67786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0">
                <text:p>220</text:p>
              </table:table-cell>
              <table:table-cell office:value-type="float" office:value="3.5887704">
                <text:p>3.5887704</text:p>
              </table:table-cell>
              <table:table-cell office:value-type="float" office:value="3.7261124">
                <text:p>3.7261124</text:p>
              </table:table-cell>
              <table:table-cell office:value-type="float" office:value="3.4764931">
                <text:p>3.4764931</text:p>
              </table:table-cell>
              <table:table-cell office:value-type="float" office:value="3.5737865">
                <text:p>3.5737865</text:p>
              </table:table-cell>
              <table:table-cell office:value-type="float" office:value="3.680547">
                <text:p>3.6805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4">
                <text:p>224</text:p>
              </table:table-cell>
              <table:table-cell office:value-type="float" office:value="3.597034">
                <text:p>3.597034</text:p>
              </table:table-cell>
              <table:table-cell office:value-type="float" office:value="3.7358925">
                <text:p>3.7358925</text:p>
              </table:table-cell>
              <table:table-cell office:value-type="float" office:value="3.4685442">
                <text:p>3.4685442</text:p>
              </table:table-cell>
              <table:table-cell office:value-type="float" office:value="3.6039312">
                <text:p>3.6039312</text:p>
              </table:table-cell>
              <table:table-cell office:value-type="float" office:value="3.6831334">
                <text:p>3.6831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8">
                <text:p>228</text:p>
              </table:table-cell>
              <table:table-cell office:value-type="float" office:value="3.6051867">
                <text:p>3.6051867</text:p>
              </table:table-cell>
              <table:table-cell office:value-type="float" office:value="3.7452302">
                <text:p>3.7452302</text:p>
              </table:table-cell>
              <table:table-cell office:value-type="float" office:value="3.4813056">
                <text:p>3.4813056</text:p>
              </table:table-cell>
              <table:table-cell office:value-type="float" office:value="3.6273048">
                <text:p>3.6273048</text:p>
              </table:table-cell>
              <table:table-cell office:value-type="float" office:value="3.6857328">
                <text:p>3.68573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">
                <text:p>232</text:p>
              </table:table-cell>
              <table:table-cell office:value-type="float" office:value="3.613187">
                <text:p>3.613187</text:p>
              </table:table-cell>
              <table:table-cell office:value-type="float" office:value="3.7539074">
                <text:p>3.7539074</text:p>
              </table:table-cell>
              <table:table-cell office:value-type="float" office:value="3.4917748">
                <text:p>3.4917748</text:p>
              </table:table-cell>
              <table:table-cell office:value-type="float" office:value="3.6476703">
                <text:p>3.6476703</text:p>
              </table:table-cell>
              <table:table-cell office:value-type="float" office:value="3.6883783">
                <text:p>3.68837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6">
                <text:p>236</text:p>
              </table:table-cell>
              <table:table-cell office:value-type="float" office:value="3.6209931">
                <text:p>3.6209931</text:p>
              </table:table-cell>
              <table:table-cell office:value-type="float" office:value="3.7625003">
                <text:p>3.7625003</text:p>
              </table:table-cell>
              <table:table-cell office:value-type="float" office:value="3.50084">
                <text:p>3.50084</text:p>
              </table:table-cell>
              <table:table-cell office:value-type="float" office:value="3.6643026">
                <text:p>3.6643026</text:p>
              </table:table-cell>
              <table:table-cell office:value-type="float" office:value="3.6908364">
                <text:p>3.6908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3.6287262">
                <text:p>3.6287262</text:p>
              </table:table-cell>
              <table:table-cell office:value-type="float" office:value="3.770634">
                <text:p>3.770634</text:p>
              </table:table-cell>
              <table:table-cell office:value-type="float" office:value="3.509679">
                <text:p>3.509679</text:p>
              </table:table-cell>
              <table:table-cell office:value-type="float" office:value="3.6795523">
                <text:p>3.6795523</text:p>
              </table:table-cell>
              <table:table-cell office:value-type="float" office:value="3.6932535">
                <text:p>3.69325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4">
                <text:p>244</text:p>
              </table:table-cell>
              <table:table-cell office:value-type="float" office:value="3.636262">
                <text:p>3.636262</text:p>
              </table:table-cell>
              <table:table-cell office:value-type="float" office:value="3.7786422">
                <text:p>3.7786422</text:p>
              </table:table-cell>
              <table:table-cell office:value-type="float" office:value="3.5183449">
                <text:p>3.5183449</text:p>
              </table:table-cell>
              <table:table-cell office:value-type="float" office:value="3.6946528">
                <text:p>3.6946528</text:p>
              </table:table-cell>
              <table:table-cell office:value-type="float" office:value="3.69572">
                <text:p>3.695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8">
                <text:p>248</text:p>
              </table:table-cell>
              <table:table-cell office:value-type="float" office:value="3.6437342">
                <text:p>3.6437342</text:p>
              </table:table-cell>
              <table:table-cell office:value-type="float" office:value="3.786238">
                <text:p>3.786238</text:p>
              </table:table-cell>
              <table:table-cell office:value-type="float" office:value="3.5264027">
                <text:p>3.5264027</text:p>
              </table:table-cell>
              <table:table-cell office:value-type="float" office:value="3.7091327">
                <text:p>3.7091327</text:p>
              </table:table-cell>
              <table:table-cell office:value-type="float" office:value="3.6979702">
                <text:p>3.69797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2">
                <text:p>252</text:p>
              </table:table-cell>
              <table:table-cell office:value-type="float" office:value="3.6510491">
                <text:p>3.6510491</text:p>
              </table:table-cell>
              <table:table-cell office:value-type="float" office:value="3.7934282">
                <text:p>3.7934282</text:p>
              </table:table-cell>
              <table:table-cell office:value-type="float" office:value="3.5337603">
                <text:p>3.5337603</text:p>
              </table:table-cell>
              <table:table-cell office:value-type="float" office:value="3.7225175">
                <text:p>3.7225175</text:p>
              </table:table-cell>
              <table:table-cell office:value-type="float" office:value="3.7002985">
                <text:p>3.70029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">
                <text:p>256</text:p>
              </table:table-cell>
              <table:table-cell office:value-type="float" office:value="3.6582808">
                <text:p>3.6582808</text:p>
              </table:table-cell>
              <table:table-cell office:value-type="float" office:value="3.8005323">
                <text:p>3.8005323</text:p>
              </table:table-cell>
              <table:table-cell office:value-type="float" office:value="3.5414262">
                <text:p>3.5414262</text:p>
              </table:table-cell>
              <table:table-cell office:value-type="float" office:value="3.7360291">
                <text:p>3.7360291</text:p>
              </table:table-cell>
              <table:table-cell office:value-type="float" office:value="3.7025592">
                <text:p>3.70255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0">
                <text:p>260</text:p>
              </table:table-cell>
              <table:table-cell office:value-type="float" office:value="3.6653163">
                <text:p>3.6653163</text:p>
              </table:table-cell>
              <table:table-cell office:value-type="float" office:value="3.807514">
                <text:p>3.807514</text:p>
              </table:table-cell>
              <table:table-cell office:value-type="float" office:value="3.5489063">
                <text:p>3.5489063</text:p>
              </table:table-cell>
              <table:table-cell office:value-type="float" office:value="3.7488916">
                <text:p>3.7488916</text:p>
              </table:table-cell>
              <table:table-cell office:value-type="float" office:value="3.7048109">
                <text:p>3.70481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4">
                <text:p>264</text:p>
              </table:table-cell>
              <table:table-cell office:value-type="float" office:value="3.672285">
                <text:p>3.672285</text:p>
              </table:table-cell>
              <table:table-cell office:value-type="float" office:value="3.8141022">
                <text:p>3.8141022</text:p>
              </table:table-cell>
              <table:table-cell office:value-type="float" office:value="3.5556016">
                <text:p>3.5556016</text:p>
              </table:table-cell>
              <table:table-cell office:value-type="float" office:value="3.761657">
                <text:p>3.761657</text:p>
              </table:table-cell>
              <table:table-cell office:value-type="float" office:value="3.7070916">
                <text:p>3.70709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8">
                <text:p>268</text:p>
              </table:table-cell>
              <table:table-cell office:value-type="float" office:value="3.6790767">
                <text:p>3.6790767</text:p>
              </table:table-cell>
              <table:table-cell office:value-type="float" office:value="3.8203082">
                <text:p>3.8203082</text:p>
              </table:table-cell>
              <table:table-cell office:value-type="float" office:value="3.5631866">
                <text:p>3.5631866</text:p>
              </table:table-cell>
              <table:table-cell office:value-type="float" office:value="3.7740529">
                <text:p>3.7740529</text:p>
              </table:table-cell>
              <table:table-cell office:value-type="float" office:value="3.7092912">
                <text:p>3.70929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2">
                <text:p>272</text:p>
              </table:table-cell>
              <table:table-cell office:value-type="float" office:value="3.6858876">
                <text:p>3.6858876</text:p>
              </table:table-cell>
              <table:table-cell office:value-type="float" office:value="3.8265533">
                <text:p>3.8265533</text:p>
              </table:table-cell>
              <table:table-cell office:value-type="float" office:value="3.570567">
                <text:p>3.570567</text:p>
              </table:table-cell>
              <table:table-cell office:value-type="float" office:value="3.7863085">
                <text:p>3.7863085</text:p>
              </table:table-cell>
              <table:table-cell office:value-type="float" office:value="3.7113779">
                <text:p>3.71137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6">
                <text:p>276</text:p>
              </table:table-cell>
              <table:table-cell office:value-type="float" office:value="3.692514">
                <text:p>3.692514</text:p>
              </table:table-cell>
              <table:table-cell office:value-type="float" office:value="3.8324273">
                <text:p>3.8324273</text:p>
              </table:table-cell>
              <table:table-cell office:value-type="float" office:value="3.5777326">
                <text:p>3.5777326</text:p>
              </table:table-cell>
              <table:table-cell office:value-type="float" office:value="3.7980623">
                <text:p>3.7980623</text:p>
              </table:table-cell>
              <table:table-cell office:value-type="float" office:value="3.7134798">
                <text:p>3.71347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0">
                <text:p>280</text:p>
              </table:table-cell>
              <table:table-cell office:value-type="float" office:value="3.6990492">
                <text:p>3.6990492</text:p>
              </table:table-cell>
              <table:table-cell office:value-type="float" office:value="3.8382885">
                <text:p>3.8382885</text:p>
              </table:table-cell>
              <table:table-cell office:value-type="float" office:value="3.5843165">
                <text:p>3.5843165</text:p>
              </table:table-cell>
              <table:table-cell office:value-type="float" office:value="3.8096614">
                <text:p>3.8096614</text:p>
              </table:table-cell>
              <table:table-cell office:value-type="float" office:value="3.7155788">
                <text:p>3.71557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4">
                <text:p>284</text:p>
              </table:table-cell>
              <table:table-cell office:value-type="float" office:value="3.7054362">
                <text:p>3.7054362</text:p>
              </table:table-cell>
              <table:table-cell office:value-type="float" office:value="3.8440332">
                <text:p>3.8440332</text:p>
              </table:table-cell>
              <table:table-cell office:value-type="float" office:value="3.5906503">
                <text:p>3.5906503</text:p>
              </table:table-cell>
              <table:table-cell office:value-type="float" office:value="3.8210382">
                <text:p>3.8210382</text:p>
              </table:table-cell>
              <table:table-cell office:value-type="float" office:value="3.7176514">
                <text:p>3.71765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8">
                <text:p>288</text:p>
              </table:table-cell>
              <table:table-cell office:value-type="float" office:value="3.7118514">
                <text:p>3.7118514</text:p>
              </table:table-cell>
              <table:table-cell office:value-type="float" office:value="3.8498003">
                <text:p>3.8498003</text:p>
              </table:table-cell>
              <table:table-cell office:value-type="float" office:value="3.596371">
                <text:p>3.596371</text:p>
              </table:table-cell>
              <table:table-cell office:value-type="float" office:value="3.8319983">
                <text:p>3.8319983</text:p>
              </table:table-cell>
              <table:table-cell office:value-type="float" office:value="3.7197287">
                <text:p>3.71972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2">
                <text:p>292</text:p>
              </table:table-cell>
              <table:table-cell office:value-type="float" office:value="3.7180836">
                <text:p>3.7180836</text:p>
              </table:table-cell>
              <table:table-cell office:value-type="float" office:value="3.8551586">
                <text:p>3.8551586</text:p>
              </table:table-cell>
              <table:table-cell office:value-type="float" office:value="3.6021821">
                <text:p>3.6021821</text:p>
              </table:table-cell>
              <table:table-cell office:value-type="float" office:value="3.842574">
                <text:p>3.842574</text:p>
              </table:table-cell>
              <table:table-cell office:value-type="float" office:value="3.7217035">
                <text:p>3.72170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6">
                <text:p>296</text:p>
              </table:table-cell>
              <table:table-cell office:value-type="float" office:value="3.7242053">
                <text:p>3.7242053</text:p>
              </table:table-cell>
              <table:table-cell office:value-type="float" office:value="3.8602564">
                <text:p>3.8602564</text:p>
              </table:table-cell>
              <table:table-cell office:value-type="float" office:value="3.6078172">
                <text:p>3.6078172</text:p>
              </table:table-cell>
              <table:table-cell office:value-type="float" office:value="3.8531237">
                <text:p>3.8531237</text:p>
              </table:table-cell>
              <table:table-cell office:value-type="float" office:value="3.723685">
                <text:p>3.7236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3.7302718">
                <text:p>3.7302718</text:p>
              </table:table-cell>
              <table:table-cell office:value-type="float" office:value="3.865495">
                <text:p>3.865495</text:p>
              </table:table-cell>
              <table:table-cell office:value-type="float" office:value="3.613255">
                <text:p>3.613255</text:p>
              </table:table-cell>
              <table:table-cell office:value-type="float" office:value="3.863255">
                <text:p>3.863255</text:p>
              </table:table-cell>
              <table:table-cell office:value-type="float" office:value="3.7257266">
                <text:p>3.72572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4">
                <text:p>304</text:p>
              </table:table-cell>
              <table:table-cell office:value-type="float" office:value="3.7362113">
                <text:p>3.7362113</text:p>
              </table:table-cell>
              <table:table-cell office:value-type="float" office:value="3.8705134">
                <text:p>3.8705134</text:p>
              </table:table-cell>
              <table:table-cell office:value-type="float" office:value="3.6191936">
                <text:p>3.6191936</text:p>
              </table:table-cell>
              <table:table-cell office:value-type="float" office:value="3.873399">
                <text:p>3.873399</text:p>
              </table:table-cell>
              <table:table-cell office:value-type="float" office:value="3.7277176">
                <text:p>3.72771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8">
                <text:p>308</text:p>
              </table:table-cell>
              <table:table-cell office:value-type="float" office:value="3.7421498">
                <text:p>3.7421498</text:p>
              </table:table-cell>
              <table:table-cell office:value-type="float" office:value="3.8756404">
                <text:p>3.8756404</text:p>
              </table:table-cell>
              <table:table-cell office:value-type="float" office:value="3.6251526">
                <text:p>3.6251526</text:p>
              </table:table-cell>
              <table:table-cell office:value-type="float" office:value="3.883219">
                <text:p>3.883219</text:p>
              </table:table-cell>
              <table:table-cell office:value-type="float" office:value="3.7297194">
                <text:p>3.72971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2">
                <text:p>312</text:p>
              </table:table-cell>
              <table:table-cell office:value-type="float" office:value="3.7479448">
                <text:p>3.7479448</text:p>
              </table:table-cell>
              <table:table-cell office:value-type="float" office:value="3.8804603">
                <text:p>3.8804603</text:p>
              </table:table-cell>
              <table:table-cell office:value-type="float" office:value="3.6308272">
                <text:p>3.6308272</text:p>
              </table:table-cell>
              <table:table-cell office:value-type="float" office:value="3.893151">
                <text:p>3.893151</text:p>
              </table:table-cell>
              <table:table-cell office:value-type="float" office:value="3.7315798">
                <text:p>3.73157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6">
                <text:p>316</text:p>
              </table:table-cell>
              <table:table-cell office:value-type="float" office:value="3.753685">
                <text:p>3.753685</text:p>
              </table:table-cell>
              <table:table-cell office:value-type="float" office:value="3.8854885">
                <text:p>3.8854885</text:p>
              </table:table-cell>
              <table:table-cell office:value-type="float" office:value="3.6363103">
                <text:p>3.6363103</text:p>
              </table:table-cell>
              <table:table-cell office:value-type="float" office:value="3.9021864">
                <text:p>3.9021864</text:p>
              </table:table-cell>
              <table:table-cell office:value-type="float" office:value="3.7335496">
                <text:p>3.73354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0">
                <text:p>320</text:p>
              </table:table-cell>
              <table:table-cell office:value-type="float" office:value="3.759309">
                <text:p>3.759309</text:p>
              </table:table-cell>
              <table:table-cell office:value-type="float" office:value="3.8899608">
                <text:p>3.8899608</text:p>
              </table:table-cell>
              <table:table-cell office:value-type="float" office:value="3.6418662">
                <text:p>3.6418662</text:p>
              </table:table-cell>
              <table:table-cell office:value-type="float" office:value="3.9115064">
                <text:p>3.9115064</text:p>
              </table:table-cell>
              <table:table-cell office:value-type="float" office:value="3.735357">
                <text:p>3.7353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4">
                <text:p>324</text:p>
              </table:table-cell>
              <table:table-cell office:value-type="float" office:value="3.764841">
                <text:p>3.764841</text:p>
              </table:table-cell>
              <table:table-cell office:value-type="float" office:value="3.8945236">
                <text:p>3.8945236</text:p>
              </table:table-cell>
              <table:table-cell office:value-type="float" office:value="3.6465595">
                <text:p>3.6465595</text:p>
              </table:table-cell>
              <table:table-cell office:value-type="float" office:value="3.920686">
                <text:p>3.920686</text:p>
              </table:table-cell>
              <table:table-cell office:value-type="float" office:value="3.7373302">
                <text:p>3.73733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8">
                <text:p>328</text:p>
              </table:table-cell>
              <table:table-cell office:value-type="float" office:value="3.7704115">
                <text:p>3.7704115</text:p>
              </table:table-cell>
              <table:table-cell office:value-type="float" office:value="3.8989668">
                <text:p>3.8989668</text:p>
              </table:table-cell>
              <table:table-cell office:value-type="float" office:value="3.651668">
                <text:p>3.651668</text:p>
              </table:table-cell>
              <table:table-cell office:value-type="float" office:value="3.9293938">
                <text:p>3.9293938</text:p>
              </table:table-cell>
              <table:table-cell office:value-type="float" office:value="3.7392128">
                <text:p>3.73921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2">
                <text:p>332</text:p>
              </table:table-cell>
              <table:table-cell office:value-type="float" office:value="3.775817">
                <text:p>3.775817</text:p>
              </table:table-cell>
              <table:table-cell office:value-type="float" office:value="3.903471">
                <text:p>3.903471</text:p>
              </table:table-cell>
              <table:table-cell office:value-type="float" office:value="3.656964">
                <text:p>3.656964</text:p>
              </table:table-cell>
              <table:table-cell office:value-type="float" office:value="3.9384859">
                <text:p>3.9384859</text:p>
              </table:table-cell>
              <table:table-cell office:value-type="float" office:value="3.7410579">
                <text:p>3.74105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6">
                <text:p>336</text:p>
              </table:table-cell>
              <table:table-cell office:value-type="float" office:value="3.7812397">
                <text:p>3.7812397</text:p>
              </table:table-cell>
              <table:table-cell office:value-type="float" office:value="3.9076226">
                <text:p>3.9076226</text:p>
              </table:table-cell>
              <table:table-cell office:value-type="float" office:value="3.662013">
                <text:p>3.662013</text:p>
              </table:table-cell>
              <table:table-cell office:value-type="float" office:value="3.946947">
                <text:p>3.946947</text:p>
              </table:table-cell>
              <table:table-cell office:value-type="float" office:value="3.7428064">
                <text:p>3.74280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3.7864895">
                <text:p>3.7864895</text:p>
              </table:table-cell>
              <table:table-cell office:value-type="float" office:value="3.911889">
                <text:p>3.911889</text:p>
              </table:table-cell>
              <table:table-cell office:value-type="float" office:value="3.6674714">
                <text:p>3.6674714</text:p>
              </table:table-cell>
              <table:table-cell office:value-type="float" office:value="3.9557333">
                <text:p>3.9557333</text:p>
              </table:table-cell>
              <table:table-cell office:value-type="float" office:value="3.744676">
                <text:p>3.7446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4">
                <text:p>344</text:p>
              </table:table-cell>
              <table:table-cell office:value-type="float" office:value="3.7917018">
                <text:p>3.7917018</text:p>
              </table:table-cell>
              <table:table-cell office:value-type="float" office:value="3.9159024">
                <text:p>3.9159024</text:p>
              </table:table-cell>
              <table:table-cell office:value-type="float" office:value="3.6725852">
                <text:p>3.6725852</text:p>
              </table:table-cell>
              <table:table-cell office:value-type="float" office:value="3.964072">
                <text:p>3.964072</text:p>
              </table:table-cell>
              <table:table-cell office:value-type="float" office:value="3.746537">
                <text:p>3.7465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8">
                <text:p>348</text:p>
              </table:table-cell>
              <table:table-cell office:value-type="float" office:value="3.796948">
                <text:p>3.796948</text:p>
              </table:table-cell>
              <table:table-cell office:value-type="float" office:value="3.920101">
                <text:p>3.920101</text:p>
              </table:table-cell>
              <table:table-cell office:value-type="float" office:value="3.677586">
                <text:p>3.677586</text:p>
              </table:table-cell>
              <table:table-cell office:value-type="float" office:value="3.9730828">
                <text:p>3.9730828</text:p>
              </table:table-cell>
              <table:table-cell office:value-type="float" office:value="3.7483025">
                <text:p>3.7483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